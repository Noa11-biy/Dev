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Object 6/media/image1.png" manifest:media-type="image/png"/>
  <manifest:file-entry manifest:full-path="media/image11.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Narrow" svg:font-family="Aptos Narrow"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end" fo:margin-left="2.95in">
        <style:tab-stops/>
      </style:paragraph-properties>
    </style:style>
    <style:style style:name="T2" style:parent-style-name="Policepardéfaut" style:family="text">
      <style:text-properties fo:font-size="10pt" style:font-size-asian="10pt"/>
    </style:style>
    <style:style style:name="T3" style:parent-style-name="Policepardéfaut" style:family="text">
      <style:text-properties fo:font-weight="bold" style:font-weight-asian="bold" style:font-weight-complex="bold" fo:font-size="16pt" style:font-size-asian="16pt" style:font-size-complex="16pt"/>
    </style:style>
    <style:style style:name="P4" style:parent-style-name="Normal" style:family="paragraph">
      <style:paragraph-properties fo:text-align="end" fo:margin-left="2.95in">
        <style:tab-stops/>
      </style:paragraph-properties>
      <style:text-properties fo:font-size="12pt" style:font-size-asian="12pt" style:font-size-complex="12pt"/>
    </style:style>
    <style:style style:name="P5" style:parent-style-name="Normal" style:family="paragraph">
      <style:paragraph-properties fo:text-align="end" fo:margin-left="2.95in">
        <style:tab-stops/>
      </style:paragraph-properties>
      <style:text-properties fo:font-size="12pt" style:font-size-asian="12pt" style:font-size-complex="12pt"/>
    </style:style>
    <style:style style:name="P6" style:parent-style-name="Normal" style:family="paragraph">
      <style:paragraph-properties fo:text-align="end" fo:margin-left="2.95in">
        <style:tab-stops/>
      </style:paragraph-properties>
      <style:text-properties fo:font-size="12pt" style:font-size-asian="12pt" style:font-size-complex="12pt"/>
    </style:style>
    <style:style style:name="P7" style:parent-style-name="Normal" style:family="paragraph">
      <style:text-properties fo:font-weight="bold" style:font-weight-asian="bold" fo:font-size="10pt" style:font-size-asian="10pt"/>
    </style:style>
    <style:style style:name="P8" style:parent-style-name="Normal" style:family="paragraph">
      <style:text-properties fo:font-weight="bold" style:font-weight-asian="bold" fo:font-size="10pt" style:font-size-asian="10pt"/>
    </style:style>
    <style:style style:name="P9" style:parent-style-name="Normal" style:family="paragraph">
      <style:text-properties fo:font-weight="bold" style:font-weight-asian="bold" fo:font-size="10pt" style:font-size-asian="10pt"/>
    </style:style>
    <style:style style:name="P10" style:parent-style-name="Normal" style:family="paragraph">
      <style:text-properties fo:font-weight="bold" style:font-weight-asian="bold" fo:font-size="10pt" style:font-size-asian="10pt"/>
    </style:style>
    <style:style style:name="P11" style:parent-style-name="Normal" style:family="paragraph">
      <style:text-properties fo:font-weight="bold" style:font-weight-asian="bold" fo:font-size="10pt" style:font-size-asian="10pt"/>
    </style:style>
    <style:style style:name="P12" style:parent-style-name="Normal" style:family="paragraph">
      <style:text-properties fo:font-weight="bold" style:font-weight-asian="bold" fo:font-size="10pt" style:font-size-asian="10pt"/>
    </style:style>
    <style:style style:name="T13" style:parent-style-name="Policepardéfaut" style:family="text">
      <style:text-properties fo:font-size="10pt" style:font-size-asian="10pt"/>
    </style:style>
    <style:style style:name="P14" style:parent-style-name="Normal" style:family="paragraph">
      <style:text-properties fo:font-weight="bold" style:font-weight-asian="bold" fo:font-size="10pt" style:font-size-asian="10pt"/>
    </style:style>
    <style:style style:name="P15" style:parent-style-name="Normal" style:family="paragraph">
      <style:text-properties fo:font-weight="bold" style:font-weight-asian="bold" fo:font-size="10pt" style:font-size-asian="10pt"/>
    </style:style>
    <style:style style:name="P16" style:parent-style-name="Titre" style:family="paragraph">
      <style:text-properties fo:font-weight="bold" style:font-weight-asian="bold" style:font-weight-complex="bold"/>
    </style:style>
    <style:style style:name="P17" style:parent-style-name="Sous-titre" style:family="paragraph">
      <style:paragraph-properties fo:margin-left="1.0416in">
        <style:tab-stops/>
      </style:paragraph-properties>
    </style:style>
    <style:style style:name="T18" style:parent-style-name="Policepardéfaut" style:family="text">
      <style:text-properties fo:font-weight="bold" style:font-weight-asian="bold" fo:font-size="10pt" style:font-size-asian="10pt"/>
    </style:style>
    <style:style style:name="T19" style:parent-style-name="Policepardéfaut" style:family="text">
      <style:text-properties fo:font-weight="bold" style:font-weight-asian="bold" fo:font-size="10pt" style:font-size-asian="10pt"/>
    </style:style>
    <style:style style:name="P20" style:parent-style-name="Normal" style:family="paragraph">
      <style:text-properties style:font-name-complex="Calibri" style:font-size-complex="14pt"/>
    </style:style>
    <style:style style:name="P21" style:parent-style-name="Paragraphedeliste" style:list-style-name="LFO1" style:family="paragraph">
      <style:text-properties style:font-name-complex="Calibri" style:font-size-complex="14pt"/>
    </style:style>
    <style:style style:name="P22" style:parent-style-name="Paragraphedeliste" style:list-style-name="LFO1" style:family="paragraph">
      <style:text-properties style:font-name-complex="Calibri" style:font-size-complex="14pt"/>
    </style:style>
    <style:style style:name="P23" style:parent-style-name="Paragraphedeliste" style:list-style-name="LFO1" style:family="paragraph">
      <style:text-properties style:font-name-complex="Calibri" style:font-size-complex="14pt"/>
    </style:style>
    <style:style style:name="P24" style:parent-style-name="Normal" style:family="paragraph">
      <style:paragraph-properties fo:margin-left="0.25in">
        <style:tab-stops/>
      </style:paragraph-properties>
      <style:text-properties style:font-name-complex="Calibri" style:font-size-complex="14pt"/>
    </style:style>
    <style:style style:name="P25" style:parent-style-name="Normal" style:family="paragraph">
      <style:paragraph-properties fo:margin-left="0.25in">
        <style:tab-stops/>
      </style:paragraph-properties>
      <style:text-properties style:font-name-complex="Calibri" style:font-size-complex="14pt"/>
    </style:style>
    <style:style style:name="P26" style:parent-style-name="Normal" style:family="paragraph">
      <style:paragraph-properties fo:margin-left="0.25in">
        <style:tab-stops/>
      </style:paragraph-properties>
      <style:text-properties style:font-name-complex="Calibri" style:font-size-complex="14pt"/>
    </style:style>
    <style:style style:name="P27" style:parent-style-name="Normal" style:family="paragraph">
      <style:paragraph-properties fo:margin-left="0.25in">
        <style:tab-stops/>
      </style:paragraph-properties>
      <style:text-properties style:font-name-complex="Calibri" style:font-size-complex="14pt"/>
    </style:style>
    <style:style style:name="P28" style:parent-style-name="Normal" style:family="paragraph">
      <style:paragraph-properties fo:margin-left="0.25in">
        <style:tab-stops/>
      </style:paragraph-properties>
      <style:text-properties style:font-name-complex="Calibri" style:font-size-complex="14pt"/>
    </style:style>
    <style:style style:name="P29" style:parent-style-name="Normal" style:family="paragraph">
      <style:paragraph-properties fo:margin-left="0.25in">
        <style:tab-stops/>
      </style:paragraph-properties>
      <style:text-properties style:font-name-complex="Calibri" style:font-size-complex="14pt"/>
    </style:style>
    <style:style style:name="P30" style:parent-style-name="Normal" style:family="paragraph">
      <style:paragraph-properties fo:margin-left="0.25in">
        <style:tab-stops/>
      </style:paragraph-properties>
      <style:text-properties style:font-name-complex="Calibri" style:font-size-complex="14pt"/>
    </style:style>
    <style:style style:name="P31" style:parent-style-name="Normal" style:family="paragraph">
      <style:paragraph-properties fo:margin-left="0.25in">
        <style:tab-stops/>
      </style:paragraph-properties>
      <style:text-properties style:font-name-complex="Calibri" style:font-size-complex="14pt"/>
    </style:style>
    <style:style style:name="P32" style:parent-style-name="Normal" style:family="paragraph">
      <style:paragraph-properties fo:margin-left="0.25in">
        <style:tab-stops/>
      </style:paragraph-properties>
      <style:text-properties style:font-name-complex="Calibri" style:font-size-complex="14pt"/>
    </style:style>
    <style:style style:name="P33" style:parent-style-name="Normal" style:family="paragraph">
      <style:paragraph-properties fo:margin-left="0.25in">
        <style:tab-stops/>
      </style:paragraph-properties>
      <style:text-properties style:font-name-complex="Calibri" style:font-size-complex="14pt"/>
    </style:style>
    <style:style style:name="P34" style:parent-style-name="Normal" style:family="paragraph">
      <style:paragraph-properties fo:margin-left="0.25in">
        <style:tab-stops/>
      </style:paragraph-properties>
      <style:text-properties style:font-name-complex="Calibri" style:font-size-complex="14pt"/>
    </style:style>
    <style:style style:name="P35" style:parent-style-name="Normal" style:family="paragraph">
      <style:paragraph-properties fo:margin-left="0.25in">
        <style:tab-stops/>
      </style:paragraph-properties>
      <style:text-properties style:font-name-complex="Calibri" style:font-size-complex="14pt"/>
    </style:style>
    <style:style style:name="P36" style:parent-style-name="Normal" style:family="paragraph">
      <style:paragraph-properties fo:margin-left="0.25in">
        <style:tab-stops/>
      </style:paragraph-properties>
      <style:text-properties style:font-name-complex="Calibri" style:font-size-complex="14pt"/>
    </style:style>
    <style:style style:name="P37" style:parent-style-name="Normal" style:family="paragraph">
      <style:paragraph-properties fo:margin-left="0.25in">
        <style:tab-stops/>
      </style:paragraph-properties>
      <style:text-properties style:font-name-complex="Calibri" style:font-size-complex="14pt"/>
    </style:style>
    <style:style style:name="P38" style:parent-style-name="Normal" style:family="paragraph">
      <style:text-properties style:font-name-complex="Calibri" style:font-size-complex="14pt"/>
    </style:style>
    <style:style style:name="P39" style:parent-style-name="Normal" style:family="paragraph">
      <style:paragraph-properties fo:margin-left="0.25in">
        <style:tab-stops/>
      </style:paragraph-properties>
      <style:text-properties style:font-name-complex="Calibri" style:font-size-complex="14pt"/>
    </style:style>
    <style:style style:name="P40" style:parent-style-name="Normal" style:family="paragraph">
      <style:paragraph-properties fo:margin-left="0.25in">
        <style:tab-stops/>
      </style:paragraph-properties>
      <style:text-properties style:font-name-complex="Calibri" style:font-size-complex="14pt"/>
    </style:style>
    <style:style style:name="P41" style:parent-style-name="TM1" style:family="paragraph">
      <style:paragraph-properties>
        <style:tab-stops>
          <style:tab-stop style:type="right" style:leader-style="dotted" style:leader-text="." style:position="6.293in"/>
        </style:tab-stops>
      </style:paragraph-properties>
    </style:style>
    <style:style style:name="P42" style:parent-style-name="TM1" style:family="paragraph">
      <style:paragraph-properties>
        <style:tab-stops>
          <style:tab-stop style:type="left" style:position="0.3333in"/>
          <style:tab-stop style:type="right" style:leader-style="dotted" style:leader-text="." style:position="6.293in"/>
        </style:tab-stops>
      </style:paragraph-properties>
    </style:style>
    <style:style style:name="P43" style:parent-style-name="TM2" style:family="paragraph">
      <style:paragraph-properties>
        <style:tab-stops>
          <style:tab-stop style:type="left" style:position="0.4722in"/>
          <style:tab-stop style:type="right" style:leader-style="dotted" style:leader-text="." style:position="6.0986in"/>
        </style:tab-stops>
      </style:paragraph-properties>
    </style:style>
    <style:style style:name="P44" style:parent-style-name="TM2" style:family="paragraph">
      <style:paragraph-properties>
        <style:tab-stops>
          <style:tab-stop style:type="left" style:position="0.4722in"/>
          <style:tab-stop style:type="right" style:leader-style="dotted" style:leader-text="." style:position="6.0986in"/>
        </style:tab-stops>
      </style:paragraph-properties>
    </style:style>
    <style:style style:name="P45" style:parent-style-name="TM2" style:family="paragraph">
      <style:paragraph-properties>
        <style:tab-stops>
          <style:tab-stop style:type="left" style:position="0.4722in"/>
          <style:tab-stop style:type="right" style:leader-style="dotted" style:leader-text="." style:position="6.0986in"/>
        </style:tab-stops>
      </style:paragraph-properties>
    </style:style>
    <style:style style:name="P46" style:parent-style-name="TM2" style:family="paragraph">
      <style:paragraph-properties>
        <style:tab-stops>
          <style:tab-stop style:type="left" style:position="0.4722in"/>
          <style:tab-stop style:type="right" style:leader-style="dotted" style:leader-text="." style:position="6.0986in"/>
        </style:tab-stops>
      </style:paragraph-properties>
    </style:style>
    <style:style style:name="P47" style:parent-style-name="TM1" style:family="paragraph">
      <style:paragraph-properties>
        <style:tab-stops>
          <style:tab-stop style:type="right" style:leader-style="dotted" style:leader-text="." style:position="6.293in"/>
        </style:tab-stops>
      </style:paragraph-properties>
    </style:style>
    <style:style style:name="P48" style:parent-style-name="TM2" style:family="paragraph">
      <style:paragraph-properties>
        <style:tab-stops>
          <style:tab-stop style:type="left" style:position="0.3055in"/>
          <style:tab-stop style:type="right" style:leader-style="dotted" style:leader-text="." style:position="6.0986in"/>
        </style:tab-stops>
      </style:paragraph-properties>
    </style:style>
    <style:style style:name="P49" style:parent-style-name="TM3" style:family="paragraph">
      <style:paragraph-properties>
        <style:tab-stops>
          <style:tab-stop style:type="left" style:position="0.4444in"/>
          <style:tab-stop style:type="right" style:leader-style="dotted" style:leader-text="." style:position="5.9041in"/>
        </style:tab-stops>
      </style:paragraph-properties>
    </style:style>
    <style:style style:name="P50" style:parent-style-name="TM3" style:family="paragraph">
      <style:paragraph-properties>
        <style:tab-stops>
          <style:tab-stop style:type="left" style:position="0.4444in"/>
          <style:tab-stop style:type="right" style:leader-style="dotted" style:leader-text="." style:position="5.9041in"/>
        </style:tab-stops>
      </style:paragraph-properties>
    </style:style>
    <style:style style:name="P51" style:parent-style-name="TM2" style:family="paragraph">
      <style:paragraph-properties>
        <style:tab-stops>
          <style:tab-stop style:type="left" style:position="0.3055in"/>
          <style:tab-stop style:type="right" style:leader-style="dotted" style:leader-text="." style:position="6.0986in"/>
        </style:tab-stops>
      </style:paragraph-properties>
    </style:style>
    <style:style style:name="P52" style:parent-style-name="TM3" style:family="paragraph">
      <style:paragraph-properties>
        <style:tab-stops>
          <style:tab-stop style:type="left" style:position="0.4444in"/>
          <style:tab-stop style:type="right" style:leader-style="dotted" style:leader-text="." style:position="5.9041in"/>
        </style:tab-stops>
      </style:paragraph-properties>
    </style:style>
    <style:style style:name="P53" style:parent-style-name="TM3" style:family="paragraph">
      <style:paragraph-properties>
        <style:tab-stops>
          <style:tab-stop style:type="left" style:position="0.4444in"/>
          <style:tab-stop style:type="right" style:leader-style="dotted" style:leader-text="." style:position="5.9041in"/>
        </style:tab-stops>
      </style:paragraph-properties>
    </style:style>
    <style:style style:name="P54" style:parent-style-name="TM2" style:family="paragraph">
      <style:paragraph-properties>
        <style:tab-stops>
          <style:tab-stop style:type="left" style:position="0.3055in"/>
          <style:tab-stop style:type="right" style:leader-style="dotted" style:leader-text="." style:position="6.0986in"/>
        </style:tab-stops>
      </style:paragraph-properties>
    </style:style>
    <style:style style:name="P55" style:parent-style-name="TM3" style:family="paragraph">
      <style:paragraph-properties>
        <style:tab-stops>
          <style:tab-stop style:type="left" style:position="0.4444in"/>
          <style:tab-stop style:type="right" style:leader-style="dotted" style:leader-text="." style:position="5.9041in"/>
        </style:tab-stops>
      </style:paragraph-properties>
    </style:style>
    <style:style style:name="P56" style:parent-style-name="TM3" style:family="paragraph">
      <style:paragraph-properties>
        <style:tab-stops>
          <style:tab-stop style:type="left" style:position="0.4444in"/>
          <style:tab-stop style:type="right" style:leader-style="dotted" style:leader-text="." style:position="5.9041in"/>
        </style:tab-stops>
      </style:paragraph-properties>
    </style:style>
    <style:style style:name="P57" style:parent-style-name="TM3" style:family="paragraph">
      <style:paragraph-properties>
        <style:tab-stops>
          <style:tab-stop style:type="left" style:position="0.4444in"/>
          <style:tab-stop style:type="right" style:leader-style="dotted" style:leader-text="." style:position="5.9041in"/>
        </style:tab-stops>
      </style:paragraph-properties>
    </style:style>
    <style:style style:name="P58" style:parent-style-name="TM3" style:family="paragraph">
      <style:paragraph-properties>
        <style:tab-stops>
          <style:tab-stop style:type="left" style:position="0.4444in"/>
          <style:tab-stop style:type="right" style:leader-style="dotted" style:leader-text="." style:position="5.9041in"/>
        </style:tab-stops>
      </style:paragraph-properties>
    </style:style>
    <style:style style:name="P59" style:parent-style-name="TM2" style:family="paragraph">
      <style:paragraph-properties>
        <style:tab-stops>
          <style:tab-stop style:type="left" style:position="0.3055in"/>
          <style:tab-stop style:type="right" style:leader-style="dotted" style:leader-text="." style:position="6.0986in"/>
        </style:tab-stops>
      </style:paragraph-properties>
    </style:style>
    <style:style style:name="P60" style:parent-style-name="TM3" style:family="paragraph">
      <style:paragraph-properties>
        <style:tab-stops>
          <style:tab-stop style:type="right" style:leader-style="dotted" style:leader-text="." style:position="5.9041in"/>
        </style:tab-stops>
      </style:paragraph-properties>
    </style:style>
    <style:style style:name="P61" style:parent-style-name="TM3" style:family="paragraph">
      <style:paragraph-properties>
        <style:tab-stops>
          <style:tab-stop style:type="right" style:leader-style="dotted" style:leader-text="." style:position="5.9041in"/>
        </style:tab-stops>
      </style:paragraph-properties>
    </style:style>
    <style:style style:name="P62" style:parent-style-name="TM2" style:family="paragraph">
      <style:paragraph-properties>
        <style:tab-stops>
          <style:tab-stop style:type="left" style:position="0.3055in"/>
          <style:tab-stop style:type="right" style:leader-style="dotted" style:leader-text="." style:position="6.0986in"/>
        </style:tab-stops>
      </style:paragraph-properties>
    </style:style>
    <style:style style:name="P63" style:parent-style-name="TM1" style:family="paragraph">
      <style:paragraph-properties>
        <style:tab-stops>
          <style:tab-stop style:type="right" style:leader-style="dotted" style:leader-text="." style:position="6.293in"/>
        </style:tab-stops>
      </style:paragraph-properties>
    </style:style>
    <style:style style:name="P64" style:parent-style-name="TM2" style:family="paragraph">
      <style:paragraph-properties>
        <style:tab-stops>
          <style:tab-stop style:type="right" style:leader-style="dotted" style:leader-text="." style:position="6.0986in"/>
        </style:tab-stops>
      </style:paragraph-properties>
    </style:style>
    <style:style style:name="P65" style:parent-style-name="TM3" style:family="paragraph">
      <style:paragraph-properties>
        <style:tab-stops>
          <style:tab-stop style:type="right" style:leader-style="dotted" style:leader-text="." style:position="5.9041in"/>
        </style:tab-stops>
      </style:paragraph-properties>
    </style:style>
    <style:style style:name="P66" style:parent-style-name="TM3" style:family="paragraph">
      <style:paragraph-properties>
        <style:tab-stops>
          <style:tab-stop style:type="right" style:leader-style="dotted" style:leader-text="." style:position="5.9041in"/>
        </style:tab-stops>
      </style:paragraph-properties>
    </style:style>
    <style:style style:name="P67" style:parent-style-name="TM2" style:family="paragraph">
      <style:paragraph-properties>
        <style:tab-stops>
          <style:tab-stop style:type="right" style:leader-style="dotted" style:leader-text="." style:position="6.0986in"/>
        </style:tab-stops>
      </style:paragraph-properties>
    </style:style>
    <style:style style:name="P68" style:parent-style-name="TM2" style:family="paragraph">
      <style:paragraph-properties>
        <style:tab-stops>
          <style:tab-stop style:type="right" style:leader-style="dotted" style:leader-text="." style:position="6.0986in"/>
        </style:tab-stops>
      </style:paragraph-properties>
    </style:style>
    <style:style style:name="P69" style:parent-style-name="TM2" style:family="paragraph">
      <style:paragraph-properties>
        <style:tab-stops>
          <style:tab-stop style:type="right" style:leader-style="dotted" style:leader-text="." style:position="6.0986in"/>
        </style:tab-stops>
      </style:paragraph-properties>
    </style:style>
    <style:style style:name="P70" style:parent-style-name="TM3" style:family="paragraph">
      <style:paragraph-properties>
        <style:tab-stops>
          <style:tab-stop style:type="right" style:leader-style="dotted" style:leader-text="." style:position="5.9041in"/>
        </style:tab-stops>
      </style:paragraph-properties>
    </style:style>
    <style:style style:name="P71" style:parent-style-name="TM3" style:family="paragraph">
      <style:paragraph-properties>
        <style:tab-stops>
          <style:tab-stop style:type="right" style:leader-style="dotted" style:leader-text="." style:position="5.9041in"/>
        </style:tab-stops>
      </style:paragraph-properties>
    </style:style>
    <style:style style:name="P72" style:parent-style-name="TM3" style:family="paragraph">
      <style:paragraph-properties>
        <style:tab-stops>
          <style:tab-stop style:type="right" style:leader-style="dotted" style:leader-text="." style:position="5.9041in"/>
        </style:tab-stops>
      </style:paragraph-properties>
    </style:style>
    <style:style style:name="P73" style:parent-style-name="TM2" style:family="paragraph">
      <style:paragraph-properties>
        <style:tab-stops>
          <style:tab-stop style:type="right" style:leader-style="dotted" style:leader-text="." style:position="6.0986in"/>
        </style:tab-stops>
      </style:paragraph-properties>
    </style:style>
    <style:style style:name="P74" style:parent-style-name="TM1" style:family="paragraph">
      <style:paragraph-properties>
        <style:tab-stops>
          <style:tab-stop style:type="right" style:leader-style="dotted" style:leader-text="." style:position="6.293in"/>
        </style:tab-stops>
      </style:paragraph-properties>
    </style:style>
    <style:style style:name="P75" style:parent-style-name="TM2" style:family="paragraph">
      <style:paragraph-properties>
        <style:tab-stops>
          <style:tab-stop style:type="left" style:position="0.3055in"/>
          <style:tab-stop style:type="right" style:leader-style="dotted" style:leader-text="." style:position="6.0986in"/>
        </style:tab-stops>
      </style:paragraph-properties>
    </style:style>
    <style:style style:name="P76" style:parent-style-name="TM2" style:family="paragraph">
      <style:paragraph-properties>
        <style:tab-stops>
          <style:tab-stop style:type="left" style:position="0.3055in"/>
          <style:tab-stop style:type="right" style:leader-style="dotted" style:leader-text="." style:position="6.0986in"/>
        </style:tab-stops>
      </style:paragraph-properties>
    </style:style>
    <style:style style:name="P77" style:parent-style-name="TM2" style:family="paragraph">
      <style:paragraph-properties>
        <style:tab-stops>
          <style:tab-stop style:type="left" style:position="0.3055in"/>
          <style:tab-stop style:type="right" style:leader-style="dotted" style:leader-text="." style:position="6.0986in"/>
        </style:tab-stops>
      </style:paragraph-properties>
    </style:style>
    <style:style style:name="P78" style:parent-style-name="TM1" style:family="paragraph">
      <style:paragraph-properties>
        <style:tab-stops>
          <style:tab-stop style:type="right" style:leader-style="dotted" style:leader-text="." style:position="6.293in"/>
        </style:tab-stops>
      </style:paragraph-properties>
    </style:style>
    <style:style style:name="P79" style:parent-style-name="Normal" style:family="paragraph">
      <style:paragraph-properties fo:margin-left="0.25in">
        <style:tab-stops/>
      </style:paragraph-properties>
      <style:text-properties style:font-name-complex="Calibri" style:font-size-complex="14pt"/>
    </style:style>
    <style:style style:name="T80" style:parent-style-name="Policepardéfaut" style:family="text">
      <style:text-properties style:font-name-complex="Calibri" style:font-size-complex="14pt"/>
    </style:style>
    <style:style style:name="T81" style:parent-style-name="Policepardéfaut" style:family="text">
      <style:text-properties style:font-name-complex="Calibri" fo:font-weight="bold" style:font-weight-asian="bold" style:font-weight-complex="bold" style:font-size-complex="14pt"/>
    </style:style>
    <style:style style:name="T82" style:parent-style-name="Policepardéfaut" style:family="text">
      <style:text-properties style:font-name-complex="Calibri" style:font-size-complex="14pt"/>
    </style:style>
    <style:style style:name="P83" style:parent-style-name="Paragraphedeliste" style:list-style-name="LFO2" style:family="paragraph"/>
    <style:style style:name="T84" style:parent-style-name="Policepardéfaut" style:family="text">
      <style:text-properties style:font-name-complex="Calibri" fo:font-weight="bold" style:font-weight-asian="bold" style:font-weight-complex="bold" style:font-size-complex="14pt"/>
    </style:style>
    <style:style style:name="T85" style:parent-style-name="Policepardéfaut" style:family="text">
      <style:text-properties style:font-name-complex="Calibri" style:font-size-complex="14pt"/>
    </style:style>
    <style:style style:name="P86" style:parent-style-name="Paragraphedeliste" style:list-style-name="LFO2" style:family="paragraph"/>
    <style:style style:name="T87" style:parent-style-name="Policepardéfaut" style:family="text">
      <style:text-properties style:font-name-complex="Calibri" fo:font-weight="bold" style:font-weight-asian="bold" style:font-weight-complex="bold" style:font-size-complex="14pt"/>
    </style:style>
    <style:style style:name="T88" style:parent-style-name="Policepardéfaut" style:family="text">
      <style:text-properties style:font-name-complex="Calibri" style:font-size-complex="14pt"/>
    </style:style>
    <style:style style:name="P89" style:parent-style-name="Normal" style:family="paragraph">
      <style:paragraph-properties fo:margin-left="0.25in">
        <style:tab-stops/>
      </style:paragraph-properties>
      <style:text-properties style:font-name-complex="Calibri" style:font-size-complex="14pt"/>
    </style:style>
    <style:style style:name="P90" style:parent-style-name="Normal" style:family="paragraph">
      <style:paragraph-properties fo:margin-left="0.25in">
        <style:tab-stops/>
      </style:paragraph-properties>
    </style:style>
    <style:style style:name="T91" style:parent-style-name="Policepardéfaut" style:family="text">
      <style:text-properties style:font-name-complex="Calibri" style:font-size-complex="14pt"/>
    </style:style>
    <style:style style:name="T92" style:parent-style-name="Policepardéfaut" style:family="text">
      <style:text-properties style:font-name-complex="Calibri" fo:font-weight="bold" style:font-weight-asian="bold" style:font-weight-complex="bold" style:font-size-complex="14pt"/>
    </style:style>
    <style:style style:name="T93" style:parent-style-name="Policepardéfaut" style:family="text">
      <style:text-properties style:font-name-complex="Calibri" style:font-size-complex="14pt"/>
    </style:style>
    <style:style style:name="P94" style:parent-style-name="Normal" style:family="paragraph">
      <style:paragraph-properties fo:margin-left="0.25in">
        <style:tab-stops/>
      </style:paragraph-properties>
      <style:text-properties style:font-name-complex="Calibri" fo:font-weight="bold" style:font-weight-asian="bold" style:font-weight-complex="bold" style:font-size-complex="14pt"/>
    </style:style>
    <style:style style:name="P95" style:parent-style-name="Normal" style:family="paragraph">
      <style:paragraph-properties fo:margin-left="0.25in">
        <style:tab-stops/>
      </style:paragraph-properties>
      <style:text-properties style:font-name-complex="Calibri" style:font-size-complex="14pt"/>
    </style:style>
    <style:style style:name="P96" style:parent-style-name="Normal" style:family="paragraph">
      <style:paragraph-properties fo:margin-left="0.25in">
        <style:tab-stops/>
      </style:paragraph-properties>
    </style:style>
    <style:style style:name="T97" style:parent-style-name="Policepardéfaut" style:family="text">
      <style:text-properties style:font-name-complex="Calibri" style:font-size-complex="14pt"/>
    </style:style>
    <style:style style:name="T98" style:parent-style-name="Policepardéfaut" style:family="text">
      <style:text-properties style:font-name-complex="Calibri" fo:font-weight="bold" style:font-weight-asian="bold" style:font-weight-complex="bold" style:font-size-complex="14pt"/>
    </style:style>
    <style:style style:name="T99" style:parent-style-name="Policepardéfaut" style:family="text">
      <style:text-properties style:font-name-complex="Calibri" style:font-size-complex="14pt"/>
    </style:style>
    <style:style style:name="P100" style:parent-style-name="Normal" style:list-style-name="LFO3" style:family="paragraph"/>
    <style:style style:name="T101" style:parent-style-name="Policepardéfaut" style:family="text">
      <style:text-properties style:font-name-complex="Calibri" fo:font-weight="bold" style:font-weight-asian="bold" style:font-weight-complex="bold" style:font-size-complex="14pt"/>
    </style:style>
    <style:style style:name="T102" style:parent-style-name="Policepardéfaut" style:family="text">
      <style:text-properties style:font-name-complex="Calibri" style:font-size-complex="14pt"/>
    </style:style>
    <style:style style:name="P103" style:parent-style-name="Normal" style:list-style-name="LFO3" style:family="paragraph"/>
    <style:style style:name="T104" style:parent-style-name="Policepardéfaut" style:family="text">
      <style:text-properties style:font-name-complex="Calibri" fo:font-weight="bold" style:font-weight-asian="bold" style:font-weight-complex="bold" style:font-size-complex="14pt"/>
    </style:style>
    <style:style style:name="T105" style:parent-style-name="Policepardéfaut" style:family="text">
      <style:text-properties style:font-name-complex="Calibri" style:font-size-complex="14pt"/>
    </style:style>
    <style:style style:name="P106" style:parent-style-name="Normal" style:list-style-name="LFO3" style:family="paragraph"/>
    <style:style style:name="T107" style:parent-style-name="Policepardéfaut" style:family="text">
      <style:text-properties style:font-name-complex="Calibri" fo:font-weight="bold" style:font-weight-asian="bold" style:font-weight-complex="bold" style:font-size-complex="14pt"/>
    </style:style>
    <style:style style:name="T108" style:parent-style-name="Policepardéfaut" style:family="text">
      <style:text-properties style:font-name-complex="Calibri" style:font-size-complex="14pt"/>
    </style:style>
    <style:style style:name="P109" style:parent-style-name="Normal" style:family="paragraph">
      <style:paragraph-properties fo:margin-left="0.5in">
        <style:tab-stops/>
      </style:paragraph-properties>
      <style:text-properties style:font-name-complex="Calibri" style:font-size-complex="14pt"/>
    </style:style>
    <style:style style:name="P110" style:parent-style-name="Normal" style:family="paragraph">
      <style:paragraph-properties fo:margin-left="0.5in">
        <style:tab-stops/>
      </style:paragraph-properties>
      <style:text-properties style:font-name-complex="Calibri" style:font-size-complex="14pt"/>
    </style:style>
    <style:style style:name="P111" style:parent-style-name="Normal" style:family="paragraph">
      <style:paragraph-properties fo:margin-left="0.5in">
        <style:tab-stops/>
      </style:paragraph-properties>
      <style:text-properties style:font-name-complex="Calibri" style:font-size-complex="14pt"/>
    </style:style>
    <style:style style:name="P112" style:parent-style-name="Normal" style:family="paragraph">
      <style:paragraph-properties fo:margin-left="0.25in">
        <style:tab-stops/>
      </style:paragraph-properties>
    </style:style>
    <style:style style:name="T113" style:parent-style-name="Policepardéfaut" style:family="text">
      <style:text-properties style:font-name-complex="Calibri" style:font-size-complex="14pt"/>
    </style:style>
    <style:style style:name="T114" style:parent-style-name="Policepardéfaut" style:family="text">
      <style:text-properties style:font-name-complex="Calibri" fo:font-weight="bold" style:font-weight-asian="bold" style:font-weight-complex="bold" style:font-size-complex="14pt"/>
    </style:style>
    <style:style style:name="T115" style:parent-style-name="Policepardéfaut" style:family="text">
      <style:text-properties style:font-name-complex="Calibri" style:font-size-complex="14pt"/>
    </style:style>
    <style:style style:name="T116" style:parent-style-name="Policepardéfaut" style:family="text">
      <style:text-properties style:font-name-complex="Calibri" fo:font-weight="bold" style:font-weight-asian="bold" style:font-weight-complex="bold" style:font-size-complex="14pt"/>
    </style:style>
    <style:style style:name="T117" style:parent-style-name="Policepardéfaut" style:family="text">
      <style:text-properties style:font-name-complex="Calibri" style:font-size-complex="14pt"/>
    </style:style>
    <style:style style:name="T118" style:parent-style-name="Policepardéfaut" style:family="text">
      <style:text-properties style:font-name-complex="Calibri" style:font-size-complex="14pt"/>
    </style:style>
    <style:style style:name="T119" style:parent-style-name="Policepardéfaut" style:family="text">
      <style:text-properties style:font-name-complex="Calibri" style:font-size-complex="14pt"/>
    </style:style>
    <style:style style:name="P120" style:parent-style-name="Normal" style:family="paragraph">
      <style:paragraph-properties fo:margin-left="0.25in">
        <style:tab-stops/>
      </style:paragraph-properties>
      <style:text-properties style:font-name-complex="Calibri" style:font-size-complex="14pt"/>
    </style:style>
    <style:style style:name="P121" style:parent-style-name="Titre1" style:list-style-name="LFO4" style:family="paragraph"/>
    <style:style style:name="P122" style:parent-style-name="Titre2" style:list-style-name="LFO4" style:family="paragraph"/>
    <style:style style:name="P123" style:parent-style-name="Normal" style:family="paragraph">
      <style:paragraph-properties fo:margin-left="0.25in">
        <style:tab-stops/>
      </style:paragraph-properties>
    </style:style>
    <style:style style:name="T124" style:parent-style-name="Policepardéfaut" style:family="text">
      <style:text-properties fo:font-weight="bold" style:font-weight-asian="bold" style:font-weight-complex="bold"/>
    </style:style>
    <style:style style:name="T125" style:parent-style-name="Policepardéfaut" style:family="text">
      <style:text-properties fo:font-weight="bold" style:font-weight-asian="bold" style:font-weight-complex="bold"/>
    </style:style>
    <style:style style:name="T126" style:parent-style-name="Policepardéfaut" style:family="text">
      <style:text-properties fo:font-weight="bold" style:font-weight-asian="bold" style:font-weight-complex="bold"/>
    </style:style>
    <style:style style:name="P127" style:parent-style-name="Normal" style:family="paragraph">
      <style:paragraph-properties fo:margin-left="0.25in">
        <style:tab-stops/>
      </style:paragraph-properties>
    </style:style>
    <style:style style:name="P128" style:parent-style-name="Titre2" style:list-style-name="LFO4" style:family="paragraph"/>
    <style:style style:name="P129" style:parent-style-name="Paragraphedeliste" style:list-style-name="LFO5" style:family="paragraph"/>
    <style:style style:name="T130" style:parent-style-name="Policepardéfaut" style:family="text">
      <style:text-properties fo:font-weight="bold" style:font-weight-asian="bold" style:font-weight-complex="bold"/>
    </style:style>
    <style:style style:name="P131" style:parent-style-name="Paragraphedeliste" style:list-style-name="LFO5" style:family="paragraph"/>
    <style:style style:name="T132" style:parent-style-name="Policepardéfaut" style:family="text">
      <style:text-properties fo:font-weight="bold" style:font-weight-asian="bold" style:font-weight-complex="bold"/>
    </style:style>
    <style:style style:name="P133" style:parent-style-name="Paragraphedeliste" style:list-style-name="LFO5" style:family="paragraph"/>
    <style:style style:name="T134" style:parent-style-name="Policepardéfaut" style:family="text">
      <style:text-properties fo:font-weight="bold" style:font-weight-asian="bold" style:font-weight-complex="bold"/>
    </style:style>
    <style:style style:name="P135" style:parent-style-name="Paragraphedeliste" style:list-style-name="LFO5" style:family="paragraph"/>
    <style:style style:name="T136" style:parent-style-name="Policepardéfaut" style:family="text">
      <style:text-properties fo:font-weight="bold" style:font-weight-asian="bold" style:font-weight-complex="bold"/>
    </style:style>
    <style:style style:name="P137" style:parent-style-name="Titre2" style:list-style-name="LFO4" style:family="paragraph"/>
    <style:style style:name="TableColumn139" style:family="table-column">
      <style:table-column-properties style:column-width="1.218in"/>
    </style:style>
    <style:style style:name="TableColumn140" style:family="table-column">
      <style:table-column-properties style:column-width="5.075in"/>
    </style:style>
    <style:style style:name="Table138" style:family="table">
      <style:table-properties style:width="6.293in" fo:margin-left="0in" table:align="left"/>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left="0.25in">
        <style:tab-stops/>
      </style:paragraph-properties>
      <style:text-properties fo:font-weight="bold" style:font-weight-asian="bold" style:font-weight-complex="bold"/>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left="0.25in">
        <style:tab-stops/>
      </style:paragraph-properties>
      <style:text-properties fo:font-weight="bold" style:font-weight-asian="bold" style:font-weight-complex="bold"/>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left="0.25in">
        <style:tab-stops/>
      </style:paragraph-properties>
    </style:style>
    <style:style style:name="T149" style:parent-style-name="Policepardéfaut" style:family="text">
      <style:text-properties fo:font-weight="bold" style:font-weight-asian="bold" style:font-weight-complex="bold"/>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left="0.25in">
        <style:tab-stops/>
      </style:paragraph-properties>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left="0.25in">
        <style:tab-stops/>
      </style:paragraph-properties>
    </style:style>
    <style:style style:name="T155" style:parent-style-name="Policepardéfaut" style:family="text">
      <style:text-properties fo:font-weight="bold" style:font-weight-asian="bold" style:font-weight-complex="bold"/>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left="0.25in">
        <style:tab-stops/>
      </style:paragraph-properties>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left="0.25in">
        <style:tab-stops/>
      </style:paragraph-properties>
    </style:style>
    <style:style style:name="T161" style:parent-style-name="Policepardéfaut" style:family="text">
      <style:text-properties fo:font-weight="bold" style:font-weight-asian="bold" style:font-weight-complex="bold"/>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left="0.25in">
        <style:tab-stops/>
      </style:paragraph-properties>
    </style:style>
    <style:style style:name="P164" style:parent-style-name="Normal" style:family="paragraph">
      <style:paragraph-properties fo:margin-left="0.25in">
        <style:tab-stops/>
      </style:paragraph-properties>
    </style:style>
    <style:style style:name="P165" style:parent-style-name="Titre2" style:list-style-name="LFO4" style:family="paragraph"/>
    <style:style style:name="P166" style:parent-style-name="Normal" style:family="paragraph">
      <style:paragraph-properties fo:margin-left="0.25in">
        <style:tab-stops/>
      </style:paragraph-properties>
    </style:style>
    <style:style style:name="T167" style:parent-style-name="Policepardéfaut" style:family="text">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P169" style:parent-style-name="Normal" style:family="paragraph">
      <style:paragraph-properties fo:margin-left="0.25in">
        <style:tab-stops/>
      </style:paragraph-properties>
    </style:style>
    <style:style style:name="P170" style:parent-style-name="Normal" style:family="paragraph">
      <style:text-properties style:font-size-complex="14pt"/>
    </style:style>
    <style:style style:name="P171" style:parent-style-name="Normal" style:family="paragraph">
      <style:text-properties style:font-size-complex="14pt"/>
    </style:style>
    <style:style style:name="P172" style:parent-style-name="Normal" style:family="paragraph">
      <style:text-properties style:font-size-complex="14pt"/>
    </style:style>
    <style:style style:name="P173" style:parent-style-name="Normal" style:family="paragraph">
      <style:text-properties style:font-size-complex="14pt"/>
    </style:style>
    <style:style style:name="P174" style:parent-style-name="Titre2" style:list-style-name="LFO6" style:family="paragraph">
      <style:text-properties style:font-size-complex="18pt"/>
    </style:style>
    <style:style style:name="P175" style:parent-style-name="Titre3" style:list-style-name="LFO6" style:family="paragraph">
      <style:paragraph-properties fo:margin-left="1in" fo:text-indent="-0.25in">
        <style:tab-stops/>
      </style:paragraph-properties>
      <style:text-properties fo:color="#000000" style:font-size-complex="16pt"/>
    </style:style>
    <style:style style:name="P176" style:parent-style-name="Paragraphedeliste" style:list-style-name="LFO7" style:family="paragraph">
      <style:paragraph-properties fo:widows="2" fo:orphans="2" style:text-autospace="ideograph-alpha" fo:margin-bottom="0.1111in" fo:line-height="105%"/>
      <style:text-properties style:font-size-complex="14pt"/>
    </style:style>
    <style:style style:name="P177" style:parent-style-name="Paragraphedeliste" style:list-style-name="LFO7" style:family="paragraph">
      <style:paragraph-properties fo:widows="2" fo:orphans="2" style:text-autospace="ideograph-alpha" fo:margin-bottom="0.1111in" fo:line-height="105%"/>
      <style:text-properties style:font-size-complex="14pt"/>
    </style:style>
    <style:style style:name="P178" style:parent-style-name="Paragraphedeliste" style:list-style-name="LFO7" style:family="paragraph">
      <style:paragraph-properties fo:widows="2" fo:orphans="2" style:text-autospace="ideograph-alpha" fo:margin-bottom="0.1111in" fo:line-height="105%"/>
      <style:text-properties style:font-size-complex="14pt"/>
    </style:style>
    <style:style style:name="P179" style:parent-style-name="Paragraphedeliste" style:list-style-name="LFO7" style:family="paragraph">
      <style:paragraph-properties fo:widows="2" fo:orphans="2" style:text-autospace="ideograph-alpha" fo:margin-bottom="0.1111in" fo:line-height="105%"/>
      <style:text-properties style:font-size-complex="14pt"/>
    </style:style>
    <style:style style:name="P180" style:parent-style-name="Paragraphedeliste" style:list-style-name="LFO7" style:family="paragraph">
      <style:paragraph-properties fo:widows="2" fo:orphans="2" style:text-autospace="ideograph-alpha" fo:margin-bottom="0.1111in" fo:line-height="105%"/>
      <style:text-properties style:font-size-complex="14pt"/>
    </style:style>
    <style:style style:name="P181" style:parent-style-name="Titre3" style:list-style-name="LFO6" style:family="paragraph">
      <style:paragraph-properties fo:margin-left="1in" fo:text-indent="-0.25in">
        <style:tab-stops/>
      </style:paragraph-properties>
      <style:text-properties fo:color="#000000" style:font-size-complex="16pt"/>
    </style:style>
    <style:style style:name="P182" style:parent-style-name="Paragraphedeliste" style:list-style-name="LFO8" style:family="paragraph">
      <style:paragraph-properties fo:widows="2" fo:orphans="2" style:text-autospace="ideograph-alpha" fo:margin-bottom="0.1111in" fo:line-height="105%"/>
    </style:style>
    <style:style style:name="T183" style:parent-style-name="Policepardéfaut" style:family="text">
      <style:text-properties style:font-size-complex="14pt"/>
    </style:style>
    <style:style style:name="P184" style:parent-style-name="Paragraphedeliste" style:list-style-name="LFO8" style:family="paragraph">
      <style:paragraph-properties fo:widows="2" fo:orphans="2" style:text-autospace="ideograph-alpha" fo:margin-bottom="0.1111in" fo:line-height="105%"/>
    </style:style>
    <style:style style:name="T185" style:parent-style-name="Policepardéfaut" style:family="text">
      <style:text-properties style:font-size-complex="14pt"/>
    </style:style>
    <style:style style:name="P186" style:parent-style-name="Paragraphedeliste" style:list-style-name="LFO8" style:family="paragraph">
      <style:paragraph-properties fo:widows="2" fo:orphans="2" style:text-autospace="ideograph-alpha" fo:margin-bottom="0.1111in" fo:line-height="105%"/>
    </style:style>
    <style:style style:name="T187" style:parent-style-name="Policepardéfaut" style:family="text">
      <style:text-properties style:font-size-complex="14pt"/>
    </style:style>
    <style:style style:name="P188" style:parent-style-name="Normal" style:family="paragraph">
      <style:paragraph-properties fo:margin-left="0.25in">
        <style:tab-stops/>
      </style:paragraph-properties>
    </style:style>
    <style:style style:name="P189" style:parent-style-name="Normal" style:family="paragraph">
      <style:paragraph-properties fo:margin-left="0.25in">
        <style:tab-stops/>
      </style:paragraph-properties>
      <style:text-properties style:font-size-complex="14pt"/>
    </style:style>
    <style:style style:name="P190" style:parent-style-name="Normal" style:family="paragraph">
      <style:text-properties style:font-size-complex="14pt"/>
    </style:style>
    <style:style style:name="P191" style:parent-style-name="Titre2" style:list-style-name="LFO6" style:family="paragraph">
      <style:text-properties style:font-size-complex="18pt"/>
    </style:style>
    <style:style style:name="P192" style:parent-style-name="Titre3" style:list-style-name="LFO6" style:family="paragraph">
      <style:paragraph-properties fo:margin-left="1in" fo:text-indent="-0.25in">
        <style:tab-stops/>
      </style:paragraph-properties>
      <style:text-properties fo:color="#000000" style:font-size-complex="16pt"/>
    </style:style>
    <style:style style:name="P193" style:parent-style-name="Normal" style:family="paragraph">
      <style:paragraph-properties fo:margin-left="0.25in">
        <style:tab-stops/>
      </style:paragraph-properties>
    </style:style>
    <style:style style:name="P194" style:parent-style-name="Normal" style:family="paragraph">
      <style:paragraph-properties fo:margin-left="0.25in">
        <style:tab-stops/>
      </style:paragraph-properties>
    </style:style>
    <style:style style:name="P195" style:parent-style-name="Normal" style:family="paragraph">
      <style:text-properties style:font-size-complex="14pt"/>
    </style:style>
    <style:style style:name="P196" style:parent-style-name="Normal" style:family="paragraph">
      <style:text-properties style:font-size-complex="14pt"/>
    </style:style>
    <style:style style:name="P197" style:parent-style-name="Titre3" style:list-style-name="LFO6" style:family="paragraph">
      <style:paragraph-properties fo:margin-left="0.2916in" fo:text-indent="-0.25in">
        <style:tab-stops/>
      </style:paragraph-properties>
      <style:text-properties fo:color="#000000" style:font-size-complex="16pt"/>
    </style:style>
    <style:style style:name="P198" style:parent-style-name="Normal" style:family="paragraph">
      <style:text-properties style:font-size-complex="14pt"/>
    </style:style>
    <style:style style:name="P199" style:parent-style-name="Normal" style:family="paragraph">
      <style:text-properties style:font-size-complex="14pt"/>
    </style:style>
    <style:style style:name="P200" style:parent-style-name="Normal" style:family="paragraph">
      <style:text-properties style:font-size-complex="14pt"/>
    </style:style>
    <style:style style:name="P201" style:parent-style-name="Normal" style:family="paragraph">
      <style:text-properties style:font-size-complex="14pt"/>
    </style:style>
    <style:style style:name="P202" style:parent-style-name="Normal" style:family="paragraph">
      <style:text-properties style:font-size-complex="14pt"/>
    </style:style>
    <style:style style:name="P203" style:parent-style-name="Normal" style:family="paragraph">
      <style:text-properties style:font-size-complex="14pt"/>
    </style:style>
    <style:style style:name="P204" style:parent-style-name="Normal" style:family="paragraph">
      <style:text-properties style:font-size-complex="14pt"/>
    </style:style>
    <style:style style:name="P205" style:parent-style-name="Titre4" style:list-style-name="LFO6" style:family="paragraph">
      <style:paragraph-properties fo:margin-left="1.5in" fo:text-indent="-0.25in">
        <style:tab-stops/>
      </style:paragraph-properties>
      <style:text-properties fo:color="#000000" style:font-size-complex="16pt"/>
    </style:style>
    <style:style style:name="P206" style:parent-style-name="Normal" style:family="paragraph">
      <style:paragraph-properties fo:text-indent="0.25in"/>
      <style:text-properties fo:font-weight="bold" style:font-weight-asian="bold" style:font-weight-complex="bold" style:font-size-complex="14pt"/>
    </style:style>
    <style:style style:name="P207" style:parent-style-name="Paragraphedeliste" style:family="paragraph">
      <style:paragraph-properties fo:margin-left="0.25in">
        <style:tab-stops/>
      </style:paragraph-properties>
    </style:style>
    <style:style style:name="P208" style:parent-style-name="Normal" style:family="paragraph">
      <style:text-properties style:font-size-complex="14pt"/>
    </style:style>
    <style:style style:name="P209" style:parent-style-name="Normal" style:family="paragraph">
      <style:text-properties style:font-size-complex="14pt"/>
    </style:style>
    <style:style style:name="P210" style:parent-style-name="Paragraphedeliste" style:list-style-name="LFO9" style:family="paragraph">
      <style:paragraph-properties fo:widows="2" fo:orphans="2" style:text-autospace="ideograph-alpha" fo:margin-bottom="0.1111in" fo:line-height="105%"/>
    </style:style>
    <style:style style:name="T211" style:parent-style-name="Policepardéfaut" style:family="text">
      <style:text-properties fo:font-weight="bold" style:font-weight-asian="bold" style:font-weight-complex="bold" style:font-size-complex="14pt"/>
    </style:style>
    <style:style style:name="T212" style:parent-style-name="Policepardéfaut" style:family="text">
      <style:text-properties style:font-size-complex="14pt"/>
    </style:style>
    <style:style style:name="P213" style:parent-style-name="Paragraphedeliste" style:list-style-name="LFO9" style:family="paragraph">
      <style:paragraph-properties fo:widows="2" fo:orphans="2" style:text-autospace="ideograph-alpha" fo:margin-bottom="0.1111in" fo:line-height="105%"/>
    </style:style>
    <style:style style:name="T214" style:parent-style-name="Policepardéfaut" style:family="text">
      <style:text-properties fo:font-weight="bold" style:font-weight-asian="bold" style:font-weight-complex="bold" style:font-size-complex="14pt"/>
    </style:style>
    <style:style style:name="T215" style:parent-style-name="Policepardéfaut" style:family="text">
      <style:text-properties style:font-size-complex="14pt"/>
    </style:style>
    <style:style style:name="P216" style:parent-style-name="Paragraphedeliste" style:list-style-name="LFO9" style:family="paragraph">
      <style:paragraph-properties fo:widows="2" fo:orphans="2" style:text-autospace="ideograph-alpha" fo:margin-bottom="0.1111in" fo:line-height="105%"/>
    </style:style>
    <style:style style:name="T217" style:parent-style-name="Policepardéfaut" style:family="text">
      <style:text-properties fo:font-weight="bold" style:font-weight-asian="bold" style:font-weight-complex="bold" style:font-size-complex="14pt"/>
    </style:style>
    <style:style style:name="T218" style:parent-style-name="Policepardéfaut" style:family="text">
      <style:text-properties style:font-size-complex="14pt"/>
    </style:style>
    <style:style style:name="P219" style:parent-style-name="Paragraphedeliste" style:list-style-name="LFO9" style:family="paragraph">
      <style:paragraph-properties fo:widows="2" fo:orphans="2" style:text-autospace="ideograph-alpha" fo:margin-bottom="0.1111in" fo:line-height="105%"/>
    </style:style>
    <style:style style:name="T220" style:parent-style-name="Policepardéfaut" style:family="text">
      <style:text-properties fo:font-weight="bold" style:font-weight-asian="bold" style:font-weight-complex="bold" style:font-size-complex="14pt"/>
    </style:style>
    <style:style style:name="T221" style:parent-style-name="Policepardéfaut" style:family="text">
      <style:text-properties style:font-size-complex="14pt"/>
    </style:style>
    <style:style style:name="P222" style:parent-style-name="Titre4" style:list-style-name="LFO6" style:family="paragraph">
      <style:paragraph-properties fo:margin-left="1.5in" fo:text-indent="-0.25in">
        <style:tab-stops/>
      </style:paragraph-properties>
      <style:text-properties fo:color="#000000" style:font-size-complex="16pt"/>
    </style:style>
    <style:style style:name="P223" style:parent-style-name="Normal" style:family="paragraph">
      <style:paragraph-properties fo:text-indent="0.25in"/>
      <style:text-properties fo:font-weight="bold" style:font-weight-asian="bold" style:font-weight-complex="bold" style:font-size-complex="14pt"/>
    </style:style>
    <style:style style:name="P224" style:parent-style-name="Paragraphedeliste" style:family="paragraph">
      <style:paragraph-properties fo:margin-left="0.25in">
        <style:tab-stops/>
      </style:paragraph-properties>
    </style:style>
    <style:style style:name="P225" style:parent-style-name="Normal" style:family="paragraph">
      <style:paragraph-properties fo:margin-left="0.25in">
        <style:tab-stops/>
      </style:paragraph-properties>
      <style:text-properties style:font-size-complex="14pt"/>
    </style:style>
    <style:style style:name="P226" style:parent-style-name="Paragraphedeliste" style:list-style-name="LFO10" style:family="paragraph">
      <style:paragraph-properties fo:widows="2" fo:orphans="2" style:text-autospace="ideograph-alpha" fo:margin-bottom="0.1111in" fo:line-height="105%"/>
    </style:style>
    <style:style style:name="T227" style:parent-style-name="Policepardéfaut" style:family="text">
      <style:text-properties fo:font-weight="bold" style:font-weight-asian="bold" style:font-weight-complex="bold" style:font-size-complex="14pt"/>
    </style:style>
    <style:style style:name="T228" style:parent-style-name="Policepardéfaut" style:family="text">
      <style:text-properties style:font-size-complex="14pt"/>
    </style:style>
    <style:style style:name="P229" style:parent-style-name="Paragraphedeliste" style:list-style-name="LFO10" style:family="paragraph">
      <style:paragraph-properties fo:widows="2" fo:orphans="2" style:text-autospace="ideograph-alpha" fo:margin-bottom="0.1111in" fo:line-height="105%"/>
    </style:style>
    <style:style style:name="T230" style:parent-style-name="Policepardéfaut" style:family="text">
      <style:text-properties fo:font-weight="bold" style:font-weight-asian="bold" style:font-weight-complex="bold" style:font-size-complex="14pt"/>
    </style:style>
    <style:style style:name="T231" style:parent-style-name="Policepardéfaut" style:family="text">
      <style:text-properties style:font-size-complex="14pt"/>
    </style:style>
    <style:style style:name="T232" style:parent-style-name="Policepardéfaut" style:family="text">
      <style:text-properties fo:font-weight="bold" style:font-weight-asian="bold" style:font-weight-complex="bold" style:font-size-complex="14pt"/>
    </style:style>
    <style:style style:name="T233" style:parent-style-name="Policepardéfaut" style:family="text">
      <style:text-properties style:font-size-complex="14pt"/>
    </style:style>
    <style:style style:name="P234" style:parent-style-name="Paragraphedeliste" style:list-style-name="LFO10" style:family="paragraph">
      <style:paragraph-properties fo:widows="2" fo:orphans="2" style:text-autospace="ideograph-alpha" fo:margin-bottom="0.1111in" fo:line-height="105%"/>
    </style:style>
    <style:style style:name="T235" style:parent-style-name="Policepardéfaut" style:family="text">
      <style:text-properties fo:font-weight="bold" style:font-weight-asian="bold" style:font-weight-complex="bold" style:font-size-complex="14pt"/>
    </style:style>
    <style:style style:name="T236" style:parent-style-name="Policepardéfaut" style:family="text">
      <style:text-properties style:font-size-complex="14pt"/>
    </style:style>
    <style:style style:name="T237" style:parent-style-name="Policepardéfaut" style:family="text">
      <style:text-properties fo:font-weight="bold" style:font-weight-asian="bold" style:font-weight-complex="bold" style:font-size-complex="14pt"/>
    </style:style>
    <style:style style:name="T238" style:parent-style-name="Policepardéfaut" style:family="text">
      <style:text-properties style:font-size-complex="14pt"/>
    </style:style>
    <style:style style:name="P239" style:parent-style-name="Normal" style:family="paragraph">
      <style:paragraph-properties fo:margin-left="0.5in">
        <style:tab-stops/>
      </style:paragraph-properties>
      <style:text-properties style:font-size-complex="14pt"/>
    </style:style>
    <style:style style:name="P240" style:parent-style-name="Normal" style:family="paragraph">
      <style:paragraph-properties fo:margin-left="0.9833in">
        <style:tab-stops/>
      </style:paragraph-properties>
      <style:text-properties fo:color="#000000" fo:font-size="16pt" style:font-size-asian="16pt" style:font-size-complex="16pt"/>
    </style:style>
    <style:style style:name="P241" style:parent-style-name="Titre4" style:list-style-name="LFO6" style:family="paragraph">
      <style:paragraph-properties fo:margin-left="1.5in" fo:text-indent="-0.25in">
        <style:tab-stops/>
      </style:paragraph-properties>
      <style:text-properties fo:color="#000000" style:font-size-complex="16pt"/>
    </style:style>
    <style:style style:name="P242" style:parent-style-name="Normal" style:family="paragraph">
      <style:paragraph-properties fo:margin-left="0.25in">
        <style:tab-stops/>
      </style:paragraph-properties>
      <style:text-properties fo:font-weight="bold" style:font-weight-asian="bold" style:font-weight-complex="bold" style:font-size-complex="14pt"/>
    </style:style>
    <style:style style:name="P243" style:parent-style-name="Normal" style:family="paragraph">
      <style:paragraph-properties fo:margin-left="0.25in">
        <style:tab-stops/>
      </style:paragraph-properties>
    </style:style>
    <style:style style:name="T244" style:parent-style-name="Policepardéfaut" style:family="text">
      <style:text-properties style:font-size-complex="14pt"/>
    </style:style>
    <style:style style:name="P245" style:parent-style-name="Normal" style:family="paragraph">
      <style:paragraph-properties fo:margin-left="0.25in">
        <style:tab-stops/>
      </style:paragraph-properties>
      <style:text-properties style:font-size-complex="14pt"/>
    </style:style>
    <style:style style:name="P246" style:parent-style-name="Paragraphedeliste" style:list-style-name="LFO11" style:family="paragraph">
      <style:paragraph-properties fo:widows="2" fo:orphans="2" style:text-autospace="ideograph-alpha" fo:margin-bottom="0.1111in" fo:line-height="105%"/>
    </style:style>
    <style:style style:name="T247" style:parent-style-name="Policepardéfaut" style:family="text">
      <style:text-properties fo:font-weight="bold" style:font-weight-asian="bold" style:font-weight-complex="bold" style:font-size-complex="14pt"/>
    </style:style>
    <style:style style:name="T248" style:parent-style-name="Policepardéfaut" style:family="text">
      <style:text-properties style:font-size-complex="14pt"/>
    </style:style>
    <style:style style:name="P249" style:parent-style-name="Paragraphedeliste" style:list-style-name="LFO11" style:family="paragraph">
      <style:paragraph-properties fo:widows="2" fo:orphans="2" style:text-autospace="ideograph-alpha" fo:margin-bottom="0.1111in" fo:line-height="105%"/>
    </style:style>
    <style:style style:name="T250" style:parent-style-name="Policepardéfaut" style:family="text">
      <style:text-properties fo:font-weight="bold" style:font-weight-asian="bold" style:font-weight-complex="bold" style:font-size-complex="14pt"/>
    </style:style>
    <style:style style:name="T251" style:parent-style-name="Policepardéfaut" style:family="text">
      <style:text-properties style:font-size-complex="14pt"/>
    </style:style>
    <style:style style:name="P252" style:parent-style-name="Paragraphedeliste" style:list-style-name="LFO11" style:family="paragraph">
      <style:paragraph-properties fo:widows="2" fo:orphans="2" style:text-autospace="ideograph-alpha" fo:margin-bottom="0.1111in" fo:line-height="105%"/>
    </style:style>
    <style:style style:name="T253" style:parent-style-name="Policepardéfaut" style:family="text">
      <style:text-properties fo:font-weight="bold" style:font-weight-asian="bold" style:font-weight-complex="bold" style:font-size-complex="14pt"/>
    </style:style>
    <style:style style:name="T254" style:parent-style-name="Policepardéfaut" style:family="text">
      <style:text-properties style:font-size-complex="14pt"/>
    </style:style>
    <style:style style:name="P255" style:parent-style-name="Normal" style:family="paragraph">
      <style:paragraph-properties fo:margin-left="0.5in">
        <style:tab-stops/>
      </style:paragraph-properties>
      <style:text-properties style:font-size-complex="14pt"/>
    </style:style>
    <style:style style:name="P256" style:parent-style-name="Normal" style:family="paragraph">
      <style:paragraph-properties fo:margin-left="0.5in">
        <style:tab-stops/>
      </style:paragraph-properties>
      <style:text-properties style:font-size-complex="14pt"/>
    </style:style>
    <style:style style:name="P257" style:parent-style-name="Titre4" style:list-style-name="LFO6" style:family="paragraph">
      <style:paragraph-properties fo:margin-left="1.5in" fo:text-indent="-0.25in">
        <style:tab-stops/>
      </style:paragraph-properties>
      <style:text-properties fo:color="#000000" style:font-size-complex="16pt"/>
    </style:style>
    <style:style style:name="P258" style:parent-style-name="Normal" style:family="paragraph">
      <style:paragraph-properties fo:margin-left="0.25in">
        <style:tab-stops/>
      </style:paragraph-properties>
      <style:text-properties fo:font-weight="bold" style:font-weight-asian="bold" style:font-weight-complex="bold" style:font-size-complex="14pt"/>
    </style:style>
    <style:style style:name="P259" style:parent-style-name="Normal" style:family="paragraph">
      <style:paragraph-properties fo:margin-left="0.25in">
        <style:tab-stops/>
      </style:paragraph-properties>
    </style:style>
    <style:style style:name="T260" style:parent-style-name="Policepardéfaut" style:family="text">
      <style:text-properties style:font-size-complex="14pt"/>
    </style:style>
    <style:style style:name="P261" style:parent-style-name="Normal" style:family="paragraph">
      <style:text-properties style:font-size-complex="14pt"/>
    </style:style>
    <style:style style:name="P262" style:parent-style-name="Paragraphedeliste" style:list-style-name="LFO12" style:family="paragraph">
      <style:paragraph-properties fo:widows="2" fo:orphans="2" style:text-autospace="ideograph-alpha" fo:margin-bottom="0.1111in" fo:line-height="105%"/>
    </style:style>
    <style:style style:name="T263" style:parent-style-name="Policepardéfaut" style:family="text">
      <style:text-properties fo:font-weight="bold" style:font-weight-asian="bold" style:font-weight-complex="bold" style:font-size-complex="14pt"/>
    </style:style>
    <style:style style:name="T264" style:parent-style-name="Policepardéfaut" style:family="text">
      <style:text-properties style:font-size-complex="14pt"/>
    </style:style>
    <style:style style:name="P265" style:parent-style-name="Paragraphedeliste" style:list-style-name="LFO12" style:family="paragraph">
      <style:paragraph-properties fo:widows="2" fo:orphans="2" style:text-autospace="ideograph-alpha" fo:margin-bottom="0.1111in" fo:line-height="105%"/>
    </style:style>
    <style:style style:name="T266" style:parent-style-name="Policepardéfaut" style:family="text">
      <style:text-properties fo:font-weight="bold" style:font-weight-asian="bold" style:font-weight-complex="bold" style:font-size-complex="14pt"/>
    </style:style>
    <style:style style:name="T267" style:parent-style-name="Policepardéfaut" style:family="text">
      <style:text-properties style:font-size-complex="14pt"/>
    </style:style>
    <style:style style:name="P268" style:parent-style-name="Paragraphedeliste" style:list-style-name="LFO12" style:family="paragraph">
      <style:paragraph-properties fo:widows="2" fo:orphans="2" style:text-autospace="ideograph-alpha" fo:margin-bottom="0.1111in" fo:line-height="105%"/>
    </style:style>
    <style:style style:name="T269" style:parent-style-name="Policepardéfaut" style:family="text">
      <style:text-properties fo:font-weight="bold" style:font-weight-asian="bold" style:font-weight-complex="bold" style:font-size-complex="14pt"/>
    </style:style>
    <style:style style:name="T270" style:parent-style-name="Policepardéfaut" style:family="text">
      <style:text-properties style:font-size-complex="14pt"/>
    </style:style>
    <style:style style:name="P271" style:parent-style-name="Normal" style:family="paragraph">
      <style:paragraph-properties fo:margin-left="0.25in">
        <style:tab-stops/>
      </style:paragraph-properties>
      <style:text-properties style:font-size-complex="14pt"/>
    </style:style>
    <style:style style:name="P272" style:parent-style-name="Normal" style:family="paragraph">
      <style:text-properties style:font-size-complex="14pt"/>
    </style:style>
    <style:style style:name="TableColumn274" style:family="table-column">
      <style:table-column-properties style:column-width="1.1409in"/>
    </style:style>
    <style:style style:name="TableColumn275" style:family="table-column">
      <style:table-column-properties style:column-width="2.7361in"/>
    </style:style>
    <style:style style:name="TableColumn276" style:family="table-column">
      <style:table-column-properties style:column-width="2.4159in"/>
    </style:style>
    <style:style style:name="Table273" style:family="table">
      <style:table-properties style:width="6.293in" fo:margin-left="0in" table:align="lef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text-properties fo:font-weight="bold" style:font-weight-asian="bold" style:font-weight-complex="bold" style:font-size-complex="14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text-properties fo:font-weight="bold" style:font-weight-asian="bold" style:font-weight-complex="bold" style:font-size-complex="14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text-properties fo:font-weight="bold" style:font-weight-asian="bold" style:font-weight-complex="bold" style:font-size-complex="14p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T286" style:parent-style-name="Policepardéfaut" style:family="text">
      <style:text-properties fo:font-weight="bold" style:font-weight-asian="bold" style:font-weight-complex="bold" style:font-size-complex="14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text-properties style:font-size-complex="14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font-size-complex="14pt"/>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T293" style:parent-style-name="Policepardéfaut" style:family="text">
      <style:text-properties fo:font-weight="bold" style:font-weight-asian="bold" style:font-weight-complex="bold" style:font-size-complex="14pt"/>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text-properties style:font-size-complex="14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text-properties style:font-size-complex="14p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T300" style:parent-style-name="Policepardéfaut" style:family="text">
      <style:text-properties fo:font-weight="bold" style:font-weight-asian="bold" style:font-weight-complex="bold" style:font-size-complex="14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text-properties style:font-size-complex="14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text-properties style:font-size-complex="14p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T307" style:parent-style-name="Policepardéfaut" style:family="text">
      <style:text-properties fo:font-weight="bold" style:font-weight-asian="bold" style:font-weight-complex="bold" style:font-size-complex="14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text-properties style:font-size-complex="14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style:font-size-complex="14pt"/>
    </style:style>
    <style:style style:name="P312" style:parent-style-name="Normal" style:family="paragraph">
      <style:text-properties style:font-size-complex="14pt"/>
    </style:style>
    <style:style style:name="P313" style:parent-style-name="Normal" style:family="paragraph">
      <style:text-properties style:font-size-complex="14pt"/>
    </style:style>
    <style:style style:name="P314" style:parent-style-name="Normal" style:family="paragraph">
      <style:text-properties fo:color="#000000" style:font-size-complex="14pt"/>
    </style:style>
    <style:style style:name="P315" style:parent-style-name="Titre2" style:list-style-name="LFO6" style:family="paragraph">
      <style:text-properties style:font-size-complex="18pt"/>
    </style:style>
    <style:style style:name="P316" style:parent-style-name="Titre3" style:list-style-name="LFO6" style:family="paragraph">
      <style:paragraph-properties fo:margin-left="1in" fo:text-indent="-0.25in">
        <style:tab-stops/>
      </style:paragraph-properties>
      <style:text-properties style:font-size-complex="16pt"/>
    </style:style>
    <style:style style:name="P317" style:parent-style-name="Paragraphedeliste" style:family="paragraph">
      <style:paragraph-properties fo:margin-left="0.5416in">
        <style:tab-stops/>
      </style:paragraph-properties>
      <style:text-properties fo:font-weight="bold" style:font-weight-asian="bold" style:font-weight-complex="bold" style:font-size-complex="14pt"/>
    </style:style>
    <style:style style:name="P318" style:parent-style-name="Paragraphedeliste" style:family="paragraph">
      <style:paragraph-properties fo:margin-left="0.5416in">
        <style:tab-stops/>
      </style:paragraph-properties>
    </style:style>
    <style:style style:name="T319" style:parent-style-name="Policepardéfaut" style:family="text">
      <style:text-properties style:font-size-complex="14pt"/>
    </style:style>
    <style:style style:name="P320" style:parent-style-name="Paragraphedeliste" style:family="paragraph">
      <style:paragraph-properties fo:margin-left="0.5416in">
        <style:tab-stops/>
      </style:paragraph-properties>
      <style:text-properties style:font-size-complex="14pt"/>
    </style:style>
    <style:style style:name="P321" style:parent-style-name="Paragraphedeliste" style:list-style-name="LFO13" style:family="paragraph">
      <style:paragraph-properties fo:widows="2" fo:orphans="2" style:text-autospace="ideograph-alpha" fo:margin-bottom="0.1111in" fo:line-height="105%"/>
    </style:style>
    <style:style style:name="T322" style:parent-style-name="Policepardéfaut" style:family="text">
      <style:text-properties fo:font-weight="bold" style:font-weight-asian="bold" style:font-weight-complex="bold" style:font-size-complex="14pt"/>
    </style:style>
    <style:style style:name="T323" style:parent-style-name="Policepardéfaut" style:family="text">
      <style:text-properties style:font-size-complex="14pt"/>
    </style:style>
    <style:style style:name="T324" style:parent-style-name="Policepardéfaut" style:family="text">
      <style:text-properties fo:font-weight="bold" style:font-weight-asian="bold" style:font-weight-complex="bold" style:font-size-complex="14pt"/>
    </style:style>
    <style:style style:name="T325" style:parent-style-name="Policepardéfaut" style:family="text">
      <style:text-properties style:font-size-complex="14pt"/>
    </style:style>
    <style:style style:name="T326" style:parent-style-name="Policepardéfaut" style:family="text">
      <style:text-properties fo:font-weight="bold" style:font-weight-asian="bold" style:font-weight-complex="bold" style:font-size-complex="14pt"/>
    </style:style>
    <style:style style:name="T327" style:parent-style-name="Policepardéfaut" style:family="text">
      <style:text-properties style:font-size-complex="14pt"/>
    </style:style>
    <style:style style:name="T328" style:parent-style-name="Policepardéfaut" style:family="text">
      <style:text-properties fo:font-weight="bold" style:font-weight-asian="bold" style:font-weight-complex="bold" style:font-size-complex="14pt"/>
    </style:style>
    <style:style style:name="T329" style:parent-style-name="Policepardéfaut" style:family="text">
      <style:text-properties style:font-size-complex="14pt"/>
    </style:style>
    <style:style style:name="T330" style:parent-style-name="Policepardéfaut" style:family="text">
      <style:text-properties fo:font-weight="bold" style:font-weight-asian="bold" style:font-weight-complex="bold" style:font-size-complex="14pt"/>
    </style:style>
    <style:style style:name="T331" style:parent-style-name="Policepardéfaut" style:family="text">
      <style:text-properties style:font-size-complex="14pt"/>
    </style:style>
    <style:style style:name="P332" style:parent-style-name="Paragraphedeliste" style:list-style-name="LFO13" style:family="paragraph">
      <style:paragraph-properties fo:widows="2" fo:orphans="2" style:text-autospace="ideograph-alpha" fo:margin-bottom="0.1111in" fo:line-height="105%"/>
    </style:style>
    <style:style style:name="T333" style:parent-style-name="Policepardéfaut" style:family="text">
      <style:text-properties fo:font-weight="bold" style:font-weight-asian="bold" style:font-weight-complex="bold" style:font-size-complex="14pt"/>
    </style:style>
    <style:style style:name="T334" style:parent-style-name="Policepardéfaut" style:family="text">
      <style:text-properties style:font-size-complex="14pt"/>
    </style:style>
    <style:style style:name="T335" style:parent-style-name="Policepardéfaut" style:family="text">
      <style:text-properties fo:font-weight="bold" style:font-weight-asian="bold" style:font-weight-complex="bold" style:font-size-complex="14pt"/>
    </style:style>
    <style:style style:name="T336" style:parent-style-name="Policepardéfaut" style:family="text">
      <style:text-properties style:font-size-complex="14pt"/>
    </style:style>
    <style:style style:name="T337" style:parent-style-name="Policepardéfaut" style:family="text">
      <style:text-properties fo:font-weight="bold" style:font-weight-asian="bold" style:font-weight-complex="bold" style:font-size-complex="14pt"/>
    </style:style>
    <style:style style:name="T338" style:parent-style-name="Policepardéfaut" style:family="text">
      <style:text-properties style:font-size-complex="14pt"/>
    </style:style>
    <style:style style:name="T339" style:parent-style-name="Policepardéfaut" style:family="text">
      <style:text-properties fo:font-weight="bold" style:font-weight-asian="bold" style:font-weight-complex="bold" style:font-size-complex="14pt"/>
    </style:style>
    <style:style style:name="T340" style:parent-style-name="Policepardéfaut" style:family="text">
      <style:text-properties style:font-size-complex="14pt"/>
    </style:style>
    <style:style style:name="P341" style:parent-style-name="Paragraphedeliste" style:list-style-name="LFO13" style:family="paragraph">
      <style:paragraph-properties fo:widows="2" fo:orphans="2" style:text-autospace="ideograph-alpha" fo:margin-bottom="0.1111in" fo:line-height="105%"/>
    </style:style>
    <style:style style:name="T342" style:parent-style-name="Policepardéfaut" style:family="text">
      <style:text-properties fo:font-weight="bold" style:font-weight-asian="bold" style:font-weight-complex="bold" style:font-size-complex="14pt"/>
    </style:style>
    <style:style style:name="T343" style:parent-style-name="Policepardéfaut" style:family="text">
      <style:text-properties style:font-size-complex="14pt"/>
    </style:style>
    <style:style style:name="T344" style:parent-style-name="Policepardéfaut" style:family="text">
      <style:text-properties fo:font-weight="bold" style:font-weight-asian="bold" style:font-weight-complex="bold" style:font-size-complex="14pt"/>
    </style:style>
    <style:style style:name="T345" style:parent-style-name="Policepardéfaut" style:family="text">
      <style:text-properties style:font-size-complex="14pt"/>
    </style:style>
    <style:style style:name="T346" style:parent-style-name="Policepardéfaut" style:family="text">
      <style:text-properties fo:font-weight="bold" style:font-weight-asian="bold" style:font-weight-complex="bold" style:font-size-complex="14pt"/>
    </style:style>
    <style:style style:name="T347" style:parent-style-name="Policepardéfaut" style:family="text">
      <style:text-properties style:font-size-complex="14pt"/>
    </style:style>
    <style:style style:name="P348" style:parent-style-name="Normal" style:family="paragraph">
      <style:paragraph-properties fo:margin-left="0.25in">
        <style:tab-stops/>
      </style:paragraph-properties>
      <style:text-properties style:font-size-complex="14pt"/>
    </style:style>
    <style:style style:name="T349" style:parent-style-name="Policepardéfaut" style:family="text">
      <style:text-properties style:font-size-complex="14pt"/>
    </style:style>
    <style:style style:name="T350" style:parent-style-name="Policepardéfaut" style:family="text">
      <style:text-properties fo:font-weight="bold" style:font-weight-asian="bold" style:font-weight-complex="bold" style:font-size-complex="14pt"/>
    </style:style>
    <style:style style:name="T351" style:parent-style-name="Policepardéfaut" style:family="text">
      <style:text-properties style:font-size-complex="14pt"/>
    </style:style>
    <style:style style:name="P352" style:parent-style-name="Titre3" style:list-style-name="LFO6" style:family="paragraph">
      <style:paragraph-properties fo:margin-left="1in" fo:text-indent="-0.25in">
        <style:tab-stops/>
      </style:paragraph-properties>
    </style:style>
    <style:style style:name="P353" style:parent-style-name="Normal" style:family="paragraph">
      <style:paragraph-properties fo:margin-left="0.25in">
        <style:tab-stops/>
      </style:paragraph-properties>
      <style:text-properties fo:font-weight="bold" style:font-weight-asian="bold" style:font-weight-complex="bold"/>
    </style:style>
    <style:style style:name="P354" style:parent-style-name="Normal" style:family="paragraph">
      <style:paragraph-properties fo:margin-left="0.25in">
        <style:tab-stops/>
      </style:paragraph-properties>
    </style:style>
    <style:style style:name="T355" style:parent-style-name="Policepardéfaut" style:family="text">
      <style:text-properties style:font-size-complex="14pt"/>
    </style:style>
    <style:style style:name="T356" style:parent-style-name="Policepardéfaut" style:family="text">
      <style:text-properties fo:font-weight="bold" style:font-weight-asian="bold" style:font-weight-complex="bold" style:font-size-complex="14pt"/>
    </style:style>
    <style:style style:name="T357" style:parent-style-name="Policepardéfaut" style:family="text">
      <style:text-properties style:font-size-complex="14pt"/>
    </style:style>
    <style:style style:name="P358" style:parent-style-name="Normal" style:list-style-name="LFO14" style:family="paragraph">
      <style:paragraph-properties fo:widows="2" fo:orphans="2" style:text-autospace="ideograph-alpha" fo:margin-bottom="0.1111in" fo:line-height="105%"/>
    </style:style>
    <style:style style:name="T359" style:parent-style-name="Policepardéfaut" style:family="text">
      <style:text-properties fo:font-weight="bold" style:font-weight-asian="bold" style:font-weight-complex="bold" style:font-size-complex="14pt"/>
    </style:style>
    <style:style style:name="T360" style:parent-style-name="Policepardéfaut" style:family="text">
      <style:text-properties style:font-size-complex="14pt"/>
    </style:style>
    <style:style style:name="T361" style:parent-style-name="Policepardéfaut" style:family="text">
      <style:text-properties fo:font-weight="bold" style:font-weight-asian="bold" style:font-weight-complex="bold" style:font-size-complex="14pt"/>
    </style:style>
    <style:style style:name="T362" style:parent-style-name="Policepardéfaut" style:family="text">
      <style:text-properties style:font-size-complex="14pt"/>
    </style:style>
    <style:style style:name="T363" style:parent-style-name="Policepardéfaut" style:family="text">
      <style:text-properties fo:font-weight="bold" style:font-weight-asian="bold" style:font-weight-complex="bold" style:font-size-complex="14pt"/>
    </style:style>
    <style:style style:name="T364" style:parent-style-name="Policepardéfaut" style:family="text">
      <style:text-properties style:font-size-complex="14pt"/>
    </style:style>
    <style:style style:name="T365" style:parent-style-name="Policepardéfaut" style:family="text">
      <style:text-properties fo:font-weight="bold" style:font-weight-asian="bold" style:font-weight-complex="bold" style:font-size-complex="14pt"/>
    </style:style>
    <style:style style:name="T366" style:parent-style-name="Policepardéfaut" style:family="text">
      <style:text-properties style:font-size-complex="14pt"/>
    </style:style>
    <style:style style:name="T367" style:parent-style-name="Policepardéfaut" style:family="text">
      <style:text-properties fo:font-weight="bold" style:font-weight-asian="bold" style:font-weight-complex="bold" style:font-size-complex="14pt"/>
    </style:style>
    <style:style style:name="T368" style:parent-style-name="Policepardéfaut" style:family="text">
      <style:text-properties style:font-size-complex="14pt"/>
    </style:style>
    <style:style style:name="P369" style:parent-style-name="Normal" style:list-style-name="LFO14" style:family="paragraph">
      <style:paragraph-properties fo:widows="2" fo:orphans="2" style:text-autospace="ideograph-alpha" fo:margin-bottom="0.1111in" fo:line-height="105%"/>
    </style:style>
    <style:style style:name="T370" style:parent-style-name="Policepardéfaut" style:family="text">
      <style:text-properties fo:font-weight="bold" style:font-weight-asian="bold" style:font-weight-complex="bold" style:font-size-complex="14pt"/>
    </style:style>
    <style:style style:name="T371" style:parent-style-name="Policepardéfaut" style:family="text">
      <style:text-properties style:font-size-complex="14pt"/>
    </style:style>
    <style:style style:name="T372" style:parent-style-name="Policepardéfaut" style:family="text">
      <style:text-properties fo:font-weight="bold" style:font-weight-asian="bold" style:font-weight-complex="bold" style:font-size-complex="14pt"/>
    </style:style>
    <style:style style:name="T373" style:parent-style-name="Policepardéfaut" style:family="text">
      <style:text-properties style:font-size-complex="14pt"/>
    </style:style>
    <style:style style:name="T374" style:parent-style-name="Policepardéfaut" style:family="text">
      <style:text-properties fo:font-weight="bold" style:font-weight-asian="bold" style:font-weight-complex="bold" style:font-size-complex="14pt"/>
    </style:style>
    <style:style style:name="T375" style:parent-style-name="Policepardéfaut" style:family="text">
      <style:text-properties style:font-size-complex="14pt"/>
    </style:style>
    <style:style style:name="T376" style:parent-style-name="Policepardéfaut" style:family="text">
      <style:text-properties fo:font-weight="bold" style:font-weight-asian="bold" style:font-weight-complex="bold" style:font-size-complex="14pt"/>
    </style:style>
    <style:style style:name="T377" style:parent-style-name="Policepardéfaut" style:family="text">
      <style:text-properties style:font-size-complex="14pt"/>
    </style:style>
    <style:style style:name="P378" style:parent-style-name="Normal" style:list-style-name="LFO14" style:family="paragraph">
      <style:paragraph-properties fo:widows="2" fo:orphans="2" style:text-autospace="ideograph-alpha" fo:margin-bottom="0.1111in" fo:line-height="105%"/>
    </style:style>
    <style:style style:name="T379" style:parent-style-name="Policepardéfaut" style:family="text">
      <style:text-properties fo:font-weight="bold" style:font-weight-asian="bold" style:font-weight-complex="bold" style:font-size-complex="14pt"/>
    </style:style>
    <style:style style:name="T380" style:parent-style-name="Policepardéfaut" style:family="text">
      <style:text-properties style:font-size-complex="14pt"/>
    </style:style>
    <style:style style:name="T381" style:parent-style-name="Policepardéfaut" style:family="text">
      <style:text-properties fo:font-weight="bold" style:font-weight-asian="bold" style:font-weight-complex="bold" style:font-size-complex="14pt"/>
    </style:style>
    <style:style style:name="T382" style:parent-style-name="Policepardéfaut" style:family="text">
      <style:text-properties style:font-size-complex="14pt"/>
    </style:style>
    <style:style style:name="T383" style:parent-style-name="Policepardéfaut" style:family="text">
      <style:text-properties fo:font-weight="bold" style:font-weight-asian="bold" style:font-weight-complex="bold" style:font-size-complex="14pt"/>
    </style:style>
    <style:style style:name="T384" style:parent-style-name="Policepardéfaut" style:family="text">
      <style:text-properties style:font-size-complex="14pt"/>
    </style:style>
    <style:style style:name="T385" style:parent-style-name="Policepardéfaut" style:family="text">
      <style:text-properties style:font-size-complex="14pt"/>
    </style:style>
    <style:style style:name="T386" style:parent-style-name="Policepardéfaut" style:family="text">
      <style:text-properties fo:font-weight="bold" style:font-weight-asian="bold" style:font-weight-complex="bold" style:font-size-complex="14pt"/>
    </style:style>
    <style:style style:name="T387" style:parent-style-name="Policepardéfaut" style:family="text">
      <style:text-properties style:font-size-complex="14pt"/>
    </style:style>
    <style:style style:name="T388" style:parent-style-name="Policepardéfaut" style:family="text">
      <style:text-properties fo:font-weight="bold" style:font-weight-asian="bold" style:font-weight-complex="bold" style:font-size-complex="14pt"/>
    </style:style>
    <style:style style:name="T389" style:parent-style-name="Policepardéfaut" style:family="text">
      <style:text-properties style:font-size-complex="14pt"/>
    </style:style>
    <style:style style:name="P390" style:parent-style-name="Titre3" style:list-style-name="LFO6" style:family="paragraph">
      <style:paragraph-properties fo:margin-left="1in" fo:text-indent="-0.25in">
        <style:tab-stops/>
      </style:paragraph-properties>
    </style:style>
    <style:style style:name="P391" style:parent-style-name="Normal" style:family="paragraph">
      <style:paragraph-properties fo:margin-left="0.25in">
        <style:tab-stops/>
      </style:paragraph-properties>
      <style:text-properties fo:font-weight="bold" style:font-weight-asian="bold" style:font-weight-complex="bold"/>
    </style:style>
    <style:style style:name="P392" style:parent-style-name="Normal" style:family="paragraph">
      <style:paragraph-properties fo:margin-left="0.25in">
        <style:tab-stops/>
      </style:paragraph-properties>
    </style:style>
    <style:style style:name="T393" style:parent-style-name="Policepardéfaut" style:family="text">
      <style:text-properties style:font-size-complex="14pt"/>
    </style:style>
    <style:style style:name="T394" style:parent-style-name="Policepardéfaut" style:family="text">
      <style:text-properties style:font-size-complex="14pt"/>
    </style:style>
    <style:style style:name="T395" style:parent-style-name="Policepardéfaut" style:family="text">
      <style:text-properties style:font-size-complex="14pt"/>
    </style:style>
    <style:style style:name="T396" style:parent-style-name="Policepardéfaut" style:family="text">
      <style:text-properties fo:font-weight="bold" style:font-weight-asian="bold" style:font-weight-complex="bold" style:font-size-complex="14pt"/>
    </style:style>
    <style:style style:name="T397" style:parent-style-name="Policepardéfaut" style:family="text">
      <style:text-properties style:font-size-complex="14pt"/>
    </style:style>
    <style:style style:name="P398" style:parent-style-name="Normal" style:list-style-name="LFO15" style:family="paragraph">
      <style:paragraph-properties fo:widows="2" fo:orphans="2" style:text-autospace="ideograph-alpha" fo:margin-bottom="0.1111in" fo:line-height="105%"/>
    </style:style>
    <style:style style:name="T399" style:parent-style-name="Policepardéfaut" style:family="text">
      <style:text-properties style:font-size-complex="14pt"/>
    </style:style>
    <style:style style:name="T400" style:parent-style-name="Policepardéfaut" style:family="text">
      <style:text-properties fo:font-weight="bold" style:font-weight-asian="bold" style:font-weight-complex="bold" style:font-size-complex="14pt"/>
    </style:style>
    <style:style style:name="T401" style:parent-style-name="Policepardéfaut" style:family="text">
      <style:text-properties style:font-size-complex="14pt"/>
    </style:style>
    <style:style style:name="T402" style:parent-style-name="Policepardéfaut" style:family="text">
      <style:text-properties fo:font-weight="bold" style:font-weight-asian="bold" style:font-weight-complex="bold" style:font-size-complex="14pt"/>
    </style:style>
    <style:style style:name="T403" style:parent-style-name="Policepardéfaut" style:family="text">
      <style:text-properties style:font-size-complex="14pt"/>
    </style:style>
    <style:style style:name="P404" style:parent-style-name="Normal" style:list-style-name="LFO15" style:family="paragraph">
      <style:paragraph-properties fo:widows="2" fo:orphans="2" style:text-autospace="ideograph-alpha" fo:margin-bottom="0.1111in" fo:line-height="105%"/>
    </style:style>
    <style:style style:name="T405" style:parent-style-name="Policepardéfaut" style:family="text">
      <style:text-properties style:font-size-complex="14pt"/>
    </style:style>
    <style:style style:name="T406" style:parent-style-name="Policepardéfaut" style:family="text">
      <style:text-properties fo:font-weight="bold" style:font-weight-asian="bold" style:font-weight-complex="bold" style:font-size-complex="14pt"/>
    </style:style>
    <style:style style:name="T407" style:parent-style-name="Policepardéfaut" style:family="text">
      <style:text-properties style:font-size-complex="14pt"/>
    </style:style>
    <style:style style:name="P408" style:parent-style-name="Normal" style:list-style-name="LFO15" style:family="paragraph">
      <style:paragraph-properties fo:widows="2" fo:orphans="2" style:text-autospace="ideograph-alpha" fo:margin-bottom="0.1111in" fo:line-height="105%"/>
    </style:style>
    <style:style style:name="T409" style:parent-style-name="Policepardéfaut" style:family="text">
      <style:text-properties style:font-size-complex="14pt"/>
    </style:style>
    <style:style style:name="T410" style:parent-style-name="Policepardéfaut" style:family="text">
      <style:text-properties fo:font-weight="bold" style:font-weight-asian="bold" style:font-weight-complex="bold" style:font-size-complex="14pt"/>
    </style:style>
    <style:style style:name="T411" style:parent-style-name="Policepardéfaut" style:family="text">
      <style:text-properties style:font-size-complex="14pt"/>
    </style:style>
    <style:style style:name="P412" style:parent-style-name="Normal" style:list-style-name="LFO15" style:family="paragraph">
      <style:paragraph-properties fo:widows="2" fo:orphans="2" style:text-autospace="ideograph-alpha" fo:margin-bottom="0.1111in" fo:line-height="105%"/>
    </style:style>
    <style:style style:name="T413" style:parent-style-name="Policepardéfaut" style:family="text">
      <style:text-properties style:font-size-complex="14pt"/>
    </style:style>
    <style:style style:name="T414" style:parent-style-name="Policepardéfaut" style:family="text">
      <style:text-properties fo:font-weight="bold" style:font-weight-asian="bold" style:font-weight-complex="bold" style:font-size-complex="14pt"/>
    </style:style>
    <style:style style:name="T415" style:parent-style-name="Policepardéfaut" style:family="text">
      <style:text-properties style:font-size-complex="14pt"/>
    </style:style>
    <style:style style:name="T416" style:parent-style-name="Policepardéfaut" style:family="text">
      <style:text-properties fo:font-weight="bold" style:font-weight-asian="bold" style:font-weight-complex="bold" style:font-size-complex="14pt"/>
    </style:style>
    <style:style style:name="T417" style:parent-style-name="Policepardéfaut" style:family="text">
      <style:text-properties style:font-size-complex="14pt"/>
    </style:style>
    <style:style style:name="T418" style:parent-style-name="Policepardéfaut" style:family="text">
      <style:text-properties fo:font-weight="bold" style:font-weight-asian="bold" style:font-weight-complex="bold" style:font-size-complex="14pt"/>
    </style:style>
    <style:style style:name="T419" style:parent-style-name="Policepardéfaut" style:family="text">
      <style:text-properties style:font-size-complex="14pt"/>
    </style:style>
    <style:style style:name="P420" style:parent-style-name="Titre3" style:list-style-name="LFO6" style:family="paragraph">
      <style:paragraph-properties fo:margin-left="1in" fo:text-indent="-0.25in">
        <style:tab-stops/>
      </style:paragraph-properties>
    </style:style>
    <style:style style:name="P421" style:parent-style-name="Normal" style:family="paragraph">
      <style:paragraph-properties fo:margin-left="0.25in">
        <style:tab-stops/>
      </style:paragraph-properties>
    </style:style>
    <style:style style:name="T422" style:parent-style-name="Policepardéfaut" style:family="text">
      <style:text-properties fo:font-weight="bold" style:font-weight-asian="bold" style:font-weight-complex="bold"/>
    </style:style>
    <style:style style:name="P423" style:parent-style-name="Normal" style:list-style-name="LFO16" style:family="paragraph">
      <style:paragraph-properties fo:widows="2" fo:orphans="2" style:text-autospace="ideograph-alpha" fo:margin-bottom="0.1111in" fo:line-height="105%"/>
    </style:style>
    <style:style style:name="T424" style:parent-style-name="Policepardéfaut" style:family="text">
      <style:text-properties fo:font-weight="bold" style:font-weight-asian="bold" style:font-weight-complex="bold"/>
    </style:style>
    <style:style style:name="P425" style:parent-style-name="Normal" style:list-style-name="LFO16" style:family="paragraph">
      <style:paragraph-properties fo:widows="2" fo:orphans="2" style:text-autospace="ideograph-alpha" fo:margin-bottom="0.1111in" fo:line-height="105%"/>
    </style:style>
    <style:style style:name="T426" style:parent-style-name="Policepardéfaut" style:family="text">
      <style:text-properties fo:font-weight="bold" style:font-weight-asian="bold" style:font-weight-complex="bold"/>
    </style:style>
    <style:style style:name="P427" style:parent-style-name="Normal" style:list-style-name="LFO16" style:family="paragraph">
      <style:paragraph-properties fo:widows="2" fo:orphans="2" style:text-autospace="ideograph-alpha" fo:margin-bottom="0.1111in" fo:line-height="105%"/>
    </style:style>
    <style:style style:name="T428" style:parent-style-name="Policepardéfaut" style:family="text">
      <style:text-properties fo:font-weight="bold" style:font-weight-asian="bold" style:font-weight-complex="bold"/>
    </style:style>
    <style:style style:name="T429" style:parent-style-name="Policepardéfaut" style:family="text">
      <style:text-properties fo:font-weight="bold" style:font-weight-asian="bold" style:font-weight-complex="bold"/>
    </style:style>
    <style:style style:name="T430" style:parent-style-name="Policepardéfaut" style:family="text">
      <style:text-properties fo:font-weight="bold" style:font-weight-asian="bold" style:font-weight-complex="bold"/>
    </style:style>
    <style:style style:name="P431" style:parent-style-name="Titre2" style:list-style-name="LFO16" style:family="paragraph">
      <style:paragraph-properties fo:margin-left="0.75in">
        <style:tab-stops/>
      </style:paragraph-properties>
    </style:style>
    <style:style style:name="P432" style:parent-style-name="Titre3" style:family="paragraph">
      <style:paragraph-properties fo:text-indent="0.25in"/>
    </style:style>
    <style:style style:name="T433" style:parent-style-name="Policepardéfaut" style:family="text">
      <style:text-properties fo:font-weight="bold" style:font-weight-asian="bold" style:font-weight-complex="bold"/>
    </style:style>
    <style:style style:name="T434" style:parent-style-name="Policepardéfaut" style:family="text">
      <style:text-properties fo:font-weight="bold" style:font-weight-asian="bold" style:font-weight-complex="bold"/>
    </style:style>
    <style:style style:name="TableColumn436" style:family="table-column">
      <style:table-column-properties style:column-width="1.1409in"/>
    </style:style>
    <style:style style:name="TableColumn437" style:family="table-column">
      <style:table-column-properties style:column-width="1.0416in"/>
    </style:style>
    <style:style style:name="TableColumn438" style:family="table-column">
      <style:table-column-properties style:column-width="0.593in"/>
    </style:style>
    <style:style style:name="Table435" style:family="table">
      <style:table-properties style:width="0in" fo:margin-left="0in" table:align="lef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1111in" fo:line-height="105%"/>
      <style:text-properties fo:font-weight="bold" style:font-weight-asian="bold" style:font-weight-complex="bold"/>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1111in" fo:line-height="105%"/>
      <style:text-properties fo:font-weight="bold" style:font-weight-asian="bold" style:font-weight-complex="bold"/>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1111in" fo:line-height="105%"/>
      <style:text-properties fo:font-weight="bold" style:font-weight-asian="bold" style:font-weight-complex="bold"/>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1111in" fo:line-height="105%"/>
    </style:style>
    <style:style style:name="T449" style:parent-style-name="Policepardéfaut" style:family="text">
      <style:text-properties fo:font-weight="bold" style:font-weight-asian="bold" style:font-weight-complex="bold"/>
    </style:style>
    <style:style style:name="T450" style:parent-style-name="Policepardéfaut" style:family="text">
      <style:text-properties fo:font-style="italic" style:font-style-asian="italic" style:font-style-complex="italic"/>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1111in" fo:line-height="105%"/>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1111in" fo:line-height="105%"/>
    </style:style>
    <style:style style:name="T455" style:parent-style-name="Policepardéfaut" style:family="text">
      <style:text-properties fo:font-weight="bold" style:font-weight-asian="bold" style:font-weight-complex="bold"/>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1111in" fo:line-height="105%"/>
    </style:style>
    <style:style style:name="T459" style:parent-style-name="Policepardéfaut" style:family="text">
      <style:text-properties fo:font-weight="bold" style:font-weight-asian="bold" style:font-weight-complex="bold"/>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1111in" fo:line-height="105%"/>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1111in" fo:line-height="105%"/>
    </style:style>
    <style:style style:name="T464" style:parent-style-name="Policepardéfaut" style:family="text">
      <style:text-properties fo:font-weight="bold" style:font-weight-asian="bold" style:font-weight-complex="bold"/>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1111in" fo:line-height="105%"/>
    </style:style>
    <style:style style:name="T468" style:parent-style-name="Policepardéfaut" style:family="text">
      <style:text-properties fo:font-weight="bold" style:font-weight-asian="bold" style:font-weight-complex="bold"/>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1111in" fo:line-height="105%"/>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1111in" fo:line-height="105%"/>
    </style:style>
    <style:style style:name="T473" style:parent-style-name="Policepardéfaut" style:family="text">
      <style:text-properties fo:font-weight="bold" style:font-weight-asian="bold" style:font-weight-complex="bold"/>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1111in" fo:line-height="105%"/>
    </style:style>
    <style:style style:name="T477" style:parent-style-name="Policepardéfaut" style:family="text">
      <style:text-properties fo:font-weight="bold" style:font-weight-asian="bold" style:font-weight-complex="bold"/>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1111in" fo:line-height="105%"/>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1111in" fo:line-height="105%"/>
    </style:style>
    <style:style style:name="T482" style:parent-style-name="Policepardéfaut" style:family="text">
      <style:text-properties fo:font-weight="bold" style:font-weight-asian="bold" style:font-weight-complex="bold"/>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1111in" fo:line-height="105%"/>
    </style:style>
    <style:style style:name="T486" style:parent-style-name="Policepardéfaut" style:family="text">
      <style:text-properties fo:font-weight="bold" style:font-weight-asian="bold" style:font-weight-complex="bold"/>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1111in" fo:line-height="105%"/>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1111in" fo:line-height="105%"/>
    </style:style>
    <style:style style:name="T491" style:parent-style-name="Policepardéfaut" style:family="text">
      <style:text-properties fo:font-weight="bold" style:font-weight-asian="bold" style:font-weight-complex="bold"/>
    </style:style>
    <style:style style:name="P492" style:parent-style-name="Paragraphedeliste" style:list-style-name="LFO17" style:family="paragraph">
      <style:paragraph-properties fo:widows="2" fo:orphans="2" style:text-autospace="ideograph-alpha" fo:margin-bottom="0.1111in" fo:line-height="105%"/>
    </style:style>
    <style:style style:name="T493" style:parent-style-name="Policepardéfaut" style:family="text">
      <style:text-properties fo:font-weight="bold" style:font-weight-asian="bold" style:font-weight-complex="bold"/>
    </style:style>
    <style:style style:name="T494" style:parent-style-name="Policepardéfaut" style:family="text">
      <style:text-properties fo:font-weight="bold" style:font-weight-asian="bold" style:font-weight-complex="bold"/>
    </style:style>
    <style:style style:name="P495" style:parent-style-name="Paragraphedeliste" style:list-style-name="LFO17" style:family="paragraph">
      <style:paragraph-properties fo:widows="2" fo:orphans="2" style:text-autospace="ideograph-alpha" fo:margin-bottom="0.1111in" fo:line-height="105%"/>
    </style:style>
    <style:style style:name="T496" style:parent-style-name="Policepardéfaut" style:family="text">
      <style:text-properties fo:font-weight="bold" style:font-weight-asian="bold" style:font-weight-complex="bold"/>
    </style:style>
    <style:style style:name="T497" style:parent-style-name="Policepardéfaut" style:family="text">
      <style:text-properties fo:font-weight="bold" style:font-weight-asian="bold" style:font-weight-complex="bold"/>
    </style:style>
    <style:style style:name="P498" style:parent-style-name="NormalWeb" style:list-style-name="LFO17" style:family="paragraph"/>
    <style:style style:name="T499" style:parent-style-name="Élevé" style:family="text">
      <style:text-properties style:font-name="Calibri" style:font-name-complex="Calibri" fo:font-size="14pt" style:font-size-asian="14pt" style:font-size-complex="14pt"/>
    </style:style>
    <style:style style:name="T500" style:parent-style-name="Policepardéfaut" style:family="text">
      <style:text-properties style:font-name="Calibri" style:font-name-complex="Calibri" fo:font-size="14pt" style:font-size-asian="14pt" style:font-size-complex="14pt"/>
    </style:style>
    <style:style style:name="T501" style:parent-style-name="Élevé" style:family="text">
      <style:text-properties style:font-name="Calibri" style:font-name-complex="Calibri" fo:font-size="14pt" style:font-size-asian="14pt" style:font-size-complex="14pt"/>
    </style:style>
    <style:style style:name="T502" style:parent-style-name="Policepardéfaut" style:family="text">
      <style:text-properties style:font-name="Calibri" style:font-name-complex="Calibri" fo:font-size="14pt" style:font-size-asian="14pt" style:font-size-complex="14pt"/>
    </style:style>
    <style:style style:name="T503" style:parent-style-name="Élevé" style:family="text">
      <style:text-properties style:font-name="Calibri" style:font-name-complex="Calibri" fo:font-size="14pt" style:font-size-asian="14pt" style:font-size-complex="14pt"/>
    </style:style>
    <style:style style:name="T504" style:parent-style-name="Policepardéfaut" style:family="text">
      <style:text-properties style:font-name="Calibri" style:font-name-complex="Calibri" fo:font-size="14pt" style:font-size-asian="14pt" style:font-size-complex="14pt"/>
    </style:style>
    <style:style style:name="T505" style:parent-style-name="Élevé" style:family="text">
      <style:text-properties style:font-name="Calibri" style:font-name-complex="Calibri" fo:font-size="14pt" style:font-size-asian="14pt" style:font-size-complex="14pt"/>
    </style:style>
    <style:style style:name="T506" style:parent-style-name="Policepardéfaut" style:family="text">
      <style:text-properties style:font-name="Calibri" style:font-name-complex="Calibri" fo:font-size="14pt" style:font-size-asian="14pt" style:font-size-complex="14pt"/>
    </style:style>
    <style:style style:name="T507" style:parent-style-name="Policepardéfaut" style:family="text">
      <style:text-properties fo:font-weight="bold" style:font-weight-asian="bold" style:font-weight-complex="bold"/>
    </style:style>
    <style:style style:name="T508" style:parent-style-name="Policepardéfaut" style:family="text">
      <style:text-properties fo:font-weight="bold" style:font-weight-asian="bold" style:font-weight-complex="bold"/>
    </style:style>
    <style:style style:name="P509" style:parent-style-name="Titre2" style:list-style-name="LFO16" style:family="paragraph">
      <style:paragraph-properties fo:margin-left="0.75in">
        <style:tab-stops/>
      </style:paragraph-properties>
    </style:style>
    <style:style style:name="T510" style:parent-style-name="Policepardéfaut" style:family="text">
      <style:text-properties fo:font-weight="bold" style:font-weight-asian="bold" style:font-weight-complex="bold"/>
    </style:style>
    <style:style style:name="T511" style:parent-style-name="Policepardéfaut" style:family="text">
      <style:text-properties fo:font-weight="bold" style:font-weight-asian="bold" style:font-weight-complex="bold"/>
    </style:style>
    <style:style style:name="T512" style:parent-style-name="Policepardéfaut" style:family="text">
      <style:text-properties fo:font-weight="bold" style:font-weight-asian="bold" style:font-weight-complex="bold"/>
    </style:style>
    <style:style style:name="P513" style:parent-style-name="Paragraphedeliste" style:list-style-name="LFO18" style:family="paragraph">
      <style:paragraph-properties fo:widows="2" fo:orphans="2" style:text-autospace="ideograph-alpha" fo:margin-bottom="0.1111in" fo:line-height="105%"/>
    </style:style>
    <style:style style:name="T514" style:parent-style-name="Policepardéfaut" style:family="text">
      <style:text-properties fo:font-weight="bold" style:font-weight-asian="bold" style:font-weight-complex="bold"/>
    </style:style>
    <style:style style:name="T515" style:parent-style-name="Policepardéfaut" style:family="text">
      <style:text-properties fo:font-weight="bold" style:font-weight-asian="bold" style:font-weight-complex="bold"/>
    </style:style>
    <style:style style:name="P516" style:parent-style-name="Paragraphedeliste" style:list-style-name="LFO18" style:family="paragraph">
      <style:paragraph-properties fo:widows="2" fo:orphans="2" style:text-autospace="ideograph-alpha" fo:margin-bottom="0.1111in" fo:line-height="105%"/>
    </style:style>
    <style:style style:name="T517" style:parent-style-name="Policepardéfaut" style:family="text">
      <style:text-properties fo:font-weight="bold" style:font-weight-asian="bold" style:font-weight-complex="bold"/>
    </style:style>
    <style:style style:name="T518" style:parent-style-name="Policepardéfaut" style:family="text">
      <style:text-properties fo:font-weight="bold" style:font-weight-asian="bold" style:font-weight-complex="bold"/>
    </style:style>
    <style:style style:name="T519" style:parent-style-name="Policepardéfaut" style:family="text">
      <style:text-properties fo:font-weight="bold" style:font-weight-asian="bold" style:font-weight-complex="bold"/>
    </style:style>
    <style:style style:name="T520" style:parent-style-name="Policepardéfaut" style:family="text">
      <style:text-properties fo:font-weight="bold" style:font-weight-asian="bold" style:font-weight-complex="bold"/>
    </style:style>
    <style:style style:name="P521" style:parent-style-name="Paragraphedeliste" style:list-style-name="LFO18" style:family="paragraph">
      <style:paragraph-properties fo:widows="2" fo:orphans="2" style:text-autospace="ideograph-alpha" fo:margin-bottom="0.1111in" fo:line-height="105%"/>
    </style:style>
    <style:style style:name="P522" style:parent-style-name="Normal" style:family="paragraph">
      <style:paragraph-properties fo:text-indent="0.4916in"/>
    </style:style>
    <style:style style:name="P523" style:parent-style-name="Paragraphedeliste" style:list-style-name="LFO20" style:family="paragraph">
      <style:paragraph-properties fo:widows="2" fo:orphans="2" style:text-autospace="ideograph-alpha" fo:margin-bottom="0.1111in" fo:line-height="105%"/>
    </style:style>
    <style:style style:name="T524" style:parent-style-name="Policepardéfaut" style:family="text">
      <style:text-properties fo:font-weight="bold" style:font-weight-asian="bold" style:font-weight-complex="bold"/>
    </style:style>
    <style:style style:name="P525" style:parent-style-name="Paragraphedeliste" style:list-style-name="LFO20" style:family="paragraph">
      <style:paragraph-properties fo:widows="2" fo:orphans="2" style:text-autospace="ideograph-alpha" fo:margin-bottom="0.1111in" fo:line-height="105%"/>
    </style:style>
    <style:style style:name="T526" style:parent-style-name="Policepardéfaut" style:family="text">
      <style:text-properties fo:font-weight="bold" style:font-weight-asian="bold" style:font-weight-complex="bold"/>
    </style:style>
    <style:style style:name="P527" style:parent-style-name="Paragraphedeliste" style:list-style-name="LFO20" style:family="paragraph">
      <style:paragraph-properties fo:widows="2" fo:orphans="2" style:text-autospace="ideograph-alpha" fo:margin-bottom="0.1111in" fo:line-height="105%"/>
    </style:style>
    <style:style style:name="T528" style:parent-style-name="Policepardéfaut" style:family="text">
      <style:text-properties fo:font-weight="bold" style:font-weight-asian="bold" style:font-weight-complex="bold"/>
    </style:style>
    <style:style style:name="P529" style:parent-style-name="Paragraphedeliste" style:list-style-name="LFO20" style:family="paragraph">
      <style:paragraph-properties fo:widows="2" fo:orphans="2" style:text-autospace="ideograph-alpha" fo:margin-bottom="0.1111in" fo:line-height="105%"/>
    </style:style>
    <style:style style:name="T530" style:parent-style-name="Policepardéfaut" style:family="text">
      <style:text-properties fo:font-weight="bold" style:font-weight-asian="bold" style:font-weight-complex="bold"/>
    </style:style>
    <style:style style:name="P531" style:parent-style-name="Paragraphedeliste" style:list-style-name="LFO20" style:family="paragraph">
      <style:paragraph-properties fo:widows="2" fo:orphans="2" style:text-autospace="ideograph-alpha" fo:margin-bottom="0.1111in" fo:line-height="105%"/>
    </style:style>
    <style:style style:name="T532" style:parent-style-name="Policepardéfaut" style:family="text">
      <style:text-properties fo:font-weight="bold" style:font-weight-asian="bold" style:font-weight-complex="bold"/>
    </style:style>
    <style:style style:name="T533" style:parent-style-name="Policepardéfaut" style:family="text">
      <style:text-properties fo:font-weight="bold" style:font-weight-asian="bold" style:font-weight-complex="bold"/>
    </style:style>
    <style:style style:name="P534" style:parent-style-name="Paragraphedeliste" style:list-style-name="LFO18" style:family="paragraph">
      <style:paragraph-properties fo:widows="2" fo:orphans="2" style:text-autospace="ideograph-alpha" fo:margin-bottom="0.1111in" fo:line-height="105%"/>
    </style:style>
    <style:style style:name="P535" style:parent-style-name="Paragraphedeliste" style:list-style-name="LFO19" style:family="paragraph">
      <style:paragraph-properties fo:widows="2" fo:orphans="2" style:text-autospace="ideograph-alpha" fo:margin-bottom="0.1111in" fo:line-height="105%"/>
    </style:style>
    <style:style style:name="P536" style:parent-style-name="Paragraphedeliste" style:list-style-name="LFO19" style:family="paragraph">
      <style:paragraph-properties fo:widows="2" fo:orphans="2" style:text-autospace="ideograph-alpha" fo:margin-bottom="0.1111in" fo:line-height="105%"/>
    </style:style>
    <style:style style:name="P537" style:parent-style-name="Paragraphedeliste" style:list-style-name="LFO19" style:family="paragraph">
      <style:paragraph-properties fo:widows="2" fo:orphans="2" style:text-autospace="ideograph-alpha" fo:margin-bottom="0.1111in" fo:line-height="105%"/>
    </style:style>
    <style:style style:name="T538" style:parent-style-name="Policepardéfaut" style:family="text">
      <style:text-properties fo:font-weight="bold" style:font-weight-asian="bold" style:font-weight-complex="bold"/>
    </style:style>
    <style:style style:name="T539" style:parent-style-name="Policepardéfaut" style:family="text">
      <style:text-properties fo:font-weight="bold" style:font-weight-asian="bold" style:font-weight-complex="bold"/>
    </style:style>
    <style:style style:name="P540" style:parent-style-name="Paragraphedeliste" style:list-style-name="LFO21" style:family="paragraph">
      <style:paragraph-properties fo:widows="2" fo:orphans="2" style:text-autospace="ideograph-alpha" fo:margin-bottom="0.1111in" fo:line-height="105%"/>
    </style:style>
    <style:style style:name="T541" style:parent-style-name="Policepardéfaut" style:family="text">
      <style:text-properties fo:font-weight="bold" style:font-weight-asian="bold" style:font-weight-complex="bold"/>
    </style:style>
    <style:style style:name="T542" style:parent-style-name="Policepardéfaut" style:family="text">
      <style:text-properties fo:font-weight="bold" style:font-weight-asian="bold" style:font-weight-complex="bold"/>
    </style:style>
    <style:style style:name="T543" style:parent-style-name="Policepardéfaut" style:family="text">
      <style:text-properties fo:font-weight="bold" style:font-weight-asian="bold" style:font-weight-complex="bold"/>
    </style:style>
    <style:style style:name="P544" style:parent-style-name="Paragraphedeliste" style:list-style-name="LFO21" style:family="paragraph">
      <style:paragraph-properties fo:widows="2" fo:orphans="2" style:text-autospace="ideograph-alpha" fo:margin-bottom="0.1111in" fo:line-height="105%"/>
    </style:style>
    <style:style style:name="T545" style:parent-style-name="Policepardéfaut" style:family="text">
      <style:text-properties fo:font-weight="bold" style:font-weight-asian="bold" style:font-weight-complex="bold"/>
    </style:style>
    <style:style style:name="T546" style:parent-style-name="Policepardéfaut" style:family="text">
      <style:text-properties fo:font-weight="bold" style:font-weight-asian="bold" style:font-weight-complex="bold"/>
    </style:style>
    <style:style style:name="T547" style:parent-style-name="Policepardéfaut" style:family="text">
      <style:text-properties fo:font-weight="bold" style:font-weight-asian="bold" style:font-weight-complex="bold"/>
    </style:style>
    <style:style style:name="P548" style:parent-style-name="Normal" style:family="paragraph">
      <style:text-properties fo:color="#000000"/>
    </style:style>
    <style:style style:name="P549" style:parent-style-name="Normal" style:family="paragraph">
      <style:text-properties fo:color="#000000" style:font-size-complex="14pt"/>
    </style:style>
    <style:style style:name="P550" style:parent-style-name="Normal" style:family="paragraph">
      <style:text-properties fo:color="#000000"/>
    </style:style>
    <style:style style:name="P551" style:parent-style-name="Normal" style:family="paragraph">
      <style:text-properties fo:color="#000000"/>
    </style:style>
    <style:style style:name="T552" style:parent-style-name="Policepardéfaut" style:family="text">
      <style:text-properties style:font-name-asian="Times New Roman"/>
    </style:style>
    <style:style style:name="T553" style:parent-style-name="Policepardéfaut" style:family="text">
      <style:text-properties style:font-name-asian="Times New Roman" fo:font-weight="bold" style:font-weight-asian="bold" style:font-weight-complex="bold"/>
    </style:style>
    <style:style style:name="T554" style:parent-style-name="Policepardéfaut" style:family="text">
      <style:text-properties style:font-name-asian="Times New Roman"/>
    </style:style>
    <style:style style:name="T555" style:parent-style-name="Policepardéfaut" style:family="text">
      <style:text-properties style:font-name-asian="Times New Roman"/>
    </style:style>
    <style:style style:name="T556" style:parent-style-name="Policepardéfaut" style:family="text">
      <style:text-properties style:font-name-asian="Times New Roman" fo:font-weight="bold" style:font-weight-asian="bold" style:font-weight-complex="bold"/>
    </style:style>
    <style:style style:name="T557" style:parent-style-name="Policepardéfaut" style:family="text">
      <style:text-properties style:font-name-asian="Times New Roman"/>
    </style:style>
    <style:style style:name="T558" style:parent-style-name="Policepardéfaut" style:family="text">
      <style:text-properties style:font-name-asian="Times New Roman"/>
    </style:style>
    <style:style style:name="T559" style:parent-style-name="Policepardéfaut" style:family="text">
      <style:text-properties style:font-name-asian="Times New Roman" fo:font-weight="bold" style:font-weight-asian="bold" style:font-weight-complex="bold"/>
    </style:style>
    <style:style style:name="T560" style:parent-style-name="Policepardéfaut" style:family="text">
      <style:text-properties style:font-name-asian="Times New Roman"/>
    </style:style>
    <style:style style:name="T561" style:parent-style-name="Policepardéfaut" style:family="text">
      <style:text-properties style:font-name-asian="Times New Roman"/>
    </style:style>
    <style:style style:name="T562" style:parent-style-name="Policepardéfaut" style:family="text">
      <style:text-properties style:font-name-asian="Times New Roman" fo:font-weight="bold" style:font-weight-asian="bold" style:font-weight-complex="bold"/>
    </style:style>
    <style:style style:name="T563" style:parent-style-name="Policepardéfaut" style:family="text">
      <style:text-properties style:font-name-asian="Times New Roman"/>
    </style:style>
    <style:style style:name="P564" style:parent-style-name="Normal" style:family="paragraph">
      <style:text-properties style:font-name-asian="Times New Roman" fo:font-size="20pt" style:font-size-asian="20pt" style:font-size-complex="20pt"/>
    </style:style>
    <style:style style:name="P565" style:parent-style-name="Normal" style:family="paragraph">
      <style:text-properties fo:color="#000000"/>
    </style:style>
    <style:style style:name="T566" style:parent-style-name="Policepardéfaut" style:family="text">
      <style:text-properties style:font-name-asian="Times New Roman"/>
    </style:style>
    <style:style style:name="T567" style:parent-style-name="Policepardéfaut" style:family="text">
      <style:text-properties style:font-name-asian="Times New Roman" fo:font-weight="bold" style:font-weight-asian="bold" style:font-weight-complex="bold"/>
    </style:style>
    <style:style style:name="T568" style:parent-style-name="Policepardéfaut" style:family="text">
      <style:text-properties style:font-name-asian="Times New Roman"/>
    </style:style>
    <style:style style:name="T569" style:parent-style-name="Policepardéfaut" style:family="text">
      <style:text-properties style:font-name-asian="Times New Roman"/>
    </style:style>
    <style:style style:name="T570" style:parent-style-name="Policepardéfaut" style:family="text">
      <style:text-properties style:font-name-asian="Times New Roman" fo:font-weight="bold" style:font-weight-asian="bold" style:font-weight-complex="bold"/>
    </style:style>
    <style:style style:name="T571" style:parent-style-name="Policepardéfaut" style:family="text">
      <style:text-properties style:font-name-asian="Times New Roman"/>
    </style:style>
    <style:style style:name="T572" style:parent-style-name="Policepardéfaut" style:family="text">
      <style:text-properties style:font-name-asian="Times New Roman"/>
    </style:style>
    <style:style style:name="T573" style:parent-style-name="Policepardéfaut" style:family="text">
      <style:text-properties style:font-name-asian="Times New Roman" fo:font-weight="bold" style:font-weight-asian="bold" style:font-weight-complex="bold"/>
    </style:style>
    <style:style style:name="T574" style:parent-style-name="Policepardéfaut" style:family="text">
      <style:text-properties style:font-name-asian="Times New Roman"/>
    </style:style>
    <style:style style:name="T575" style:parent-style-name="Policepardéfaut" style:family="text">
      <style:text-properties fo:color="#000000"/>
    </style:style>
    <style:style style:name="T576" style:parent-style-name="Policepardéfaut" style:family="text">
      <style:text-properties fo:color="#000000"/>
    </style:style>
    <style:style style:name="T577" style:parent-style-name="Policepardéfaut" style:family="text">
      <style:text-properties fo:color="#000000"/>
    </style:style>
    <style:style style:name="T578" style:parent-style-name="Policepardéfaut" style:family="text">
      <style:text-properties style:font-name-asian="Times New Roman"/>
    </style:style>
    <style:style style:name="T579" style:parent-style-name="Policepardéfaut" style:family="text">
      <style:text-properties style:font-name-asian="Times New Roman" fo:font-weight="bold" style:font-weight-asian="bold" style:font-weight-complex="bold"/>
    </style:style>
    <style:style style:name="T580" style:parent-style-name="Policepardéfaut" style:family="text">
      <style:text-properties style:font-name-asian="Times New Roman"/>
    </style:style>
    <style:style style:name="T581" style:parent-style-name="Policepardéfaut" style:family="text">
      <style:text-properties style:font-name-asian="Times New Roman" fo:font-weight="bold" style:font-weight-asian="bold" style:font-weight-complex="bold"/>
    </style:style>
    <style:style style:name="T582" style:parent-style-name="Policepardéfaut" style:family="text">
      <style:text-properties style:font-name-asian="Times New Roman"/>
    </style:style>
    <style:style style:name="T583" style:parent-style-name="Policepardéfaut" style:family="text">
      <style:text-properties fo:color="#000000"/>
    </style:style>
    <style:style style:name="P584" style:parent-style-name="Normal" style:family="paragraph">
      <style:text-properties style:font-name-asian="Times New Roman"/>
    </style:style>
    <style:style style:name="T585" style:parent-style-name="Policepardéfaut" style:family="text">
      <style:text-properties style:font-name-asian="Times New Roman"/>
    </style:style>
    <style:style style:name="T586" style:parent-style-name="Policepardéfaut" style:family="text">
      <style:text-properties style:font-name-asian="Times New Roman" fo:font-weight="bold" style:font-weight-asian="bold" style:font-weight-complex="bold"/>
    </style:style>
    <style:style style:name="T587" style:parent-style-name="Policepardéfaut" style:family="text">
      <style:text-properties style:font-name-asian="Times New Roman"/>
    </style:style>
    <style:style style:name="T588" style:parent-style-name="Policepardéfaut" style:family="text">
      <style:text-properties style:font-name-asian="Times New Roman" fo:font-weight="bold" style:font-weight-asian="bold" style:font-weight-complex="bold"/>
    </style:style>
    <style:style style:name="T589" style:parent-style-name="Policepardéfaut" style:family="text">
      <style:text-properties style:font-name-asian="Times New Roman"/>
    </style:style>
    <style:style style:name="T590" style:parent-style-name="Policepardéfaut" style:family="text">
      <style:text-properties style:font-name-asian="Times New Roman"/>
    </style:style>
    <style:style style:name="T591" style:parent-style-name="Policepardéfaut" style:family="text">
      <style:text-properties style:font-name-asian="Times New Roman" fo:font-weight="bold" style:font-weight-asian="bold" style:font-weight-complex="bold"/>
    </style:style>
    <style:style style:name="T592" style:parent-style-name="Policepardéfaut" style:family="text">
      <style:text-properties style:font-name-asian="Times New Roman"/>
    </style:style>
    <style:style style:name="T593" style:parent-style-name="Policepardéfaut" style:family="text">
      <style:text-properties style:font-name-asian="Times New Roman" fo:font-weight="bold" style:font-weight-asian="bold" style:font-weight-complex="bold"/>
    </style:style>
    <style:style style:name="T594" style:parent-style-name="Policepardéfaut" style:family="text">
      <style:text-properties style:font-name-asian="Times New Roman"/>
    </style:style>
    <style:style style:name="T595" style:parent-style-name="Policepardéfaut" style:family="text">
      <style:text-properties style:font-name-asian="Times New Roman"/>
    </style:style>
    <style:style style:name="T596" style:parent-style-name="Policepardéfaut" style:family="text">
      <style:text-properties style:font-name-asian="Times New Roman" fo:font-weight="bold" style:font-weight-asian="bold" style:font-weight-complex="bold"/>
    </style:style>
    <style:style style:name="T597" style:parent-style-name="Policepardéfaut" style:family="text">
      <style:text-properties style:font-name-asian="Times New Roman"/>
    </style:style>
    <style:style style:name="T598" style:parent-style-name="Policepardéfaut" style:family="text">
      <style:text-properties style:font-name-asian="Times New Roman" fo:font-weight="bold" style:font-weight-asian="bold" style:font-weight-complex="bold"/>
    </style:style>
    <style:style style:name="T599" style:parent-style-name="Policepardéfaut" style:family="text">
      <style:text-properties style:font-name-asian="Times New Roman"/>
    </style:style>
    <style:style style:name="P600" style:parent-style-name="Normal" style:family="paragraph">
      <style:text-properties style:font-name-asian="Times New Roman"/>
    </style:style>
    <style:style style:name="T601" style:parent-style-name="Policepardéfaut" style:family="text">
      <style:text-properties fo:color="#000000"/>
    </style:style>
    <style:style style:name="T602" style:parent-style-name="Policepardéfaut" style:family="text">
      <style:text-properties style:font-name-asian="Times New Roman"/>
    </style:style>
    <style:style style:name="T603" style:parent-style-name="Policepardéfaut" style:family="text">
      <style:text-properties style:font-name-asian="Times New Roman" fo:font-weight="bold" style:font-weight-asian="bold" style:font-weight-complex="bold"/>
    </style:style>
    <style:style style:name="T604" style:parent-style-name="Policepardéfaut" style:family="text">
      <style:text-properties style:font-name-asian="Times New Roman"/>
    </style:style>
    <style:style style:name="T605" style:parent-style-name="Policepardéfaut" style:family="text">
      <style:text-properties style:font-name-asian="Times New Roman"/>
    </style:style>
    <style:style style:name="T606" style:parent-style-name="Policepardéfaut" style:family="text">
      <style:text-properties style:font-name-asian="Times New Roman" fo:font-weight="bold" style:font-weight-asian="bold" style:font-weight-complex="bold"/>
    </style:style>
    <style:style style:name="T607" style:parent-style-name="Policepardéfaut" style:family="text">
      <style:text-properties style:font-name-asian="Times New Roman"/>
    </style:style>
    <style:style style:name="P608" style:parent-style-name="Normal" style:family="paragraph">
      <style:text-properties style:font-name-asian="Times New Roman"/>
    </style:style>
    <style:style style:name="T609" style:parent-style-name="Policepardéfaut" style:family="text">
      <style:text-properties fo:color="#000000"/>
    </style:style>
    <style:style style:name="P610" style:parent-style-name="Normal" style:family="paragraph">
      <style:text-properties style:font-name-asian="Times New Roman"/>
    </style:style>
    <style:style style:name="T611" style:parent-style-name="Policepardéfaut" style:family="text">
      <style:text-properties style:font-name-asian="Times New Roman"/>
    </style:style>
    <style:style style:name="T612" style:parent-style-name="Policepardéfaut" style:family="text">
      <style:text-properties style:font-name-asian="Times New Roman" fo:font-weight="bold" style:font-weight-asian="bold" style:font-weight-complex="bold"/>
    </style:style>
    <style:style style:name="T613" style:parent-style-name="Policepardéfaut" style:family="text">
      <style:text-properties style:font-name-asian="Times New Roman"/>
    </style:style>
    <style:style style:name="T614" style:parent-style-name="Policepardéfaut" style:family="text">
      <style:text-properties style:font-name-asian="Times New Roman"/>
    </style:style>
    <style:style style:name="T615" style:parent-style-name="Policepardéfaut" style:family="text">
      <style:text-properties style:font-name-asian="Times New Roman" fo:font-weight="bold" style:font-weight-asian="bold" style:font-weight-complex="bold"/>
    </style:style>
    <style:style style:name="T616" style:parent-style-name="Policepardéfaut" style:family="text">
      <style:text-properties style:font-name-asian="Times New Roman"/>
    </style:style>
    <style:style style:name="P617" style:parent-style-name="Normal" style:family="paragraph">
      <style:text-properties style:font-name-asian="Times New Roman"/>
    </style:style>
    <style:style style:name="T618" style:parent-style-name="Policepardéfaut" style:family="text">
      <style:text-properties style:font-name="Aptos Display" style:font-name-asian="Times New Roman" style:font-name-complex="Times New Roman" fo:font-style="italic" style:font-style-asian="italic" style:font-style-complex="italic" fo:color="#000000" fo:font-size="20pt" style:font-size-asian="20pt" style:font-size-complex="20pt"/>
    </style:style>
    <style:style style:name="T619" style:parent-style-name="Policepardéfaut" style:family="text">
      <style:text-properties style:font-name-asian="Times New Roman"/>
    </style:style>
    <style:style style:name="T620" style:parent-style-name="Policepardéfaut" style:family="text">
      <style:text-properties style:font-name-asian="Times New Roman" fo:font-weight="bold" style:font-weight-asian="bold" style:font-weight-complex="bold"/>
    </style:style>
    <style:style style:name="T621" style:parent-style-name="Policepardéfaut" style:family="text">
      <style:text-properties style:font-name-asian="Times New Roman"/>
    </style:style>
    <style:style style:name="T622" style:parent-style-name="Policepardéfaut" style:family="text">
      <style:text-properties style:font-name-asian="Times New Roman"/>
    </style:style>
    <style:style style:name="T623" style:parent-style-name="Policepardéfaut" style:family="text">
      <style:text-properties style:font-name-asian="Times New Roman"/>
    </style:style>
    <style:style style:name="T624" style:parent-style-name="Policepardéfaut" style:family="text">
      <style:text-properties style:font-name-asian="Times New Roman" fo:font-weight="bold" style:font-weight-asian="bold" style:font-weight-complex="bold"/>
    </style:style>
    <style:style style:name="T625" style:parent-style-name="Policepardéfaut" style:family="text">
      <style:text-properties style:font-name-asian="Times New Roman"/>
    </style:style>
    <style:style style:name="T626" style:parent-style-name="Policepardéfaut" style:family="text">
      <style:text-properties style:font-name-asian="Times New Roman"/>
    </style:style>
    <style:style style:name="T627" style:parent-style-name="Policepardéfaut" style:family="text">
      <style:text-properties style:font-name-asian="Times New Roman" fo:font-weight="bold" style:font-weight-asian="bold" style:font-weight-complex="bold"/>
    </style:style>
    <style:style style:name="T628" style:parent-style-name="Policepardéfaut" style:family="text">
      <style:text-properties style:font-name-asian="Times New Roman"/>
    </style:style>
    <style:style style:name="T629" style:parent-style-name="Policepardéfaut" style:family="text">
      <style:text-properties style:font-name-asian="Times New Roman" fo:font-weight="bold" style:font-weight-asian="bold" style:font-weight-complex="bold"/>
    </style:style>
    <style:style style:name="T630" style:parent-style-name="Policepardéfaut" style:family="text">
      <style:text-properties style:font-name-asian="Times New Roman"/>
    </style:style>
    <style:style style:name="T631" style:parent-style-name="Policepardéfaut" style:family="text">
      <style:text-properties style:font-name-asian="Times New Roman" fo:font-weight="bold" style:font-weight-asian="bold" style:font-weight-complex="bold"/>
    </style:style>
    <style:style style:name="T632" style:parent-style-name="Policepardéfaut" style:family="text">
      <style:text-properties style:font-name-asian="Times New Roman"/>
    </style:style>
    <style:style style:name="T633" style:parent-style-name="Policepardéfaut" style:family="text">
      <style:text-properties style:font-name-asian="Times New Roman" fo:font-weight="bold" style:font-weight-asian="bold" style:font-weight-complex="bold"/>
    </style:style>
    <style:style style:name="T634" style:parent-style-name="Policepardéfaut" style:family="text">
      <style:text-properties style:font-name-asian="Times New Roman"/>
    </style:style>
    <style:style style:name="P635" style:parent-style-name="Normal" style:family="paragraph">
      <style:text-properties style:font-name-asian="Times New Roman"/>
    </style:style>
    <style:style style:name="P636" style:parent-style-name="Normal" style:family="paragraph">
      <style:paragraph-properties fo:text-align="justify"/>
    </style:style>
    <style:style style:name="P637" style:parent-style-name="Normal" style:family="paragraph">
      <style:paragraph-properties fo:text-align="justify"/>
    </style:style>
    <style:style style:name="P638" style:parent-style-name="Titre2" style:list-style-name="LFO23" style:family="paragraph"/>
    <style:style style:name="P639" style:parent-style-name="Sous-titre" style:family="paragraph">
      <style:paragraph-properties fo:text-align="center"/>
    </style:style>
    <style:style style:name="P640" style:parent-style-name="Sous-titre" style:family="paragraph">
      <style:paragraph-properties fo:text-align="center"/>
    </style:style>
    <style:style style:name="P641" style:parent-style-name="Normal" style:family="paragraph">
      <style:paragraph-properties fo:break-before="page"/>
    </style:style>
    <style:style style:name="P642" style:parent-style-name="Titre2" style:list-style-name="LFO23" style:family="paragraph"/>
    <style:style style:name="TableColumn644" style:family="table-column">
      <style:table-column-properties style:column-width="3.1465in"/>
    </style:style>
    <style:style style:name="TableColumn645" style:family="table-column">
      <style:table-column-properties style:column-width="3.1465in"/>
    </style:style>
    <style:style style:name="Table643" style:family="table">
      <style:table-properties style:width="6.293in" fo:margin-left="0in" table:align="left"/>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TableCell648" style:family="table-cell">
      <style:table-cell-properties fo:border="0.0069in solid #000000" style:writing-mode="lr-tb" fo:padding-top="0in" fo:padding-left="0.075in" fo:padding-bottom="0in" fo:padding-right="0.075in"/>
    </style:style>
    <style:style style:name="TableRow649" style:family="table-row">
      <style:table-row-properties/>
    </style:style>
    <style:style style:name="TableCell650" style:family="table-cell">
      <style:table-cell-properties fo:border="0.0069in solid #000000" style:writing-mode="lr-tb" fo:padding-top="0in" fo:padding-left="0.075in" fo:padding-bottom="0in" fo:padding-right="0.075in"/>
    </style:style>
    <style:style style:name="TableCell651" style:family="table-cell">
      <style:table-cell-properties fo:border="0.0069in solid #000000" style:writing-mode="lr-tb" fo:padding-top="0in" fo:padding-left="0.075in" fo:padding-bottom="0in" fo:padding-right="0.075in"/>
    </style:style>
    <style:style style:name="TableRow652" style:family="table-row">
      <style:table-row-properties/>
    </style:style>
    <style:style style:name="TableCell653" style:family="table-cell">
      <style:table-cell-properties fo:border="0.0069in solid #000000" style:writing-mode="lr-tb" fo:padding-top="0in" fo:padding-left="0.075in" fo:padding-bottom="0in" fo:padding-right="0.075in"/>
    </style:style>
    <style:style style:name="TableCell654" style:family="table-cell">
      <style:table-cell-properties fo:border="0.0069in solid #000000" style:writing-mode="lr-tb" fo:padding-top="0in" fo:padding-left="0.075in" fo:padding-bottom="0in" fo:padding-right="0.075in"/>
    </style:style>
    <style:style style:name="TableRow655" style:family="table-row">
      <style:table-row-properties/>
    </style:style>
    <style:style style:name="TableCell656" style:family="table-cell">
      <style:table-cell-properties fo:border="0.0069in solid #000000" style:writing-mode="lr-tb" fo:padding-top="0in" fo:padding-left="0.075in" fo:padding-bottom="0in" fo:padding-right="0.075in"/>
    </style:style>
    <style:style style:name="TableCell657" style:family="table-cell">
      <style:table-cell-properties fo:border="0.0069in solid #000000" style:writing-mode="lr-tb" fo:padding-top="0in" fo:padding-left="0.075in" fo:padding-bottom="0in" fo:padding-right="0.075in"/>
    </style:style>
    <style:style style:name="P658" style:parent-style-name="Sous-titre" style:family="paragraph">
      <style:paragraph-properties fo:text-align="center"/>
    </style:style>
    <style:style style:name="P659" style:parent-style-name="Normal" style:family="paragraph">
      <style:paragraph-properties fo:text-align="center"/>
    </style:style>
    <style:style style:name="P660" style:parent-style-name="Sous-titre" style:family="paragraph">
      <style:paragraph-properties fo:text-align="center"/>
    </style:style>
    <style:style style:name="P661" style:parent-style-name="Normal" style:family="paragraph">
      <style:paragraph-properties fo:break-before="page"/>
    </style:style>
    <style:style style:name="P662" style:parent-style-name="Titre2" style:list-style-name="LFO23" style:family="paragraph"/>
    <style:style style:name="TableColumn664" style:family="table-column">
      <style:table-column-properties style:column-width="1.3333in"/>
    </style:style>
    <style:style style:name="TableColumn665" style:family="table-column">
      <style:table-column-properties style:column-width="2.8791in"/>
    </style:style>
    <style:style style:name="TableColumn666" style:family="table-column">
      <style:table-column-properties style:column-width="2.2625in"/>
    </style:style>
    <style:style style:name="Table663" style:family="table">
      <style:table-properties style:width="6.475in" fo:margin-left="0in" table:align="left"/>
    </style:style>
    <style:style style:name="TableRow667" style:family="table-row">
      <style:table-row-properties style:min-row-height="0.2201in"/>
    </style:style>
    <style:style style:name="TableCell668" style:family="table-cell">
      <style:table-cell-properties fo:border-top="0.0069in solid #44B3E1" fo:border-left="0.0069in solid #44B3E1" fo:border-bottom="0.0069in solid #44B3E1" fo:border-right="none" fo:background-color="#156082" style:writing-mode="lr-tb" style:vertical-align="bottom" fo:padding-top="0in" fo:padding-left="0.0486in" fo:padding-bottom="0in" fo:padding-right="0.0486in" fo:wrap-option="no-wrap">
        <style:background-fill draw:fill="solid" draw:fill-color="#156082"/>
      </style:table-cell-properties>
    </style:style>
    <style:style style:name="P669" style:parent-style-name="Normal" style:family="paragraph">
      <style:text-properties style:font-name="Aptos Narrow" fo:font-weight="bold" style:font-weight-asian="bold" style:font-weight-complex="bold" fo:color="#FFFFFF" style:language-asian="fr" style:country-asian="FR"/>
    </style:style>
    <style:style style:name="TableCell670" style:family="table-cell">
      <style:table-cell-properties fo:border-top="0.0069in solid #44B3E1" fo:border-left="none" fo:border-bottom="0.0069in solid #44B3E1" fo:border-right="none" fo:background-color="#156082" style:writing-mode="lr-tb" style:vertical-align="bottom" fo:padding-top="0in" fo:padding-left="0.0486in" fo:padding-bottom="0in" fo:padding-right="0.0486in" fo:wrap-option="no-wrap">
        <style:background-fill draw:fill="solid" draw:fill-color="#156082"/>
      </style:table-cell-properties>
    </style:style>
    <style:style style:name="P671" style:parent-style-name="Normal" style:family="paragraph">
      <style:text-properties style:font-name="Aptos Narrow" fo:font-weight="bold" style:font-weight-asian="bold" style:font-weight-complex="bold" fo:color="#FFFFFF" style:language-asian="fr" style:country-asian="FR"/>
    </style:style>
    <style:style style:name="TableCell672" style:family="table-cell">
      <style:table-cell-properties fo:border-top="0.0069in solid #44B3E1" fo:border-left="none" fo:border-bottom="0.0069in solid #44B3E1" fo:border-right="none" fo:background-color="#156082" style:writing-mode="lr-tb" style:vertical-align="bottom" fo:padding-top="0in" fo:padding-left="0.0486in" fo:padding-bottom="0in" fo:padding-right="0.0486in" fo:wrap-option="no-wrap">
        <style:background-fill draw:fill="solid" draw:fill-color="#156082"/>
      </style:table-cell-properties>
    </style:style>
    <style:style style:name="P673" style:parent-style-name="Normal" style:family="paragraph">
      <style:text-properties style:font-name="Aptos Narrow" fo:font-weight="bold" style:font-weight-asian="bold" style:font-weight-complex="bold" fo:color="#FFFFFF" style:language-asian="fr" style:country-asian="FR"/>
    </style:style>
    <style:style style:name="TableRow674" style:family="table-row">
      <style:table-row-properties style:min-row-height="0.2201in"/>
    </style:style>
    <style:style style:name="TableCell675" style:family="table-cell">
      <style:table-cell-properties fo:border-top="0.0069in solid #44B3E1" fo:border-left="0.0069in solid #44B3E1" fo:border-bottom="0.0069in solid #44B3E1" fo:border-right="none" fo:background-color="#C0E6F5" style:writing-mode="lr-tb" style:vertical-align="bottom" fo:padding-top="0in" fo:padding-left="0.0486in" fo:padding-bottom="0in" fo:padding-right="0.0486in" fo:wrap-option="no-wrap">
        <style:background-fill draw:fill="solid" draw:fill-color="#C0E6F5"/>
      </style:table-cell-properties>
    </style:style>
    <style:style style:name="P676" style:parent-style-name="Normal" style:family="paragraph">
      <style:text-properties style:font-name="Aptos Narrow" fo:color="#000000" style:language-asian="fr" style:country-asian="FR"/>
    </style:style>
    <style:style style:name="TableCell677" style:family="table-cell">
      <style:table-cell-properties fo:border-top="0.0069in solid #44B3E1" fo:border-left="none" fo:border-bottom="0.0069in solid #44B3E1" fo:border-right="none" fo:background-color="#C0E6F5" style:writing-mode="lr-tb" style:vertical-align="bottom" fo:padding-top="0in" fo:padding-left="0.0486in" fo:padding-bottom="0in" fo:padding-right="0.0486in" fo:wrap-option="no-wrap">
        <style:background-fill draw:fill="solid" draw:fill-color="#C0E6F5"/>
      </style:table-cell-properties>
    </style:style>
    <style:style style:name="P678" style:parent-style-name="Normal" style:family="paragraph">
      <style:paragraph-properties fo:text-align="end"/>
      <style:text-properties style:font-name="Aptos Narrow" fo:color="#000000" style:language-asian="fr" style:country-asian="FR"/>
    </style:style>
    <style:style style:name="TableCell679" style:family="table-cell">
      <style:table-cell-properties fo:border-top="0.0069in solid #44B3E1" fo:border-left="none" fo:border-bottom="0.0069in solid #44B3E1" fo:border-right="none" fo:background-color="#C0E6F5" style:writing-mode="lr-tb" style:vertical-align="bottom" fo:padding-top="0in" fo:padding-left="0.0486in" fo:padding-bottom="0in" fo:padding-right="0.0486in" fo:wrap-option="no-wrap">
        <style:background-fill draw:fill="solid" draw:fill-color="#C0E6F5"/>
      </style:table-cell-properties>
    </style:style>
    <style:style style:name="P680" style:parent-style-name="Normal" style:family="paragraph">
      <style:paragraph-properties fo:text-align="end"/>
      <style:text-properties style:font-name="Aptos Narrow" fo:color="#000000" style:language-asian="fr" style:country-asian="FR"/>
    </style:style>
    <style:style style:name="TableRow681" style:family="table-row">
      <style:table-row-properties style:min-row-height="0.2201in"/>
    </style:style>
    <style:style style:name="TableCell682" style:family="table-cell">
      <style:table-cell-properties fo:border-top="0.0069in solid #44B3E1" fo:border-left="0.0069in solid #44B3E1" fo:border-bottom="0.0069in solid #44B3E1" fo:border-right="none" style:writing-mode="lr-tb" style:vertical-align="bottom" fo:padding-top="0in" fo:padding-left="0.0486in" fo:padding-bottom="0in" fo:padding-right="0.0486in" fo:wrap-option="no-wrap"/>
    </style:style>
    <style:style style:name="P683" style:parent-style-name="Normal" style:family="paragraph">
      <style:text-properties style:font-name="Aptos Narrow" fo:color="#000000" style:language-asian="fr" style:country-asian="FR"/>
    </style:style>
    <style:style style:name="TableCell684" style:family="table-cell">
      <style:table-cell-properties fo:border-top="0.0069in solid #44B3E1" fo:border-left="none" fo:border-bottom="0.0069in solid #44B3E1" fo:border-right="none" style:writing-mode="lr-tb" style:vertical-align="bottom" fo:padding-top="0in" fo:padding-left="0.0486in" fo:padding-bottom="0in" fo:padding-right="0.0486in" fo:wrap-option="no-wrap"/>
    </style:style>
    <style:style style:name="P685" style:parent-style-name="Normal" style:family="paragraph">
      <style:paragraph-properties fo:text-align="end"/>
      <style:text-properties style:font-name="Aptos Narrow" fo:color="#000000" style:language-asian="fr" style:country-asian="FR"/>
    </style:style>
    <style:style style:name="TableCell686" style:family="table-cell">
      <style:table-cell-properties fo:border-top="0.0069in solid #44B3E1" fo:border-left="none" fo:border-bottom="0.0069in solid #44B3E1" fo:border-right="none" style:writing-mode="lr-tb" style:vertical-align="bottom" fo:padding-top="0in" fo:padding-left="0.0486in" fo:padding-bottom="0in" fo:padding-right="0.0486in" fo:wrap-option="no-wrap"/>
    </style:style>
    <style:style style:name="P687" style:parent-style-name="Normal" style:family="paragraph">
      <style:paragraph-properties fo:text-align="end"/>
      <style:text-properties style:font-name="Aptos Narrow" fo:color="#000000" style:language-asian="fr" style:country-asian="FR"/>
    </style:style>
    <style:style style:name="TableRow688" style:family="table-row">
      <style:table-row-properties style:min-row-height="0.2201in"/>
    </style:style>
    <style:style style:name="TableCell689" style:family="table-cell">
      <style:table-cell-properties fo:border-top="0.0069in solid #44B3E1" fo:border-left="0.0069in solid #44B3E1" fo:border-bottom="0.0069in solid #44B3E1" fo:border-right="none" fo:background-color="#C0E6F5" style:writing-mode="lr-tb" style:vertical-align="bottom" fo:padding-top="0in" fo:padding-left="0.0486in" fo:padding-bottom="0in" fo:padding-right="0.0486in" fo:wrap-option="no-wrap">
        <style:background-fill draw:fill="solid" draw:fill-color="#C0E6F5"/>
      </style:table-cell-properties>
    </style:style>
    <style:style style:name="P690" style:parent-style-name="Normal" style:family="paragraph">
      <style:text-properties style:font-name="Aptos Narrow" fo:color="#000000" style:language-asian="fr" style:country-asian="FR"/>
    </style:style>
    <style:style style:name="TableCell691" style:family="table-cell">
      <style:table-cell-properties fo:border-top="0.0069in solid #44B3E1" fo:border-left="none" fo:border-bottom="0.0069in solid #44B3E1" fo:border-right="none" fo:background-color="#C0E6F5" style:writing-mode="lr-tb" style:vertical-align="bottom" fo:padding-top="0in" fo:padding-left="0.0486in" fo:padding-bottom="0in" fo:padding-right="0.0486in" fo:wrap-option="no-wrap">
        <style:background-fill draw:fill="solid" draw:fill-color="#C0E6F5"/>
      </style:table-cell-properties>
    </style:style>
    <style:style style:name="P692" style:parent-style-name="Normal" style:family="paragraph">
      <style:paragraph-properties fo:text-align="end"/>
      <style:text-properties style:font-name="Aptos Narrow" fo:color="#000000" style:language-asian="fr" style:country-asian="FR"/>
    </style:style>
    <style:style style:name="TableCell693" style:family="table-cell">
      <style:table-cell-properties fo:border-top="0.0069in solid #44B3E1" fo:border-left="none" fo:border-bottom="0.0069in solid #44B3E1" fo:border-right="none" fo:background-color="#C0E6F5" style:writing-mode="lr-tb" style:vertical-align="bottom" fo:padding-top="0in" fo:padding-left="0.0486in" fo:padding-bottom="0in" fo:padding-right="0.0486in" fo:wrap-option="no-wrap">
        <style:background-fill draw:fill="solid" draw:fill-color="#C0E6F5"/>
      </style:table-cell-properties>
    </style:style>
    <style:style style:name="P694" style:parent-style-name="Normal" style:family="paragraph">
      <style:paragraph-properties fo:text-align="end"/>
      <style:text-properties style:font-name="Aptos Narrow" fo:color="#000000" style:language-asian="fr" style:country-asian="FR"/>
    </style:style>
    <style:style style:name="TableRow695" style:family="table-row">
      <style:table-row-properties style:min-row-height="0.2201in"/>
    </style:style>
    <style:style style:name="TableCell696" style:family="table-cell">
      <style:table-cell-properties fo:border-top="0.0069in solid #44B3E1" fo:border-left="0.0069in solid #44B3E1" fo:border-bottom="0.0069in solid #44B3E1" fo:border-right="none" style:writing-mode="lr-tb" style:vertical-align="bottom" fo:padding-top="0in" fo:padding-left="0.0486in" fo:padding-bottom="0in" fo:padding-right="0.0486in" fo:wrap-option="no-wrap"/>
    </style:style>
    <style:style style:name="P697" style:parent-style-name="Normal" style:family="paragraph">
      <style:text-properties style:font-name="Aptos Narrow" fo:color="#000000" style:language-asian="fr" style:country-asian="FR"/>
    </style:style>
    <style:style style:name="TableCell698" style:family="table-cell">
      <style:table-cell-properties fo:border-top="0.0069in solid #44B3E1" fo:border-left="none" fo:border-bottom="0.0069in solid #44B3E1" fo:border-right="none" style:writing-mode="lr-tb" style:vertical-align="bottom" fo:padding-top="0in" fo:padding-left="0.0486in" fo:padding-bottom="0in" fo:padding-right="0.0486in" fo:wrap-option="no-wrap"/>
    </style:style>
    <style:style style:name="P699" style:parent-style-name="Normal" style:family="paragraph">
      <style:paragraph-properties fo:text-align="end"/>
      <style:text-properties style:font-name="Aptos Narrow" fo:color="#000000" style:language-asian="fr" style:country-asian="FR"/>
    </style:style>
    <style:style style:name="TableCell700" style:family="table-cell">
      <style:table-cell-properties fo:border-top="0.0069in solid #44B3E1" fo:border-left="none" fo:border-bottom="0.0069in solid #44B3E1" fo:border-right="none" style:writing-mode="lr-tb" style:vertical-align="bottom" fo:padding-top="0in" fo:padding-left="0.0486in" fo:padding-bottom="0in" fo:padding-right="0.0486in" fo:wrap-option="no-wrap"/>
    </style:style>
    <style:style style:name="P701" style:parent-style-name="Normal" style:family="paragraph">
      <style:paragraph-properties fo:text-align="end"/>
      <style:text-properties style:font-name="Aptos Narrow" fo:color="#000000" style:language-asian="fr" style:country-asian="FR"/>
    </style:style>
    <style:style style:name="P702" style:parent-style-name="Sous-titre" style:family="paragraph">
      <style:paragraph-properties fo:text-align="center"/>
    </style:style>
    <style:style style:name="P703" style:parent-style-name="Normal" style:family="paragraph">
      <style:text-properties fo:font-style="italic" style:font-style-asian="italic" style:font-style-complex="italic"/>
    </style:style>
    <style:style style:name="T704" style:parent-style-name="Policepardéfaut" style:family="text">
      <style:text-properties fo:font-weight="bold" style:font-weight-asian="bold" style:font-weight-complex="bold"/>
    </style:style>
    <style:style style:name="T705" style:parent-style-name="Policepardéfaut" style:family="text">
      <style:text-properties fo:font-weight="bold" style:font-weight-asian="bold" style:font-weight-complex="bold"/>
    </style:style>
    <style:style style:name="T706" style:parent-style-name="Policepardéfaut" style:family="text">
      <style:text-properties fo:font-weight="bold" style:font-weight-asian="bold" style:font-weight-complex="bold"/>
    </style:style>
    <style:style style:name="T707" style:parent-style-name="Policepardéfaut" style:family="text">
      <style:text-properties fo:font-weight="bold" style:font-weight-asian="bold" style:font-weight-complex="bold"/>
    </style:style>
    <style:style style:name="T708" style:parent-style-name="Policepardéfaut" style:family="text">
      <style:text-properties fo:font-weight="bold" style:font-weight-asian="bold" style:font-weight-complex="bold"/>
    </style:style>
    <style:style style:name="T709" style:parent-style-name="Policepardéfaut" style:family="text">
      <style:text-properties fo:font-weight="bold" style:font-weight-asian="bold" style:font-weight-complex="bold"/>
    </style:style>
    <style:style style:name="T710" style:parent-style-name="Policepardéfaut" style:family="text">
      <style:text-properties fo:font-weight="bold" style:font-weight-asian="bold" style:font-weight-complex="bold"/>
    </style:style>
    <style:style style:name="T711" style:parent-style-name="Policepardéfaut" style:family="text">
      <style:text-properties fo:font-weight="bold" style:font-weight-asian="bold" style:font-weight-complex="bold"/>
    </style:style>
    <style:style style:name="T712" style:parent-style-name="Policepardéfaut" style:family="text">
      <style:text-properties fo:font-weight="bold" style:font-weight-asian="bold" style:font-weight-complex="bold"/>
    </style:style>
    <style:style style:family="graphic" style:name="a20">
      <style:graphic-properties/>
    </style:style>
    <style:style style:family="graphic" style:name="a21">
      <style:graphic-properties/>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graphic-properties/>
    </style:style>
    <style:style style:family="graphic" style:name="a19">
      <style:graphic-properties/>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
      <style:graphic-properties style:wrap="none" draw:fill="solid" draw:fill-color="#000000" draw:opacity="100%" draw:stroke="none" style:horizontal-rel="page-content" style:vertical-rel="paragraph" style:horizontal-pos="left" style:vertical-pos="from-top"/>
    </style:style>
    <style:style style:family="graphic" style:name="a2">
      <style:graphic-properties style:wrap="none" draw:fill="solid" draw:fill-color="#000000" draw:opacity="100%" draw:stroke="none" style:horizontal-rel="page-content" style:vertical-rel="paragraph" style:horizontal-pos="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2"><draw:frame draw:z-index="251659264" draw:style-name="a0" draw:name="Image 18" text:anchor-type="paragraph" svg:x="0in" svg:y="0in" svg:width="2.50069in" svg:height="0.96181in" style:rel-width="scale" style:rel-height="scale"><draw:image xlink:href="media/image1.png" xlink:type="simple" xlink:show="embed" xlink:actuate="onLoad"/><svg:title/><svg:desc>Une image contenant texte, cercle, Graphique, capture d’écran

Le contenu généré par l’IA peut être incorrect.</svg:desc></draw:frame></text:span><text:span text:style-name="T3">Département Informatique</text:span></text:p>
      <text:p text:style-name="P4">71 rue Peter Fink</text:p>
      <text:p text:style-name="P5">01000 Bourg-en-Bresse</text:p>
      <text:p text:style-name="P6">04 74 45 50 59</text:p>
      <text:p text:style-name="Normal"/>
      <text:p text:style-name="P7"><text:tab/></text:p>
      <text:p text:style-name="P8"/>
      <text:p text:style-name="P9"/>
      <text:p text:style-name="P10"/>
      <text:p text:style-name="P11"/>
      <text:p text:style-name="P12"/>
      <text:p text:style-name="Normal"><text:span text:style-name="T13"><draw:custom-shape svg:x="0in" svg:y="0.32639in" svg:width="6.33889in" svg:height="0.04167in" draw:z-index="251663360" draw:id="id0" draw:style-name="a1" draw:name="Graphic 4" text:anchor-type="paragraph"><svg:title/><svg:desc/><draw:enhanced-geometry draw:type="non-primitive" svg:viewBox="0 0 5796915 38100" draw:enhanced-path="M ?f3 ?f0 L ?f0 ?f0 ?f0 ?f2 ?f3 ?f2 ?f3 ?f0 Z N" draw:text-areas="?f8 ?f10 ?f9 ?f11"><draw:equation draw:name="f0" draw:formula="0"/><draw:equation draw:name="f1" draw:formula="5796915"/><draw:equation draw:name="f2" draw:formula="38100"/><draw:equation draw:name="f3" draw:formula="5796660"/><draw:equation draw:name="f4" draw:formula="?f2 - ?f0"/><draw:equation draw:name="f5" draw:formula="?f1 - ?f0"/><draw:equation draw:name="f6" draw:formula="?f5 / 5796915"/><draw:equation draw:name="f7" draw:formula="?f4 / 38100"/><draw:equation draw:name="f8" draw:formula="?f0 / ?f6"/><draw:equation draw:name="f9" draw:formula="?f1 / ?f6"/><draw:equation draw:name="f10" draw:formula="?f0 / ?f7"/><draw:equation draw:name="f11" draw:formula="?f2 / ?f7"/></draw:enhanced-geometry></draw:custom-shape></text:span></text:p>
      <text:p text:style-name="P14"/>
      <text:p text:style-name="P15"/>
      <text:p text:style-name="P16"><text:s text:c="13"/>L’ÉNERGIE EN FRANCE :</text:p>
      <text:p text:style-name="P17"><text:span text:style-name="T18"><draw:custom-shape svg:x="0in" svg:y="0.72292in" svg:width="6.33889in" svg:height="0.04167in" draw:z-index="251661312" draw:id="id1" draw:style-name="a2" draw:name="Graphic 5" text:anchor-type="paragraph"><svg:title/><svg:desc/><draw:enhanced-geometry draw:type="non-primitive" svg:viewBox="0 0 5796915 38100" draw:enhanced-path="M ?f3 ?f0 L ?f0 ?f0 ?f0 ?f2 ?f3 ?f2 ?f3 ?f0 Z N" draw:text-areas="?f8 ?f10 ?f9 ?f11"><draw:equation draw:name="f0" draw:formula="0"/><draw:equation draw:name="f1" draw:formula="5796915"/><draw:equation draw:name="f2" draw:formula="38100"/><draw:equation draw:name="f3" draw:formula="5796660"/><draw:equation draw:name="f4" draw:formula="?f2 - ?f0"/><draw:equation draw:name="f5" draw:formula="?f1 - ?f0"/><draw:equation draw:name="f6" draw:formula="?f5 / 5796915"/><draw:equation draw:name="f7" draw:formula="?f4 / 38100"/><draw:equation draw:name="f8" draw:formula="?f0 / ?f6"/><draw:equation draw:name="f9" draw:formula="?f1 / ?f6"/><draw:equation draw:name="f10" draw:formula="?f0 / ?f7"/><draw:equation draw:name="f11" draw:formula="?f2 / ?f7"/></draw:enhanced-geometry></draw:custom-shape></text:span>Production, consommation et impact environnemental (2006-2022)<text:span text:style-name="T19"><text:s/></text:span></text:p>
      <text:p text:style-name="Normal"/>
      <text:p text:style-name="Normal"/>
      <text:p text:style-name="Normal"/>
      <text:p text:style-name="P20">Réalisé Par :</text:p>
      <text:list text:style-name="LFO1" text:continue-numbering="true">
        <text:list-item>
          <text:p text:style-name="P21">Noa MOAL</text:p>
        </text:list-item>
        <text:list-item>
          <text:p text:style-name="P22">Adam<text:s/>BOUNOUARA</text:p>
        </text:list-item>
        <text:list-item>
          <text:p text:style-name="P23">Dylan Valenza</text:p>
        </text:list-item>
      </text:list>
      <text:p text:style-name="P24">Encadrante : Mme BERGER</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Année universitaire : 2025-2026</text:p>
      <text:p text:style-name="P40">Date de rendu : 11 mai 2026</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1"><text:a xlink:href="#_Toc229338101" office:target-frame-name="_top" xlink:show="replace"><text:span text:style-name="Lienhypertexte">Introduction :</text:span><text:tab/>2</text:a></text:p>
          <text:p text:style-name="P42"><text:a xlink:href="#_Toc229338102" office:target-frame-name="_top" xlink:show="replace"><text:span text:style-name="Lienhypertexte">1.</text:span><text:tab/><text:span text:style-name="Lienhypertexte">Présentation des données et méthodologie</text:span><text:tab/>3</text:a></text:p>
          <text:p text:style-name="P43"><text:a xlink:href="#_Toc229338103" office:target-frame-name="_top" xlink:show="replace"><text:span text:style-name="Lienhypertexte">1.1</text:span><text:tab/><text:span text:style-name="Lienhypertexte">Sources</text:span><text:tab/>3</text:a></text:p>
          <text:p text:style-name="P44"><text:a xlink:href="#_Toc229338104" office:target-frame-name="_top" xlink:show="replace"><text:span text:style-name="Lienhypertexte">1.2</text:span><text:tab/><text:span text:style-name="Lienhypertexte">Traitements communs effectués</text:span><text:tab/>3</text:a></text:p>
          <text:p text:style-name="P45"><text:a xlink:href="#_Toc229338105" office:target-frame-name="_top" xlink:show="replace"><text:span text:style-name="Lienhypertexte">1.3</text:span><text:tab/><text:span text:style-name="Lienhypertexte">Outils utilisés</text:span><text:tab/>3</text:a></text:p>
          <text:p text:style-name="P46"><text:a xlink:href="#_Toc229338106" office:target-frame-name="_top" xlink:show="replace"><text:span text:style-name="Lienhypertexte">1.4</text:span><text:tab/><text:span text:style-name="Lienhypertexte">Période d’étude</text:span><text:tab/>3</text:a></text:p>
          <text:p text:style-name="P47"><text:a xlink:href="#_Toc229338107" office:target-frame-name="_top" xlink:show="replace"><text:span text:style-name="Lienhypertexte">PARTIE A – La production d’électricité en France (2006-2022)</text:span><text:tab/>4</text:a></text:p>
          <text:p text:style-name="P48"><text:a xlink:href="#_Toc229338108" office:target-frame-name="_top" xlink:show="replace"><text:span text:style-name="Lienhypertexte">1.</text:span><text:tab/><text:span text:style-name="Lienhypertexte">Présentation et traitement des données</text:span><text:tab/>4</text:a></text:p>
          <text:p text:style-name="P49"><text:a xlink:href="#_Toc229338109" office:target-frame-name="_top" xlink:show="replace"><text:span text:style-name="Lienhypertexte">1.1</text:span><text:tab/><text:span text:style-name="Lienhypertexte">Source et structure</text:span><text:tab/>4</text:a></text:p>
          <text:p text:style-name="P50"><text:a xlink:href="#_Toc229338110" office:target-frame-name="_top" xlink:show="replace"><text:span text:style-name="Lienhypertexte">1.2</text:span><text:tab/><text:span text:style-name="Lienhypertexte">Traitement effectué</text:span><text:tab/>4</text:a></text:p>
          <text:p text:style-name="P51"><text:a xlink:href="#_Toc229338111" office:target-frame-name="_top" xlink:show="replace"><text:span text:style-name="Lienhypertexte">2.</text:span><text:tab/><text:span text:style-name="Lienhypertexte">Analyse statistique à une variable</text:span><text:tab/>4</text:a></text:p>
          <text:p text:style-name="P52"><text:a xlink:href="#_Toc229338112" office:target-frame-name="_top" xlink:show="replace"><text:span text:style-name="Lienhypertexte">2.1</text:span><text:tab/><text:span text:style-name="Lienhypertexte">Indicateurs par source</text:span><text:tab/>4</text:a></text:p>
          <text:p text:style-name="P53"><text:a xlink:href="#_Toc229338113" office:target-frame-name="_top" xlink:show="replace"><text:span text:style-name="Lienhypertexte">2.2</text:span><text:tab/><text:span text:style-name="Lienhypertexte">Distribution saisonnière et annuelle des productions</text:span><text:tab/>4</text:a></text:p>
          <text:p text:style-name="P54"><text:a xlink:href="#_Toc229338114" office:target-frame-name="_top" xlink:show="replace"><text:span text:style-name="Lienhypertexte">3.</text:span><text:tab/><text:span text:style-name="Lienhypertexte">Évolution temporel de la production électrique</text:span><text:tab/>5</text:a></text:p>
          <text:p text:style-name="P55"><text:a xlink:href="#_Toc229338115" office:target-frame-name="_top" xlink:show="replace"><text:span text:style-name="Lienhypertexte">3.1</text:span><text:tab/><text:span text:style-name="Lienhypertexte">Évolution mensuelle des énergies renouvelables (Hydro, Éolien, Solaire)</text:span><text:tab/>5</text:a></text:p>
          <text:p text:style-name="P56"><text:a xlink:href="#_Toc229338116" office:target-frame-name="_top" xlink:show="replace"><text:span text:style-name="Lienhypertexte">3.2</text:span><text:tab/><text:span text:style-name="Lienhypertexte">Évolution mensuelle de la production nucléaire</text:span><text:tab/>5</text:a></text:p>
          <text:p text:style-name="P57"><text:a xlink:href="#_Toc229338117" office:target-frame-name="_top" xlink:show="replace"><text:span text:style-name="Lienhypertexte">3.3</text:span><text:tab/><text:span text:style-name="Lienhypertexte">Évolution annuelle du mix de production</text:span><text:tab/>5</text:a></text:p>
          <text:p text:style-name="P58"><text:a xlink:href="#_Toc229338118" office:target-frame-name="_top" xlink:show="replace"><text:span text:style-name="Lienhypertexte">3.4</text:span><text:tab/><text:span text:style-name="Lienhypertexte">Synthèse de l’évolution temporelle</text:span><text:tab/>5</text:a></text:p>
          <text:p text:style-name="P59"><text:a xlink:href="#_Toc229338119" office:target-frame-name="_top" xlink:show="replace"><text:span text:style-name="Lienhypertexte">4.</text:span><text:tab/><text:span text:style-name="Lienhypertexte">Le mix de production électrique français</text:span><text:tab/>5</text:a></text:p>
          <text:p text:style-name="P60"><text:a xlink:href="#_Toc229338120" office:target-frame-name="_top" xlink:show="replace"><text:span text:style-name="Lienhypertexte">4.1 Répartition moyenne par source</text:span><text:tab/>5</text:a></text:p>
          <text:p text:style-name="P61"><text:a xlink:href="#_Toc229338121" office:target-frame-name="_top" xlink:show="replace"><text:span text:style-name="Lienhypertexte">4.2 Mise en perspective : un mix bas-carbone</text:span><text:tab/>6</text:a></text:p>
          <text:p text:style-name="P62"><text:a xlink:href="#_Toc229338122" office:target-frame-name="_top" xlink:show="replace"><text:span text:style-name="Lienhypertexte">5.</text:span><text:tab/><text:span text:style-name="Lienhypertexte">Conclusion de la Partie A</text:span><text:tab/>7</text:a></text:p>
          <text:p text:style-name="P63"><text:a xlink:href="#_Toc229338123" office:target-frame-name="_top" xlink:show="replace"><text:span text:style-name="Lienhypertexte">PARTIE B – La consommation électrique et sa thermo sensibilité (2011-2022)</text:span><text:tab/>9</text:a></text:p>
          <text:p text:style-name="P64"><text:a xlink:href="#_Toc229338124" office:target-frame-name="_top" xlink:show="replace"><text:span text:style-name="Lienhypertexte">1. Présentation et traitement des données</text:span><text:tab/>9</text:a></text:p>
          <text:p text:style-name="P65"><text:a xlink:href="#_Toc229338125" office:target-frame-name="_top" xlink:show="replace"><text:span text:style-name="Lienhypertexte">1.1 Source et structure</text:span><text:tab/>9</text:a></text:p>
          <text:p text:style-name="P66"><text:a xlink:href="#_Toc229338126" office:target-frame-name="_top" xlink:show="replace"><text:span text:style-name="Lienhypertexte">1.2 Traitement effectué</text:span><text:tab/>9</text:a></text:p>
          <text:p text:style-name="P67"><text:a xlink:href="#_Toc229338127" office:target-frame-name="_top" xlink:show="replace"><text:span text:style-name="Lienhypertexte">2. Évolution temporelle de la consommation et du climat</text:span><text:tab/>9</text:a></text:p>
          <text:p text:style-name="P68"><text:a xlink:href="#_Toc229338128" office:target-frame-name="_top" xlink:show="replace"><text:span text:style-name="Lienhypertexte">3. Corrélation et modélisation de la thermo sensibilité</text:span><text:tab/>11</text:a></text:p>
          <text:p text:style-name="P69"><text:a xlink:href="#_Toc229338129" office:target-frame-name="_top" xlink:show="replace"><text:span text:style-name="Lienhypertexte">4. Analyse de la saisonnalité et des risques de dispersion</text:span><text:tab/>12</text:a></text:p>
          <text:p text:style-name="P70"><text:a xlink:href="#_Toc229338130" office:target-frame-name="_top" xlink:show="replace"><text:span text:style-name="Lienhypertexte">4.1 Le profil de charge mensuel</text:span><text:tab/>12</text:a></text:p>
          <text:p text:style-name="P71"><text:a xlink:href="#_Toc229338131" office:target-frame-name="_top" xlink:show="replace"><text:span text:style-name="Lienhypertexte">4.2 L'étude de la variabilité (Diagramme en boîtes)</text:span><text:tab/>12</text:a></text:p>
          <text:p text:style-name="P72"><text:a xlink:href="#_Toc229338132" office:target-frame-name="_top" xlink:show="replace"><text:span text:style-name="Lienhypertexte">4.3 Synthèse des indicateurs statistiques</text:span><text:tab/>13</text:a></text:p>
          <text:p text:style-name="P73"><text:a xlink:href="#_Toc229338133" office:target-frame-name="_top" xlink:show="replace"><text:span text:style-name="Lienhypertexte">5. Conclusion de la Partie B</text:span><text:tab/>14</text:a></text:p>
          <text:p text:style-name="P74"><text:a xlink:href="#_Toc229338134" office:target-frame-name="_top" xlink:show="replace"><text:span text:style-name="Lienhypertexte">Partie C : Mix énergétique, indépendance et CO2</text:span><text:tab/>15</text:a></text:p>
          <text:p text:style-name="P75"><text:a xlink:href="#_Toc229338135" office:target-frame-name="_top" xlink:show="replace"><text:span text:style-name="Lienhypertexte">1.</text:span><text:tab/><text:span text:style-name="Lienhypertexte">Observation du mix énergétique</text:span><text:tab/>15</text:a></text:p>
          <text:p text:style-name="P76"><text:a xlink:href="#_Toc229338136" office:target-frame-name="_top" xlink:show="replace"><text:span text:style-name="Lienhypertexte">2.</text:span><text:tab/><text:span text:style-name="Lienhypertexte">Indépendance énergétique et flux commerciaux</text:span><text:tab/>17</text:a></text:p>
          <text:p text:style-name="P77"><text:a xlink:href="#_Toc229338137" office:target-frame-name="_top" xlink:show="replace"><text:span text:style-name="Lienhypertexte">3.</text:span><text:tab/><text:span text:style-name="Lienhypertexte">Corrélation entre consommation et émission de CO2</text:span><text:tab/>18</text:a></text:p>
          <text:p text:style-name="P78"><text:a xlink:href="#_Toc229338138" office:target-frame-name="_top" xlink:show="replace"><text:span text:style-name="Lienhypertexte">Conclusion général</text:span><text:tab/>19</text:a></text:p>
        </text:index-body>
      </text:table-of-content>
      <text:p text:style-name="Normal"/>
      <text:p text:style-name="P79"/>
      <text:h text:style-name="Titre1" text:outline-level="1"><text:bookmark-start text:name="_Toc229338101"/>Introduction :<text:bookmark-end text:name="_Toc229338101"/></text:h>
      <text:p text:style-name="Normal">L’énergie occupe une place centrale dans nos sociétés modernes. Elle conditionne le fonctionnement de l’économie, le confort des ménages, le développement industriel mais aussi, de plus en plus, les choix environnementaux des États. La France, dotée d’un parc nucléaire historique et engagée dans la transition énergétique, présente un cas particulièrement intéressant à étudier : son mix énergétique combine en effet une production électrique largement décarbonée avec une consommation final encore très dépendante des énergies fossiles, notamment dans les transports et le chauffage.</text:p>
      <text:p text:style-name="Normal"/>
      <text:p text:style-name="Normal"><text:span text:style-name="T80">Dans le cadre de cette SAÉ, nous avons exploité deux bases de données publiques publiées par le<text:s/></text:span><text:span text:style-name="T81">Service des données et études statistiques (SDES)</text:span><text:span text:style-name="T82"><text:s/>du Ministère de la Transition écologique :</text:span></text:p>
      <text:list text:style-name="LFO2" text:continue-numbering="true">
        <text:list-item>
          <text:p text:style-name="P83"><text:span text:style-name="T84">4.1-Synthese-toutes-energies.csv</text:span><text:span text:style-name="T85"><text:s/>: données mensuelles sur la production, l'importation, l'exportation et la consommation de toutes les énergies en France (charbon, pétrole, gaz, nucléaire, EnR), ainsi que les émissions de CO2 associées.<text:s/></text:span></text:p>
        </text:list-item>
        <text:list-item>
          <text:p text:style-name="P86"><text:span text:style-name="T87">4.2-Synthese-Electricite.csv</text:span><text:span text:style-name="T88"><text:s/>: données mensuelles spécifiques à la production électrique par source (hydraulique, éolien, solaire, nucléaire) et aux échanges d'électricité avec l'étranger.</text:span></text:p>
        </text:list-item>
      </text:list>
      <text:p text:style-name="P89"/>
      <text:p text:style-name="P90"><text:span text:style-name="T91">Notre travail s'organise autour d'une<text:s/></text:span><text:span text:style-name="T92">problématique commune</text:span><text:span text:style-name="T93"><text:s/>:</text:span></text:p>
      <text:p text:style-name="P94">Comment le système énergétique français a-t-il évolué entre 2006 et 2022, et quels sont les liens entre production, consommation, climat et émissions de CO2 ?</text:p>
      <text:p text:style-name="P95"/>
      <text:p text:style-name="P96"><text:span text:style-name="T97">Pour répondre à cette question, nous avons découpé l'analyse en<text:s/></text:span><text:span text:style-name="T98">trois axes complémentaires</text:span><text:span text:style-name="T99">, chacun étant traité par un membre du groupe :</text:span></text:p>
      <text:list text:style-name="LFO3" text:continue-numbering="true">
        <text:list-item>
          <text:p text:style-name="P100"><text:span text:style-name="T101">Partie A — La production d'électricité</text:span><text:span text:style-name="T102"><text:s/>: étude de l'évolution des quatre grandes sources (hydraulique, éolien, solaire, nucléaire) et de la transformation progressive du mix électrique français.</text:span></text:p>
        </text:list-item>
        <text:list-item>
          <text:p text:style-name="P103"><text:span text:style-name="T104">Partie B — La consommation d'électricité et son lien avec le climat</text:span><text:span text:style-name="T105"><text:s/>: analyse de la saisonnalité de la consommation et de sa dépendance à la rigueur climatique (degrés jours unifiés).</text:span></text:p>
        </text:list-item>
        <text:list-item>
          <text:p text:style-name="P106"><text:span text:style-name="T107">Partie C — Le mix énergétique global et les émissions de CO2</text:span><text:span text:style-name="T108"><text:s/>: étude du taux d'indépendance énergétique de la France et de la corrélation entre consommation d'énergies fossiles et émissions de CO2.</text:span></text:p>
        </text:list-item>
      </text:list>
      <text:p text:style-name="P109"/>
      <text:p text:style-name="P110"/>
      <text:p text:style-name="P111"/>
      <text:p text:style-name="P112"><text:span text:style-name="T113">L'ensemble des traitements a été réalisé sous<text:s/></text:span><text:span text:style-name="T114">Microsoft Excel</text:span><text:span text:style-name="T115"><text:s/>(tableaux croisés dynamiques, graphiques, calculs statistiques, régressions linéaires) complété ponctuellement par<text:s/></text:span><text:span text:style-name="T116">GeoGebra</text:span><text:span text:style-name="T117"><text:s/>pour la production d'histogrammes et de bo</text:span><text:span text:style-name="T118">ite à moustaches</text:span><text:span text:style-name="T119"><text:s/>mathématiquement rigoureux.</text:span></text:p>
      <text:p text:style-name="P120"/>
      <text:list text:style-name="LFO4" text:continue-numbering="true">
        <text:list-item>
          <text:p text:style-name="P121"><text:bookmark-start text:name="_Toc229338102"/>Présentation des données et méthodologie<text:bookmark-end text:name="_Toc229338102"/></text:p>
        </text:list-item>
      </text:list>
      <text:list text:style-name="LFO4" text:continue-numbering="true">
        <text:list-item>
          <text:list>
            <text:list-item>
              <text:p text:style-name="P122"><text:bookmark-start text:name="_Toc229338103"/>Sources<text:bookmark-end text:name="_Toc229338103"/></text:p>
            </text:list-item>
          </text:list>
        </text:list-item>
      </text:list>
      <text:p text:style-name="Normal"/>
      <text:p text:style-name="P123">Les deux fichiers utilisés sont issus du portail officiel<text:s/><text:span text:style-name="T124">statistiques.developpement-durable.gouv.fr</text:span><text:s/>et couvrent la période de<text:s/><text:span text:style-name="T125">janvier 2006 à décembre 2022</text:span>, soit<text:s/><text:span text:style-name="T126">204 observations mensuelles</text:span><text:s/>par variable.</text:p>
      <text:p text:style-name="P127"/>
      <text:list text:style-name="LFO4" text:continue-numbering="true">
        <text:list-item>
          <text:list>
            <text:list-item>
              <text:p text:style-name="P128"><text:bookmark-start text:name="_Toc229338104"/>Traitements communs effectués<text:bookmark-end text:name="_Toc229338104"/><text:s/></text:p>
            </text:list-item>
          </text:list>
        </text:list-item>
      </text:list>
      <text:list text:style-name="LFO5" text:continue-numbering="true">
        <text:list-item>
          <text:p text:style-name="P129"><text:span text:style-name="T130">Nettoyage</text:span><text:s/>: suppression des lignes incomplètes, vérification de l'encodage (UTF-8), uniformisation du format des dates (AAAA-MM).<text:s/></text:p>
        </text:list-item>
        <text:list-item>
          <text:p text:style-name="P131"><text:span text:style-name="T132">Enrichissement</text:span><text:s/>: ajout des colonnes Année et Mois extraites de la colonne Période pour permettre les agrégations annuelles et l'analyse de saisonnalité.<text:s/></text:p>
        </text:list-item>
        <text:list-item>
          <text:p text:style-name="P133"><text:span text:style-name="T134">Conversion énergétique</text:span><text:s/>: la production nucléaire étant fournie en équivalent primaire (chaleur), elle a été divisée par 3 (rendement thermique ≈ 33 %) pour obtenir l'équivalent en électricité produite.<text:s/></text:p>
        </text:list-item>
        <text:list-item>
          <text:p text:style-name="P135"><text:span text:style-name="T136">Calculs dérivés</text:span><text:s/>: création des indicateurs Total_EnR, Total_Production, Part_Nucléaire, Part_EnR, Conso_Fossile.</text:p>
        </text:list-item>
      </text:list>
      <text:list text:style-name="LFO4" text:continue-numbering="true">
        <text:list-item>
          <text:list>
            <text:list-item>
              <text:p text:style-name="P137"><text:bookmark-start text:name="_Toc229338105"/>Outils utilisés<text:bookmark-end text:name="_Toc229338105"/> </text:p>
            </text:list-item>
          </text:list>
        </text:list-item>
      </text:list>
      <text:p text:style-name="Normal"/>
      <table:table table:style-name="Table138">
        <table:table-columns>
          <table:table-column table:style-name="TableColumn139"/>
          <table:table-column table:style-name="TableColumn140"/>
        </table:table-columns>
        <table:table-row table:style-name="TableRow141">
          <table:table-cell table:style-name="TableCell142">
            <text:p text:style-name="P143">Outil</text:p>
          </table:table-cell>
          <table:table-cell table:style-name="TableCell144">
            <text:p text:style-name="P145">Usage</text:p>
          </table:table-cell>
        </table:table-row>
        <table:table-row table:style-name="TableRow146">
          <table:table-cell table:style-name="TableCell147">
            <text:p text:style-name="P148"><text:span text:style-name="T149">Excel</text:span></text:p>
          </table:table-cell>
          <table:table-cell table:style-name="TableCell150">
            <text:p text:style-name="P151">TCD, graphiques, calculs statistiques, régressions linéaires</text:p>
          </table:table-cell>
        </table:table-row>
        <table:table-row table:style-name="TableRow152">
          <table:table-cell table:style-name="TableCell153">
            <text:p text:style-name="P154"><text:span text:style-name="T155">GeoGebra</text:span></text:p>
          </table:table-cell>
          <table:table-cell table:style-name="TableCell156">
            <text:p text:style-name="P157">Histogrammes et<text:s/>boite à moustaches<text:s/>mathématiquement rigoureux</text:p>
          </table:table-cell>
        </table:table-row>
        <table:table-row table:style-name="TableRow158">
          <table:table-cell table:style-name="TableCell159">
            <text:p text:style-name="P160"><text:span text:style-name="T161">Word</text:span></text:p>
          </table:table-cell>
          <table:table-cell table:style-name="TableCell162">
            <text:p text:style-name="P163">Rédaction du rapport</text:p>
          </table:table-cell>
        </table:table-row>
      </table:table>
      <text:p text:style-name="P164"/>
      <text:list text:style-name="LFO4" text:continue-numbering="true">
        <text:list-item>
          <text:list>
            <text:list-item>
              <text:p text:style-name="P165"><text:bookmark-start text:name="_Toc229338106"/>Période d’étude<text:bookmark-end text:name="_Toc229338106"/></text:p>
            </text:list-item>
          </text:list>
        </text:list-item>
      </text:list>
      <text:p text:style-name="P166">Toutes les analyses portent sur la période<text:s/><text:span text:style-name="T167">2006-2022</text:span>, sauf la Partie B qui se concentre sur<text:s/><text:span text:style-name="T168">2011-2022</text:span><text:s/>en raison de la disponibilité homogène des degrés jours unifiés (DJU).</text:p>
      <text:p text:style-name="P169"/>
      <text:h text:style-name="Titre1" text:outline-level="1"><text:bookmark-start text:name="_Toc229338107"/>PARTIE A – La production d’électricité en France (2006-2022)<text:bookmark-end text:name="_Toc229338107"/></text:h>
      <text:p text:style-name="P170">Cette partie s’intéresse à la production d’électricité en France entre janvier 2006 et décembre 2022, à partir des données mensuelles publiées par SDES. Quatre sources principales ont été retenues : l’hydraulique, l’éolien, le solaire photovoltaïque et le nucléaire</text:p>
      <text:p text:style-name="P171">La problématique étudiée est la suivante : « Comment a évolué le mix de production électrique français au cours des dernières années, et quelle place occupent les énergies renouvelables face au nucléaire ? »</text:p>
      <text:p text:style-name="P172">Pour y répondre, nous avons réalisé 8 graphiques et calculé 11 indicateurs statistiques pour chaque source.</text:p>
      <text:p text:style-name="P173"/>
      <text:list text:style-name="LFO6" text:continue-numbering="true">
        <text:list-item>
          <text:p text:style-name="P174"><text:bookmark-start text:name="_Toc229338108"/>Présentation et traitement des données<text:bookmark-end text:name="_Toc229338108"/></text:p>
        </text:list-item>
      </text:list>
      <text:list text:style-name="LFO6" text:continue-numbering="true">
        <text:list-item>
          <text:list>
            <text:list-item>
              <text:p text:style-name="P175"><text:s/><text:bookmark-start text:name="_Toc229338109"/>Source et structure<text:bookmark-end text:name="_Toc229338109"/><text:s/></text:p>
            </text:list-item>
          </text:list>
        </text:list-item>
      </text:list>
      <text:list text:style-name="LFO7" text:continue-numbering="true">
        <text:list-item>
          <text:p text:style-name="P176">Données issues du fichier 4.2-Synthese-Electricite.csv</text:p>
        </text:list-item>
        <text:list-item>
          <text:p text:style-name="P177">Période couverte : de janvier 2006 à décembre 2022</text:p>
        </text:list-item>
        <text:list-item>
          <text:p text:style-name="P178">Fréquence : mensuelle</text:p>
        </text:list-item>
        <text:list-item>
          <text:p text:style-name="P179">Nombre d’observations : 204 lignes</text:p>
        </text:list-item>
        <text:list-item>
          <text:p text:style-name="P180">Variables retenues : Production hydraulique, éolienne, solaire, nucléaire (GWh)</text:p>
        </text:list-item>
      </text:list>
      <text:list text:style-name="LFO6" text:continue-numbering="true">
        <text:list-item>
          <text:list>
            <text:list-item>
              <text:p text:style-name="P181"><text:s/><text:bookmark-start text:name="_Toc229338110"/>Traitement effectué<text:bookmark-end text:name="_Toc229338110"/></text:p>
            </text:list-item>
          </text:list>
        </text:list-item>
      </text:list>
      <text:list text:style-name="LFO8" text:continue-numbering="true">
        <text:list-item>
          <text:p text:style-name="P182"><text:span text:style-name="T183">Conversion du nucléaire : la donnée d’origine est en équivalent primaire (chaleur). Nous l’avons divisée par 3 pour obtenir l’équivalent en électricité produite (rendement de 33%).</text:span></text:p>
        </text:list-item>
        <text:list-item>
          <text:p text:style-name="P184"><text:span text:style-name="T185">Ajout des colonnes Année et Mois (extraction depuis Période).</text:span></text:p>
        </text:list-item>
        <text:list-item>
          <text:p text:style-name="P186"><text:span text:style-name="T187"><text:s/>Création des colonnes Total_EnR (hydro+éolien+solaire), Total_Production, Part_Nucléaire, Part_EnR.<text:s/></text:span></text:p>
        </text:list-item>
      </text:list>
      <text:p text:style-name="P188"/>
      <text:p text:style-name="P189"/>
      <text:p text:style-name="P190"/>
      <text:list text:style-name="LFO6" text:continue-numbering="true">
        <text:list-item>
          <text:p text:style-name="P191"><text:bookmark-start text:name="_Toc229338111"/>Analyse statistique à une variable<text:bookmark-end text:name="_Toc229338111"/></text:p>
        </text:list-item>
      </text:list>
      <text:list text:style-name="LFO6" text:continue-numbering="true">
        <text:list-item>
          <text:list>
            <text:list-item>
              <text:p text:style-name="P192"><text:s/><text:bookmark-start text:name="_Toc229338112"/>Indicateurs par source<text:bookmark-end text:name="_Toc229338112"/></text:p>
            </text:list-item>
          </text:list>
        </text:list-item>
      </text:list>
      <text:p text:style-name="P193"><draw:frame draw:style-name="a3" draw:name="Image 1" text:anchor-type="as-char" svg:x="0in" svg:y="0in" svg:width="5.44214in" svg:height="2.80024in" style:rel-width="scale" style:rel-height="scale"><draw:image xlink:href="media/image2.png" xlink:type="simple" xlink:show="embed" xlink:actuate="onLoad"/><svg:title/><svg:desc/></draw:frame></text:p>
      <text:p text:style-name="P194"/>
      <text:p text:style-name="P195">Le nucléaire présente la moyenne mensuelle la plus élevée (~35000 GWh),</text:p>
      <text:p text:style-name="P196">Confirmant son rôle dominant. L’hydraulique arrive en deuxième position (~5300 GWh) avec toutefois une grande dispersion (écart-type = 1366,03) liée à la variabilité saisonnière et hydrologique. L’éolien et le solaire restent plus modestes mais affichent les coefficients de variation les plus élevés, traduisant leur dépendance aux conditions météorologiques.</text:p>
      <text:list text:style-name="LFO6" text:continue-numbering="true">
        <text:list-item>
          <text:list>
            <text:list-item>
              <text:p text:style-name="P197"><text:s/><text:bookmark-start text:name="_Toc229338113"/>Distribution saisonnière et annuelle des productions<text:bookmark-end text:name="_Toc229338113"/></text:p>
            </text:list-item>
          </text:list>
        </text:list-item>
      </text:list>
      <text:p text:style-name="P198">Pour étudier la répartition de la production électrique, nous avons construit un tableau croisé dynamique pour chacune des quatre sources, croisant les mois (lignes) et les années (colonnes). Cette double entrée permet d’identifier à la fois la saisonnalité propre à chaque source et son évolution dans le temps.</text:p>
      <text:p text:style-name="P199"/>
      <text:p text:style-name="P200"/>
      <text:p text:style-name="P201"/>
      <text:p text:style-name="P202"/>
      <text:p text:style-name="P203"/>
      <text:p text:style-name="P204"/>
      <text:list text:style-name="LFO6" text:continue-numbering="true">
        <text:list-item>
          <text:list>
            <text:list-item>
              <text:list>
                <text:list-item>
                  <text:p text:style-name="P205">Production nucléaire</text:p>
                </text:list-item>
              </text:list>
            </text:list-item>
          </text:list>
        </text:list-item>
      </text:list>
      <text:p text:style-name="Normal"/>
      <text:p text:style-name="P206">Figure 1 – TCD de la production nucléaire mensuelle moyenne (2006-2022, en GWh)</text:p>
      <text:p text:style-name="P207"><draw:frame draw:style-name="a4" draw:name="Image 1" text:anchor-type="as-char" svg:x="0in" svg:y="0in" svg:width="6.3in" svg:height="1.10556in" style:rel-width="scale" style:rel-height="scale"><draw:image xlink:href="media/image3.png" xlink:type="simple" xlink:show="embed" xlink:actuate="onLoad"/><svg:title/><svg:desc/></draw:frame></text:p>
      <text:p text:style-name="P208"/>
      <text:p text:style-name="P209">Ce tableau met en évidence plusieurs phénomènes :</text:p>
      <text:list text:style-name="LFO9" text:continue-numbering="true">
        <text:list-item>
          <text:p text:style-name="P210"><text:span text:style-name="T211">Saisonnalité marquée</text:span><text:span text:style-name="T212"> : la production est plus forte en hiver (janvier : 129 908 GWh en moyenne en 2021, décembre : 120 233 GWh) et plus faible en été (août : ~92000 GWh), période durant laquelle les centrales sont mises à l’arrêt pour maintenance.<text:s/></text:span></text:p>
        </text:list-item>
        <text:list-item>
          <text:p text:style-name="P213"><text:span text:style-name="T214">Tendance annuelle décroissante</text:span><text:span text:style-name="T215"> : <text:s/>le total général passe de 113 700 GWh en moyenne en 2006 à 74 440 GWh en 2022, soit une baisse de 35%.</text:span></text:p>
        </text:list-item>
        <text:list-item>
          <text:p text:style-name="P216"><text:span text:style-name="T217">Année 2022</text:span><text:span text:style-name="T218"><text:s/>: on observe une chute marquée (74 440 GWh) correspondant à la crise du parc nucléaire français (arrêts pour corrosion sous contrainte, maintenance reportée post-COVID).</text:span></text:p>
        </text:list-item>
        <text:list-item>
          <text:p text:style-name="P219"><text:span text:style-name="T220">Année 2020</text:span><text:span text:style-name="T221"> : baisse visible en avril-mai (70000-90000 GWh) liée au confinement et à la baisse de la demande.</text:span></text:p>
        </text:list-item>
      </text:list>
      <text:list text:style-name="LFO6" text:continue-numbering="true">
        <text:list-item>
          <text:list>
            <text:list-item>
              <text:list>
                <text:list-item>
                  <text:p text:style-name="P222">Production hydraulique</text:p>
                </text:list-item>
              </text:list>
            </text:list-item>
          </text:list>
        </text:list-item>
      </text:list>
      <text:p text:style-name="Normal"/>
      <text:p text:style-name="P223">Figure 2 – TCD de la production hydraulique mensuelle moyenne (2006-2022, en GWh)</text:p>
      <text:p text:style-name="P224"><draw:frame draw:style-name="a5" draw:name="Image 1" text:anchor-type="as-char" svg:x="0in" svg:y="0in" svg:width="6.3in" svg:height="1.12778in" style:rel-width="scale" style:rel-height="scale"><draw:image xlink:href="media/image4.png" xlink:type="simple" xlink:show="embed" xlink:actuate="onLoad"/><svg:title/><svg:desc/></draw:frame></text:p>
      <text:p text:style-name="P225">Ce tableau met en évidence trois caractéristiques majeures de la production hydraulique française :</text:p>
      <text:list text:style-name="LFO10" text:continue-numbering="true">
        <text:list-item>
          <text:p text:style-name="P226"><text:span text:style-name="T227">Une saisonnalité marquée par le ressource en eau</text:span><text:span text:style-name="T228"> : la production atteint son maximum au printemps, notamment en avril-mai (jusqu’à 7 938 GWh en mai 2017), période correspondant à la fonte des neiges dans les massifs montagneux et aux pluies printanières. À l’inverse, on observe un creux en septembre-octobre (souvent inférieur à 3500 GWh), période de basses eaux de fin été.</text:span></text:p>
        </text:list-item>
        <text:list-item>
          <text:p text:style-name="P229"><text:span text:style-name="T230">Une variabilité interannuelle importante </text:span><text:span text:style-name="T231">:</text:span><text:span text:style-name="T232"><text:s/></text:span><text:span text:style-name="T233">contrairement au nucléaire, le total général varie fortement d’une année à l’autre (de 4257 GWh en 2022 à 6280 GWh en 2013). Cette variabilité est directement liée aux conditions hydrologiques (pluviométrie, enneigement). Les années 2011, 2017 et 2022 (sécheresse historique) apparaissent particulièrement faibles.</text:span></text:p>
        </text:list-item>
        <text:list-item>
          <text:p text:style-name="P234"><text:span text:style-name="T235">Pas de tendance claire à la hausse ou à la baisse </text:span><text:span text:style-name="T236">: la moyenne sur 17 ans reste relativement stable autour de 5 285 GWh, ce qui explique par le fait que le parc hydraulique français est mature (peu nouveaux barrages</text:span><text:span text:style-name="T237"><text:s/></text:span><text:span text:style-name="T238">construits sur la période).</text:span></text:p>
        </text:list-item>
      </text:list>
      <text:p text:style-name="P239">Cette source apparaît donc comme une énergie renouvelable historique et stable structurellement, mais fortement dépendante du climat à court terme.</text:p>
      <text:p text:style-name="P240"/>
      <text:list text:style-name="LFO6" text:continue-numbering="true">
        <text:list-item>
          <text:list>
            <text:list-item>
              <text:list>
                <text:list-item>
                  <text:p text:style-name="P241">Production éolienne</text:p>
                </text:list-item>
              </text:list>
            </text:list-item>
          </text:list>
        </text:list-item>
      </text:list>
      <text:p text:style-name="P242">Figure 3 – TCD de la production éolienne mensuelle moyenne (2006-2022, en GWh)</text:p>
      <text:p text:style-name="P243"><text:span text:style-name="T244"><draw:frame draw:style-name="a6" draw:name="Image 1" text:anchor-type="as-char" svg:x="0in" svg:y="0in" svg:width="6.3in" svg:height="1.10486in" style:rel-width="scale" style:rel-height="scale"><draw:image xlink:href="media/image5.png" xlink:type="simple" xlink:show="embed" xlink:actuate="onLoad"/><svg:title/><svg:desc/></draw:frame></text:span></text:p>
      <text:p text:style-name="P245">Ce tableau fait apparaître les trois caractéristiques majeures de la production éolienne française :</text:p>
      <text:list text:style-name="LFO11" text:continue-numbering="true">
        <text:list-item>
          <text:p text:style-name="P246"><text:span text:style-name="T247">Une croissance sur la période </text:span><text:span text:style-name="T248">: le total général passe de 180 GWh en 2006 à 3169 GWh en 2021 (avec un pic à 3331 GWh en 2020), soit une multiplication par près de 17 en 15 ans. Cette explosion s’explique par le développement massif du parc éolien français, encouragé par les politiques de transition énergétique. La légère baisse en 2022 (1597 GWh sur le total général) s’explique probablement par une année peu venteuse plus que par un ralentissement du parc</text:span></text:p>
        </text:list-item>
        <text:list-item>
          <text:p text:style-name="P249"><text:span text:style-name="T250">Une saisonnalité hivernal très marqué </text:span><text:span text:style-name="T251">: la production est maximale en hiver, avec des valeurs souvent supérieures à 3000GWh sur les années récentes (ex : 5907 GWh en février 2020, 4715 GWh en décembre 2019). À l’inverse, en été constitue un creux net avec des valeurs souvent deux à trois fois plus faible. Cette saisonnalité est cohérente avec le régime des vents en France, plus forts en saison froide.</text:span></text:p>
        </text:list-item>
        <text:list-item>
          <text:p text:style-name="P252"><text:span text:style-name="T253">Une complémentarité avec le solaire </text:span><text:span text:style-name="T254">: l’éolien produit beaucoup en hiver, quant à la demande est forte (chauffage) et quand le solaire et à son minimum. Cette complémentarité est un ajout majeur pour la stabilité du mix renouvelable.</text:span></text:p>
        </text:list-item>
      </text:list>
      <text:p text:style-name="P255">L’éolien apparaît donc comme la source dont la dynamique de croissance est la plus forte sur la période étudiée, tout en présentant un forte dépendance aux conditions météorologique d’une année à l’autre.</text:p>
      <text:p text:style-name="P256"/>
      <text:list text:style-name="LFO6" text:continue-numbering="true">
        <text:list-item>
          <text:list>
            <text:list-item>
              <text:list>
                <text:list-item>
                  <text:p text:style-name="P257">Production solaire</text:p>
                </text:list-item>
              </text:list>
            </text:list-item>
          </text:list>
        </text:list-item>
      </text:list>
      <text:p text:style-name="P258">Figure 4 – TCD de la production solaire mensuelle moyenne (2011-2022, en GWh)</text:p>
      <text:p text:style-name="P259"><text:span text:style-name="T260"><draw:frame draw:style-name="a7" draw:name="Image 1" text:anchor-type="as-char" svg:x="0in" svg:y="0in" svg:width="6.3in" svg:height="1.37431in" style:rel-width="scale" style:rel-height="scale"><draw:image xlink:href="media/image6.png" xlink:type="simple" xlink:show="embed" xlink:actuate="onLoad"/><svg:title/><svg:desc/></draw:frame></text:span></text:p>
      <text:p text:style-name="P261"><text:tab/>Ce tableau illustre l’émergence récente du solaire photovoltaïque dans le mix électrique français :</text:p>
      <text:list text:style-name="LFO12" text:continue-numbering="true">
        <text:list-item>
          <text:p text:style-name="P262"><text:span text:style-name="T263">Un démarrage tardif </text:span><text:span text:style-name="T264">: la production solaire est strictement nulle entre 2006-2010, ce qui explique l’absence de valeurs sur ces colonnes. Le développement effectif débute en 2011, suite à la mise en place des politiques publiques de soutien aux énergies renouvelables (Grenelle de l’environnement, tarifs de rachat). Pour cette raison, l’analyse a été restreinte à la période 2011-2022.</text:span></text:p>
        </text:list-item>
        <text:list-item>
          <text:p text:style-name="P265"><text:span text:style-name="T266">Une croissance régulière et continue</text:span><text:span text:style-name="T267"> : le total général passe de 161 GWh en 2011 à 1583 GWh en 2022, soit une multiplication par près de 10 en 11 ans. Cette croissance reflète l’augmentation progressive du parc photovoltaïque installé en France.</text:span></text:p>
        </text:list-item>
        <text:list-item>
          <text:p text:style-name="P268"><text:span text:style-name="T269">Une saisonnalité estival marquée</text:span><text:span text:style-name="T270"><text:s/>(opposée à l’éolien) : la production est maximale en été, avec des valeurs souvent 2 à 3 fois supérieurs à celle de l’hiver. Par exemple en 2022 : 2592 GWh en juillet contre 470 GWh en février. Cette saisonnalité est directement liée à l’ensoleillement et à la durée du jour.</text:span></text:p>
        </text:list-item>
      </text:list>
      <text:p text:style-name="P271">Le solaire apparaît donc comme une source jeune mais en pleine expansion, dont la production complète idéalement celle de l’éolien (saisonnalité inversée), renforçant ainsi la cohérence saisonnière du mix renouvelable français.</text:p>
      <text:p text:style-name="P272">Les quatre TCD permettent de dresser une typologie des sources de production selon deux critères : la saisonnalité et la dynamique d’évolution.</text:p>
      <table:table table:style-name="Table273">
        <table:table-columns>
          <table:table-column table:style-name="TableColumn274"/>
          <table:table-column table:style-name="TableColumn275"/>
          <table:table-column table:style-name="TableColumn276"/>
        </table:table-columns>
        <table:table-row table:style-name="TableRow277">
          <table:table-cell table:style-name="TableCell278">
            <text:p text:style-name="P279">Source</text:p>
          </table:table-cell>
          <table:table-cell table:style-name="TableCell280">
            <text:p text:style-name="P281">Saisonnalité</text:p>
          </table:table-cell>
          <table:table-cell table:style-name="TableCell282">
            <text:p text:style-name="P283">Évolution 2006-2022</text:p>
          </table:table-cell>
        </table:table-row>
        <table:table-row table:style-name="TableRow284">
          <table:table-cell table:style-name="TableCell285">
            <text:p text:style-name="Normal"><text:span text:style-name="T286">Nucléaire</text:span></text:p>
          </table:table-cell>
          <table:table-cell table:style-name="TableCell287">
            <text:p text:style-name="P288">Pic hiver, creux été (maintenance)</text:p>
          </table:table-cell>
          <table:table-cell table:style-name="TableCell289">
            <text:p text:style-name="P290">Baisse (-35%)</text:p>
          </table:table-cell>
        </table:table-row>
        <table:table-row table:style-name="TableRow291">
          <table:table-cell table:style-name="TableCell292">
            <text:p text:style-name="Normal"><text:span text:style-name="T293">Hydraulique</text:span></text:p>
          </table:table-cell>
          <table:table-cell table:style-name="TableCell294">
            <text:p text:style-name="P295">Pic printemps (fonte)</text:p>
          </table:table-cell>
          <table:table-cell table:style-name="TableCell296">
            <text:p text:style-name="P297">Stable, dépendant climat</text:p>
          </table:table-cell>
        </table:table-row>
        <table:table-row table:style-name="TableRow298">
          <table:table-cell table:style-name="TableCell299">
            <text:p text:style-name="Normal"><text:span text:style-name="T300">Éolien</text:span></text:p>
          </table:table-cell>
          <table:table-cell table:style-name="TableCell301">
            <text:p text:style-name="P302">Pic hiver</text:p>
          </table:table-cell>
          <table:table-cell table:style-name="TableCell303">
            <text:p text:style-name="P304">Très forte croissance (×17)</text:p>
          </table:table-cell>
        </table:table-row>
        <table:table-row table:style-name="TableRow305">
          <table:table-cell table:style-name="TableCell306">
            <text:p text:style-name="Normal"><text:span text:style-name="T307">Solaire</text:span></text:p>
          </table:table-cell>
          <table:table-cell table:style-name="TableCell308">
            <text:p text:style-name="P309">Pic été</text:p>
          </table:table-cell>
          <table:table-cell table:style-name="TableCell310">
            <text:p text:style-name="P311">Émergence depuis 2011 (×10)</text:p>
          </table:table-cell>
        </table:table-row>
      </table:table>
      <text:p text:style-name="P312"/>
      <text:p text:style-name="P313">On observe donc ainsi une complémentarité saisonnière entre l’éolien (hiver) et le solaire (été), ainsi qu’entre le nucléaire (hiver) et l’hydraulique (printemps). Cette diversité est un atout pour la sécurité d’approvisionnement du système électrique français.</text:p>
      <text:p text:style-name="P314"/>
      <text:list text:style-name="LFO6" text:continue-numbering="true">
        <text:list-item>
          <text:p text:style-name="P315"><text:bookmark-start text:name="_Toc229338114"/>Évolution temporel de la production électrique<text:bookmark-end text:name="_Toc229338114"/></text:p>
        </text:list-item>
      </text:list>
      <text:list text:style-name="LFO6" text:continue-numbering="true">
        <text:list-item>
          <text:list>
            <text:list-item>
              <text:p text:style-name="P316"><text:bookmark-start text:name="_Toc229338115"/>Évolution mensuelle des énergies renouvelables (Hydro, Éolien, Solaire)<text:bookmark-end text:name="_Toc229338115"/></text:p>
            </text:list-item>
          </text:list>
        </text:list-item>
      </text:list>
      <text:p text:style-name="P317">Figure 1 – Évolution mensuelle de la production hydraulique, éolienne et solaire en France (2006-2022, en GWh)</text:p>
      <text:p text:style-name="P318"><text:span text:style-name="T319"><draw:frame draw:style-name="a8" draw:name="Image 1" text:anchor-type="as-char" svg:x="0in" svg:y="0in" svg:width="6.3in" svg:height="2.48056in" style:rel-width="scale" style:rel-height="scale"><draw:image xlink:href="media/image7.png" xlink:type="simple" xlink:show="embed" xlink:actuate="onLoad"/><svg:title/><svg:desc/></draw:frame></text:span></text:p>
      <text:p text:style-name="P320">Ce graphique superpose l’évolution mensuelle des trois sources renouvelables sur 17 ans, ce qui permet de visualiser simultanément les saisonnalités et les dynamique à long terme.</text:p>
      <text:list text:style-name="LFO13" text:continue-numbering="true">
        <text:list-item>
          <text:p text:style-name="P321"><text:span text:style-name="T322">L'hydraulique</text:span><text:span text:style-name="T323"><text:s/>(courbe bleue) présente des<text:s/></text:span><text:span text:style-name="T324">oscillations régulières</text:span><text:span text:style-name="T325"><text:s/>autour d'une moyenne stable (~5 300 GWh/mois). Les pics correspondent aux<text:s/></text:span><text:span text:style-name="T326">mois de printemps</text:span><text:span text:style-name="T327"><text:s/>(avril-mai) et les creux aux<text:s/></text:span><text:span text:style-name="T328">mois d'été et début d'automne</text:span><text:span text:style-name="T329"><text:s/>(septembre-octobre). On note une<text:s/></text:span><text:span text:style-name="T330">baisse marquée en 2022</text:span><text:span text:style-name="T331"><text:s/>(sécheresse historique).</text:span></text:p>
        </text:list-item>
        <text:list-item>
          <text:p text:style-name="P332"><text:span text:style-name="T333">L'éolien</text:span><text:span text:style-name="T334"><text:s/>(courbe verte) montre une<text:s/></text:span><text:span text:style-name="T335">tendance haussière nette</text:span><text:span text:style-name="T336"><text:s/>: autour de 200 GWh/mois en 2006, la production atteint régulièrement<text:s/></text:span><text:span text:style-name="T337">3 000 à 5 000 GWh/mois</text:span><text:span text:style-name="T338"><text:s/>en fin de période. Les pics sont<text:s/></text:span><text:span text:style-name="T339">hivernaux</text:span><text:span text:style-name="T340">.</text:span></text:p>
        </text:list-item>
        <text:list-item>
          <text:p text:style-name="P341"><text:span text:style-name="T342">Le solaire</text:span><text:span text:style-name="T343"><text:s/>(courbe jaune) reste à zéro jusqu'en 2011, puis croît de façon<text:s/></text:span><text:span text:style-name="T344">régulière</text:span><text:span text:style-name="T345">, avec une saisonnalité<text:s/></text:span><text:span text:style-name="T346">estivale</text:span><text:span text:style-name="T347"><text:s/>clairement visible (pics en juin-juillet, creux en décembre-janvier).</text:span></text:p>
        </text:list-item>
      </text:list>
      <text:p text:style-name="P348"/>
      <text:p text:style-name="Normal"><text:span text:style-name="T349">On observe ainsi une<text:s/></text:span><text:span text:style-name="T350">complémentarité saisonnière éolien/solaire</text:span><text:span text:style-name="T351"><text:s/>: quand l'un produit peu, l'autre produit beaucoup, ce qui lisse l'apport renouvelable sur l'année.</text:span></text:p>
      <text:list text:style-name="LFO6" text:continue-numbering="true">
        <text:list-item>
          <text:list>
            <text:list-item>
              <text:p text:style-name="P352"><text:bookmark-start text:name="_Toc229338116"/>Évolution mensuelle de la production nucléaire<text:bookmark-end text:name="_Toc229338116"/></text:p>
            </text:list-item>
          </text:list>
        </text:list-item>
      </text:list>
      <text:p text:style-name="P353">Figure 2 – Évolution mensuelle de la production nucléaire en France (2006-2022, en GWh électriques)</text:p>
      <text:p text:style-name="P354"><draw:frame draw:style-name="a9" draw:name="Image 1" text:anchor-type="as-char" svg:x="0in" svg:y="0in" svg:width="5.39213in" svg:height="3.01693in" style:rel-width="scale" style:rel-height="scale"><draw:image xlink:href="media/image8.png" xlink:type="simple" xlink:show="embed" xlink:actuate="onLoad"/><svg:title/><svg:desc/></draw:frame></text:p>
      <text:p text:style-name="Normal"><text:span text:style-name="T355">La production nucléaire présente un comportement<text:s/></text:span><text:span text:style-name="T356">très différent</text:span><text:span text:style-name="T357"><text:s/>des renouvelables :</text:span></text:p>
      <text:list text:style-name="LFO14" text:continue-numbering="true">
        <text:list-item>
          <text:p text:style-name="P358"><text:span text:style-name="T359">Une saisonnalité inverse à l'hydraulique</text:span><text:span text:style-name="T360"><text:s/>: la production est<text:s/></text:span><text:span text:style-name="T361">maximale en hiver</text:span><text:span text:style-name="T362"><text:s/>(pic de demande, donc maintien des tranches en service) et<text:s/></text:span><text:span text:style-name="T363">minimale en été</text:span><text:span text:style-name="T364"><text:s/>(arrêts programmés pour<text:s/></text:span><text:span text:style-name="T365">maintenance et rechargement de combustible</text:span><text:span text:style-name="T366">). On observe ainsi des<text:s/></text:span><text:span text:style-name="T367">oscillations annuelles régulières</text:span><text:span text:style-name="T368">.</text:span></text:p>
        </text:list-item>
        <text:list-item>
          <text:p text:style-name="P369"><text:span text:style-name="T370">Une tendance globale à la baisse</text:span><text:span text:style-name="T371"><text:s/>: on passe d'une moyenne d'environ<text:s/></text:span><text:span text:style-name="T372">39 000 GWh électriques/mois en 2006</text:span><text:span text:style-name="T373"><text:s/>à environ<text:s/></text:span><text:span text:style-name="T374">25 000 GWh/mois en 2022</text:span><text:span text:style-name="T375">, soit une<text:s/></text:span><text:span text:style-name="T376">baisse de l'ordre de 35 %</text:span><text:span text:style-name="T377"><text:s/>sur la période.</text:span></text:p>
        </text:list-item>
        <text:list-item>
          <text:p text:style-name="P378"><text:span text:style-name="T379">Un effondrement marqué en 2022</text:span><text:span text:style-name="T380"><text:s/>: la production atteint son<text:s/></text:span><text:span text:style-name="T381">plus bas niveau historique</text:span><text:span text:style-name="T382">, en raison de la<text:s/></text:span><text:span text:style-name="T383">crise de corrosion sous contrainte (CSC)</text:span><text:span text:style-name="T384"><text:s/>détectée sur plusieurs réacteurs, qui a entraîné l'arrêt simultané de nombreuses tranches.</text:span></text:p>
        </text:list-item>
      </text:list>
      <text:p text:style-name="Normal"><text:span text:style-name="T385">Cette évolution traduit une<text:s/></text:span><text:span text:style-name="T386">fragilité croissante du parc nucléaire français vieillissant</text:span><text:span text:style-name="T387">, et explique en partie le recours accru aux<text:s/></text:span><text:span text:style-name="T388">importations d'électricité</text:span><text:span text:style-name="T389"><text:s/>sur les dernières années.</text:span></text:p>
      <text:list text:style-name="LFO6" text:continue-numbering="true">
        <text:list-item>
          <text:list>
            <text:list-item>
              <text:p text:style-name="P390"><text:bookmark-start text:name="_Toc229338117"/>Évolution annuelle du mix de production<text:bookmark-end text:name="_Toc229338117"/></text:p>
            </text:list-item>
          </text:list>
        </text:list-item>
      </text:list>
      <text:p text:style-name="P391">Figure 3 – Production électrique annuelle par source (diagramme empilé, 2006-2022)</text:p>
      <text:p text:style-name="P392"><draw:frame draw:style-name="a10" draw:name="Image 1" text:anchor-type="as-char" svg:x="0in" svg:y="0in" svg:width="5.31713in" svg:height="3.39196in" style:rel-width="scale" style:rel-height="scale"><draw:image xlink:href="media/image9.png" xlink:type="simple" xlink:show="embed" xlink:actuate="onLoad"/><svg:title/><svg:desc/></draw:frame></text:p>
      <text:p text:style-name="Normal"><text:span text:style-name="T393">Ce</text:span><text:span text:style-name="T394"><text:s/>diagramme</text:span><text:span text:style-name="T395"><text:s/>empilé permet de visualiser<text:s/></text:span><text:span text:style-name="T396">la composition du mix année par année</text:span><text:span text:style-name="T397"><text:s/>:</text:span></text:p>
      <text:list text:style-name="LFO15" text:continue-numbering="true">
        <text:list-item>
          <text:p text:style-name="P398"><text:span text:style-name="T399">La<text:s/></text:span><text:span text:style-name="T400">production totale reste relativement stable</text:span><text:span text:style-name="T401"><text:s/>sur la période (autour de 500-550 TWh/an), ce qui montre que<text:s/></text:span><text:span text:style-name="T402">la baisse du nucléaire a été compensée</text:span><text:span text:style-name="T403"><text:s/>par la montée des renouvelables et, dans une moindre mesure, par les importations.</text:span></text:p>
        </text:list-item>
        <text:list-item>
          <text:p text:style-name="P404"><text:span text:style-name="T405">La<text:s/></text:span><text:span text:style-name="T406">part des EnR (éolien + solaire) augmente progressivement</text:span><text:span text:style-name="T407"><text:s/>: quasi inexistante en 2006, elle représente une part visible du mix dès 2015 et continue de croître jusqu'en 2022.</text:span></text:p>
        </text:list-item>
        <text:list-item>
          <text:p text:style-name="P408"><text:span text:style-name="T409">L'</text:span><text:span text:style-name="T410">hydraulique reste un socle stable</text:span><text:span text:style-name="T411">, malgré sa variabilité annuelle.</text:span></text:p>
        </text:list-item>
        <text:list-item>
          <text:p text:style-name="P412"><text:span text:style-name="T413">La<text:s/></text:span><text:span text:style-name="T414">chute du nucléaire en 2022</text:span><text:span text:style-name="T415"><text:s/>est très visible et n'est<text:s/></text:span><text:span text:style-name="T416">que partiellement compensée</text:span><text:span text:style-name="T417"><text:s/>par les autres sources, ce qui explique que la France soit devenue<text:s/></text:span><text:span text:style-name="T418">importatrice nette d'électricité</text:span><text:span text:style-name="T419"><text:s/>cette année-là (situation historiquement rare).</text:span></text:p>
        </text:list-item>
      </text:list>
      <text:list text:style-name="LFO6" text:continue-numbering="true">
        <text:list-item>
          <text:list>
            <text:list-item>
              <text:p text:style-name="P420"><text:bookmark-start text:name="_Toc229338118"/>Synthèse de l’évolution temporelle<text:bookmark-end text:name="_Toc229338118"/></text:p>
            </text:list-item>
          </text:list>
        </text:list-item>
      </text:list>
      <text:p text:style-name="P421"><text:span text:style-name="T422">Trois grands enseignements</text:span><text:s/>ressortent de cette analyse temporelle :</text:p>
      <text:list text:style-name="LFO16" text:continue-numbering="true">
        <text:list-item>
          <text:p text:style-name="P423"><text:span text:style-name="T424">Le mix électrique français se transforme</text:span><text:s/>: montée des EnR, déclin relatif du nucléaire.</text:p>
        </text:list-item>
        <text:list-item>
          <text:p text:style-name="P425"><text:span text:style-name="T426">Les saisonnalités des différentes sources sont complémentaires</text:span>, ce qui plaide pour un mix diversifié.</text:p>
        </text:list-item>
        <text:list-item>
          <text:p text:style-name="P427"><text:span text:style-name="T428">L'année 2022 marque un point de bascule</text:span><text:s/>: la France devient importatrice nette d'électricité pour la première fois depuis des décennies, en raison de la conjonction d'une<text:s/><text:span text:style-name="T429">sécheresse</text:span><text:s/>(baisse hydraulique) et de la<text:s/><text:span text:style-name="T430">crise du parc nucléaire</text:span>.</text:p>
        </text:list-item>
      </text:list>
      <text:list text:style-name="LFO16" text:continue-numbering="true">
        <text:list-item>
          <text:p text:style-name="P431"><text:bookmark-start text:name="_Toc229338119"/>Le mix de production électrique français<text:bookmark-end text:name="_Toc229338119"/></text:p>
        </text:list-item>
      </text:list>
      <text:h text:style-name="P432" text:outline-level="3"><text:bookmark-start text:name="_Toc229338120"/>4.1 Répartition moyenne par source<text:bookmark-end text:name="_Toc229338120"/><text:s/></text:h>
      <text:p text:style-name="Normal"><draw:frame draw:style-name="a11" draw:name="Image 1" text:anchor-type="as-char" svg:x="0in" svg:y="0in" svg:width="5.83384in" svg:height="3.26695in" style:rel-width="scale" style:rel-height="scale"><draw:image xlink:href="media/image10.png" xlink:type="simple" xlink:show="embed" xlink:actuate="onLoad"/><svg:title/><svg:desc/></draw:frame></text:p>
      <text:p text:style-name="Normal">Pour quantifier la<text:s/><text:span text:style-name="T433">structure moyenne du mix électrique français</text:span><text:s/>sur l'ensemble de la période étudiée, nous avons calculé la<text:s/><text:span text:style-name="T434">production moyenne mensuelle de chaque source</text:span><text:s/>puis sa part en pourcentage du tota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435">
        <table:table-columns>
          <table:table-column table:style-name="TableColumn436"/>
          <table:table-column table:style-name="TableColumn437"/>
          <table:table-column table:style-name="TableColumn438"/>
        </table:table-columns>
        <table:table-row table:style-name="TableRow439">
          <table:table-cell table:style-name="TableCell440">
            <text:p text:style-name="P441">Source</text:p>
          </table:table-cell>
          <table:table-cell table:style-name="TableCell442">
            <text:p text:style-name="P443">Production moyenne mensuelle (GWh)</text:p>
          </table:table-cell>
          <table:table-cell table:style-name="TableCell444">
            <text:p text:style-name="P445">Part du mix</text:p>
          </table:table-cell>
        </table:table-row>
        <table:table-row table:style-name="TableRow446">
          <table:table-cell table:style-name="TableCell447">
            <text:p text:style-name="P448"><text:span text:style-name="T449">Nucléaire</text:span><text:s/><text:span text:style-name="T450">(équivalent élec. Voir 1.2)</text:span></text:p>
          </table:table-cell>
          <table:table-cell table:style-name="TableCell451">
            <text:p text:style-name="P452">~34 537</text:p>
          </table:table-cell>
          <table:table-cell table:style-name="TableCell453">
            <text:p text:style-name="P454"><text:span text:style-name="T455">~82 %</text:span></text:p>
          </table:table-cell>
        </table:table-row>
        <table:table-row table:style-name="TableRow456">
          <table:table-cell table:style-name="TableCell457">
            <text:p text:style-name="P458"><text:span text:style-name="T459">Hydraulique</text:span></text:p>
          </table:table-cell>
          <table:table-cell table:style-name="TableCell460">
            <text:p text:style-name="P461">~5 285</text:p>
          </table:table-cell>
          <table:table-cell table:style-name="TableCell462">
            <text:p text:style-name="P463"><text:span text:style-name="T464">~12,5 %</text:span></text:p>
          </table:table-cell>
        </table:table-row>
        <table:table-row table:style-name="TableRow465">
          <table:table-cell table:style-name="TableCell466">
            <text:p text:style-name="P467"><text:span text:style-name="T468">Éolien</text:span></text:p>
          </table:table-cell>
          <table:table-cell table:style-name="TableCell469">
            <text:p text:style-name="P470">~1 597</text:p>
          </table:table-cell>
          <table:table-cell table:style-name="TableCell471">
            <text:p text:style-name="P472"><text:span text:style-name="T473">~3,8 %</text:span></text:p>
          </table:table-cell>
        </table:table-row>
        <table:table-row table:style-name="TableRow474">
          <table:table-cell table:style-name="TableCell475">
            <text:p text:style-name="P476"><text:span text:style-name="T477">Solaire</text:span></text:p>
          </table:table-cell>
          <table:table-cell table:style-name="TableCell478">
            <text:p text:style-name="P479">~753</text:p>
          </table:table-cell>
          <table:table-cell table:style-name="TableCell480">
            <text:p text:style-name="P481"><text:span text:style-name="T482">~1,8 %</text:span></text:p>
          </table:table-cell>
        </table:table-row>
        <table:table-row table:style-name="TableRow483">
          <table:table-cell table:style-name="TableCell484">
            <text:p text:style-name="P485"><text:span text:style-name="T486">Total</text:span></text:p>
          </table:table-cell>
          <table:table-cell table:style-name="TableCell487">
            <text:p text:style-name="P488">~42 172</text:p>
          </table:table-cell>
          <table:table-cell table:style-name="TableCell489">
            <text:p text:style-name="P490"><text:span text:style-name="T491">100 %</text:span></text:p>
          </table:table-cell>
        </table:table-row>
      </table:table>
      <text:p text:style-name="Normal"/>
      <text:p text:style-name="Normal"/>
      <text:p text:style-name="Normal">Le camembert met en évidence trois éléments majeurs :</text:p>
      <text:list text:style-name="LFO17" text:continue-numbering="true">
        <text:list-item>
          <text:p text:style-name="P492"><text:span text:style-name="T493">La domination écrasante du nucléaire</text:span><text:s/>(~82 % en moyenne), qui constitue le<text:s/><text:span text:style-name="T494">socle historique</text:span><text:s/>du système électrique français. Cette<text:s/><text:soft-page-break/>singularité — unique en Europe — découle des choix énergétiques effectués dans les années 1970-1980 (plan Messmer).</text:p>
        </text:list-item>
        <text:list-item>
          <text:p text:style-name="P495"><text:span text:style-name="T496">L'hydraulique en deuxième position</text:span><text:s/>(~12,5 %), source renouvelable historique reposant sur les<text:s/><text:span text:style-name="T497">barrages alpins, pyrénéens et du Massif central</text:span>.</text:p>
        </text:list-item>
        <text:list-item>
          <text:p text:style-name="P498"><text:span text:style-name="T499">L'éolien et le solaire restent minoritaires en moyenne</text:span><text:span text:style-name="T500"><text:s/>(~5,6 % cumulés), mais cette moyenne<text:s/></text:span><text:span text:style-name="T501">masque leur forte croissance récente</text:span><text:span text:style-name="T502"><text:s/>(cf. section 3). Si l'on calculait la part moyenne<text:s/></text:span><text:span text:style-name="T503">uniquement sur 2020-2022</text:span><text:span text:style-name="T504">, l'éolien et le solaire dépasseraient les<text:s/></text:span><text:span text:style-name="T505">10 %</text:span><text:span text:style-name="T506"><text:s/>du mix.</text:span></text:p>
        </text:list-item>
      </text:list>
      <text:h text:style-name="Titre3" text:outline-level="3"><text:bookmark-start text:name="_Toc229338121"/>4.2 Mise en perspective : un mix bas-carbone<text:bookmark-end text:name="_Toc229338121"/></text:h>
      <text:p text:style-name="Normal">Au-delà des chiffres, ce mix présente une caractéristique structurelle remarquable :<text:s/><text:span text:style-name="T507">plus de 95 % de l'électricité produite en France est décarbonée</text:span><text:s/>(nucléaire + hydraulique + éolien + solaire), ce qui place la France parmi les pays européens<text:s/><text:span text:style-name="T508">les moins émetteurs de CO2 par kWh produit</text:span>. Ce constat est essentiel pour les analyses ultérieures sur les émissions et la consommation énergétique globale (parties B et C).</text:p>
      <text:list text:style-name="LFO16" text:continue-numbering="true">
        <text:list-item>
          <text:p text:style-name="P509"><text:bookmark-start text:name="_Toc229338122"/>Conclusion de la Partie A<text:bookmark-end text:name="_Toc229338122"/></text:p>
        </text:list-item>
      </text:list>
      <text:p text:style-name="Normal">L'analyse statistique de la production électrique française entre<text:s/><text:span text:style-name="T510">2006 et 2022</text:span><text:s/>a permis de mettre en évidence<text:s/><text:span text:style-name="T511">quatre</text:span><text:span text:style-name="T512"><text:s/>grands enseignements</text:span><text:s/>:</text:p>
      <text:p text:style-name="Normal"/>
      <text:list text:style-name="LFO18" text:continue-numbering="true">
        <text:list-item>
          <text:p text:style-name="P513">Un mix électrique historiquement dominé par le nucléaire :<text:s/>Avec environ<text:s/><text:span text:style-name="T514">82 % de la production moyenne</text:span>, le nucléaire constitue le pilier du système électrique français. L'hydraulique apporte un complément stable (~12,5 %), tandis que les énergies éolienne et solaire, bien qu'en forte croissance, ne pesaient encore qu'environ<text:s/><text:span text:style-name="T515">5,6 %</text:span><text:s/>sur la moyenne de la période.</text:p>
        </text:list-item>
      </text:list>
      <text:p text:style-name="Paragraphedeliste"/>
      <text:list text:style-name="LFO18" text:continue-numbering="true">
        <text:list-item>
          <text:p text:style-name="P516">Une transformation progressive sous l'effet de la transition énergétique :<text:s/>Les analyses temporelles (section 3) révèlent une<text:s/><text:span text:style-name="T517">dynamique nette</text:span><text:s/>:</text:p>
        </text:list-item>
      </text:list>
      <text:p text:style-name="Paragraphedeliste">L'éolien a vu sa production<text:s/><text:span text:style-name="T518">multipliée par 17</text:span><text:s/>entre 2006 et 2022.</text:p>
      <text:p text:style-name="Paragraphedeliste">Le solaire, parti de zéro en 2010, a atteint<text:s/><text:span text:style-name="T519">près de 1 600 GWh mensuels</text:span><text:s/>en<text:s/>fin de période.</text:p>
      <text:p text:style-name="Paragraphedeliste">À l'inverse, la<text:s/><text:span text:style-name="T520">production nucléaire a chuté d'environ 35 %</text:span>, marquant la fin d'une ère de production stable et abondante.</text:p>
      <text:p text:style-name="Paragraphedeliste"/>
      <text:list text:style-name="LFO18" text:continue-numbering="true">
        <text:list-item>
          <text:p text:style-name="P521">Des saisonnalités contrastées mais complémentaires :<text:s/></text:p>
        </text:list-item>
      </text:list>
      <text:soft-page-break/>
      <text:p text:style-name="P522">Chaque source présente sa propre signature saisonnière :</text:p>
      <text:list text:style-name="LFO20" text:continue-numbering="true">
        <text:list-item>
          <text:p text:style-name="P523"><text:span text:style-name="T524">Hydraulique</text:span><text:s/>: pic au printemps (fonte des neiges)</text:p>
        </text:list-item>
        <text:list-item>
          <text:p text:style-name="P525"><text:span text:style-name="T526">Éolien</text:span><text:s/>: pic en hiver (vents forts)</text:p>
        </text:list-item>
        <text:list-item>
          <text:p text:style-name="P527"><text:span text:style-name="T528">Solaire</text:span><text:s/>: pic en été (ensoleillement)</text:p>
        </text:list-item>
        <text:list-item>
          <text:p text:style-name="P529"><text:span text:style-name="T530">Nucléaire</text:span><text:s/>: creux en été (maintenance)</text:p>
        </text:list-item>
        <text:list-item>
          <text:p text:style-name="P531">Cette<text:s/><text:span text:style-name="T532">complémentarité naturelle</text:span><text:s/>entre les sources est un atout pour la<text:s/><text:span text:style-name="T533">stabilité du mix</text:span><text:s/>et la sécurité d'approvisionnement.</text:p>
        </text:list-item>
      </text:list>
      <text:p text:style-name="Paragraphedeliste"/>
      <text:list text:style-name="LFO18" text:continue-numbering="true">
        <text:list-item>
          <text:p text:style-name="P534">L'année 2022 : un point de bascule :</text:p>
        </text:list-item>
      </text:list>
      <text:p text:style-name="Paragraphedeliste">Plusieurs indicateurs convergent en 2022 :</text:p>
      <text:list text:style-name="LFO19" text:continue-numbering="true">
        <text:list-item>
          <text:p text:style-name="P535">Effondrement de la production nucléaire (crise de corrosion sous contrainte)</text:p>
        </text:list-item>
        <text:list-item>
          <text:p text:style-name="P536">Sécheresse exceptionnelle (baisse de l'hydraulique)</text:p>
        </text:list-item>
        <text:list-item>
          <text:p text:style-name="P537">France devenue<text:s/><text:span text:style-name="T538">importatrice nette d'électricité</text:span><text:s/>pour la première fois depuis des décennies</text:p>
        </text:list-item>
      </text:list>
      <text:p text:style-name="Paragraphedeliste">Ces événements illustrent la<text:s/><text:span text:style-name="T539">fragilité du système électrique</text:span><text:s/>face à la conjonction de chocs structurels et conjoncturels.</text:p>
      <text:p text:style-name="Paragraphedeliste"/>
      <text:p text:style-name="Paragraphedeliste">Cette analyse de la production appelle naturellement deux questionnements complémentaires, qui seront explorés dans les parties suivantes :</text:p>
      <text:list text:style-name="LFO21" text:continue-numbering="true">
        <text:list-item>
          <text:p text:style-name="P540"><text:span text:style-name="T541">Partie B</text:span><text:s/>: comment la<text:s/><text:span text:style-name="T542">consommation électrique</text:span><text:s/>évolue-t-elle, et dans quelle mesure dépend-elle du<text:s/><text:span text:style-name="T543">climat</text:span><text:s/>?</text:p>
        </text:list-item>
        <text:list-item>
          <text:p text:style-name="P544"><text:span text:style-name="T545">Partie C</text:span><text:s/>: quel est l'impact du mix énergétique global sur les<text:s/><text:span text:style-name="T546">émissions de CO2</text:span><text:s/>et l'<text:span text:style-name="T547">indépendance énergétique</text:span><text:s/>de la France ?</text:p>
        </text:list-item>
      </text:list>
      <text:p text:style-name="Paragraphedelist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229338123"/>PARTIE B – La consommation électrique et sa thermo sensibilité (2011-2022)<text:bookmark-end text:name="_Toc229338123"/></text:h>
      <text:p text:style-name="P548"/>
      <text:p text:style-name="P549">Cette analyse fait suite à l'étude de la production (Partie A) pour comprendre comment la consommation électrique évolue au fil du temps et dans quelle mesure elle dépend du climat. La problématique étudiée est la suivante : « Comment se répartit la demande électrique française au fil des saisons, et quel est l'impact réel du froid sur le dimensionnement de notre consommation ? » Pour y répondre, nous avons modélisé les données de consommation avec l'indice de rigueur climatique (DJU - Degrés Jours Unifiés) à travers 4 graphiques et une série d'indicateurs statistiques.</text:p>
      <text:p text:style-name="P550"/>
      <text:h text:style-name="Titre2" text:outline-level="2"><text:bookmark-start text:name="_Toc229338124"/>1. Présentation et traitement des données<text:bookmark-end text:name="_Toc229338124"/></text:h>
      <text:h text:style-name="Titre3" text:outline-level="3"><text:bookmark-start text:name="_Toc229338125"/>1.1 Source et structure<text:bookmark-end text:name="_Toc229338125"/></text:h>
      <text:p text:style-name="P551"/>
      <text:p text:style-name="Normal"><text:span text:style-name="T552">·<text:s/></text:span><text:span text:style-name="T553">Période couverte :</text:span><text:span text:style-name="T554"><text:s/>de janvier 2011 à décembre 2022.</text:span></text:p>
      <text:p text:style-name="Normal"><text:span text:style-name="T555">·<text:s/></text:span><text:span text:style-name="T556">Fréquence :</text:span><text:span text:style-name="T557"><text:s/>mensuelle.</text:span></text:p>
      <text:p text:style-name="Normal"><text:span text:style-name="T558">·<text:s/></text:span><text:span text:style-name="T559">Nombre d’observations :</text:span><text:span text:style-name="T560"><text:s/>144 lignes de données conjointes.</text:span></text:p>
      <text:p text:style-name="Normal"><text:span text:style-name="T561">·<text:s/></text:span><text:span text:style-name="T562">Variables retenues :</text:span><text:span text:style-name="T563"><text:s/>Consommation électrique totale (en GWh) et Indice de rigueur climatique (DJU mensuel).</text:span></text:p>
      <text:p text:style-name="P564"/>
      <text:h text:style-name="Titre3" text:outline-level="3"><text:bookmark-start text:name="_Toc229338126"/>1.2 Traitement effectué<text:bookmark-end text:name="_Toc229338126"/></text:h>
      <text:p text:style-name="P565"/>
      <text:soft-page-break/>
      <text:p text:style-name="Normal"><text:span text:style-name="T566">·<text:s/></text:span><text:span text:style-name="T567">Nettoyage des séries :</text:span><text:span text:style-name="T568"><text:s/>Pour que la modélisation mathématique (nuage de points) soit exacte, nous avons dû isoler et faire correspondre strictement les mois possédant à la fois une valeur de consommation et une valeur de DJU, en écartant les données incomplètes.</text:span></text:p>
      <text:p text:style-name="Normal"><text:span text:style-name="T569">·<text:s/></text:span><text:span text:style-name="T570">Catégorisation temporelle :</text:span><text:span text:style-name="T571"><text:s/>Regroupement des données par mois de l'année et par saison météorologique (Hiver/Été) pour permettre l'analyse de la dispersion via un diagramme en boîtes.</text:span></text:p>
      <text:p text:style-name="Normal"><text:span text:style-name="T572">·<text:s/></text:span><text:span text:style-name="T573">Calculs statistiques :</text:span><text:span text:style-name="T574"><text:s/>Génération des indicateurs de position (moyenne) et de dispersion (écart-type, minimum, maximum) pour chiffrer la volatilité de la demande.</text:span></text:p>
      <text:h text:style-name="Titre2" text:outline-level="2"><text:bookmark-start text:name="_Toc229338127"/>2. Évolution temporelle de la consommation et du climat<text:bookmark-end text:name="_Toc229338127"/></text:h>
      <text:p text:style-name="Normal">Figure 1 – Évolution de la consommation électrique et de la rigueur climatique<text:span text:style-name="T575"><draw:frame draw:style-name="a12" draw:name="Graphique 1" text:anchor-type="as-char" svg:x="0in" svg:y="0in" svg:width="6.80903in" svg:height="5.11042in" style:rel-width="scale" style:rel-height="scale"><draw:object xlink:href="Object 1/" xlink:type="simple" xlink:show="embed" xlink:actuate="onLoad"/><svg:title/><svg:desc/></draw:frame></text:span><text:span text:style-name="T576"><text:s/></text:span><text:soft-page-break/><text:span text:style-name="T577"><draw:frame draw:style-name="a13" draw:name="Graphique 1" text:anchor-type="as-char" svg:x="0in" svg:y="0in" svg:width="6.80903in" svg:height="4.33681in" style:rel-width="scale" style:rel-height="scale"><draw:object xlink:href="Object 2/" xlink:type="simple" xlink:show="embed" xlink:actuate="onLoad"/><svg:title/><svg:desc/></draw:frame></text:span></text:p>
      <text:p text:style-name="Normal"><text:span text:style-name="T578">Ces deux graphiques superposent l'évolution de la charge du réseau électrique et celle des températures (DJU) sur une décennie complète. Il met en évidence plusieurs phénomènes : ·<text:s/></text:span><text:span text:style-name="T579">Une synchronisation parfaite :</text:span><text:span text:style-name="T580"><text:s/>L'analyse visuelle de la série temporelle révèle une cyclicité évidente. Chaque variation brutale de température (les pics de DJU, synonymes de mois froids) se traduit instantanément par un bond proportionnel de la consommation électrique. ·<text:s/></text:span><text:span text:style-name="T581">Une stabilité tendancielle :</text:span><text:span text:style-name="T582"><text:s/>Contrairement à la production de certaines énergies renouvelables étudiées en Partie A qui sont en forte croissance, la consommation globale de fond reste remarquablement "plate" sur la période 2011-2022. Cela suggère que la multiplication des appareils électroniques dans les foyers est aujourd'hui compensée par l'amélioration de l'efficacité énergétique des bâtiments et des équipements.</text:span></text:p>
      <text:h text:style-name="Titre2" text:outline-level="2"><text:bookmark-start text:name="_Toc229338128"/>3. Corrélation et modélisation de la thermo sensibilité<text:bookmark-end text:name="_Toc229338128"/></text:h>
      <text:p text:style-name="Normal">Figure 2 – Modélisation de la relation entre consommation et DJU</text:p>
      <text:soft-page-break/>
      <text:p text:style-name="Normal"><text:span text:style-name="T583"><draw:frame draw:style-name="a14" draw:name="Graphique 1" text:anchor-type="as-char" svg:x="0in" svg:y="0in" svg:width="5.91458in" svg:height="5.08333in" style:rel-width="scale" style:rel-height="scale"><draw:object xlink:href="Object 3/" xlink:type="simple" xlink:show="embed" xlink:actuate="onLoad"/><svg:title/><svg:desc/></draw:frame></text:span></text:p>
      <text:p text:style-name="P584">Ce nuage de points est le cœur de notre analyse. Il permet de passer d'un simple constat visuel à une mesure mathématique précise de l'influence du climat sur le réseau.</text:p>
      <text:p text:style-name="Normal"><text:span text:style-name="T585">·<text:s/></text:span><text:span text:style-name="T586">Un modèle performant :</text:span><text:span text:style-name="T587"><text:s/>Le coefficient de détermination obtenu est de<text:s/></text:span><text:span text:style-name="T588">$R^2 = 0,59$</text:span><text:span text:style-name="T589">. Ce score est élevé pour une analyse à variable unique. Il démontre que près de 60 % des variations de la consommation électrique nationale s'expliquent uniquement par la chute des températures.</text:span></text:p>
      <text:p text:style-name="Normal"><text:span text:style-name="T590">·<text:s/></text:span><text:span text:style-name="T591">Le calcul de la thermo sensibilité :</text:span><text:span text:style-name="T592"><text:s/>L'équation de la droite de régression linéaire permet d'extraire la "sensibilité au froid" du pays. La pente nous indique que pour chaque point de DJU supplémentaire, la consommation électrique augmente de<text:s/></text:span><text:span text:style-name="T593">185,2 GWh</text:span><text:span text:style-name="T594">. C'est ce chiffre critique qui permet aux gestionnaires du réseau d'anticiper les risques de coupure lors des vagues de froid.</text:span></text:p>
      <text:p text:style-name="Normal"><text:span text:style-name="T595">·<text:s/></text:span><text:span text:style-name="T596">Le socle incompressible :</text:span><text:span text:style-name="T597"><text:s/>L'ordonnée à l'origine (le point de départ de la droite de tendance) se situe aux alentours de<text:s/></text:span><text:span text:style-name="T598">86 048 GWh</text:span><text:span text:style-name="T599">. Cette valeur matérialise le "talon de consommation" de la France : c'est l'énergie minimale requise pour faire tourner l'industrie, les serveurs informatiques et l'éclairage, indépendamment de tout besoin en chauffage.</text:span></text:p>
      <text:h text:style-name="Titre2" text:outline-level="2"><text:bookmark-start text:name="_Toc229338129"/><text:soft-page-break/>4. Analyse de la saisonnalité et des risques de dispersion<text:bookmark-end text:name="_Toc229338129"/></text:h>
      <text:h text:style-name="Titre3" text:outline-level="3"><text:bookmark-start text:name="_Toc229338130"/>4.1 Le profil de charge mensuel<text:bookmark-end text:name="_Toc229338130"/></text:h>
      <text:p text:style-name="P600">Figure 3 – Consommation moyenne par mois</text:p>
      <text:p text:style-name="Normal"><text:span text:style-name="T601"><draw:frame draw:style-name="a15" draw:name="Graphique 1" text:anchor-type="as-char" svg:x="0in" svg:y="0in" svg:width="6.3in" svg:height="2.93403in" style:rel-width="scale" style:rel-height="scale"><draw:object xlink:href="Object 4/" xlink:type="simple" xlink:show="embed" xlink:actuate="onLoad"/><svg:title/><svg:desc/></draw:frame></text:span></text:p>
      <text:p text:style-name="Normal"><text:span text:style-name="T602">·<text:s/></text:span><text:span text:style-name="T603">Le cycle annuel en "U" :</text:span><text:span text:style-name="T604"><text:s/>L'histogramme met en évidence une saisonnalité extrême. Les mois d'hiver (janvier et décembre en tête) marquent les pics absolus de demande, tandis que le creux est logiquement atteint au cœur de l'été (juillet et août).</text:span></text:p>
      <text:p text:style-name="Normal"><text:span text:style-name="T605">·<text:s/></text:span><text:span text:style-name="T606">Le poids massif du chauffage électrique :</text:span><text:span text:style-name="T607"><text:s/>L'écart de volume entre la période estivale et hivernale est spectaculaire. La demande totale double quasiment entre le plein été et le pic de l'hiver. Cela confirme que le chauffage des bâtiments est le principal moteur de dépense énergétique du pays.</text:span></text:p>
      <text:h text:style-name="Titre3" text:outline-level="3"><text:bookmark-start text:name="_Toc229338131"/>4.2 L'étude de la variabilité (Diagramme en boîtes)<text:bookmark-end text:name="_Toc229338131"/></text:h>
      <text:p text:style-name="P608">Figure 4 – Dispersion de la consommation par saison</text:p>
      <text:soft-page-break/>
      <text:p text:style-name="Normal"><text:span text:style-name="T609"><draw:frame draw:style-name="a16" draw:name="Graphique 1" text:anchor-type="as-char" svg:x="0in" svg:y="0in" svg:width="6.3in" svg:height="3.69931in" style:rel-width="scale" style:rel-height="scale"><draw:image xlink:href="media/image11.png" xlink:type="simple" xlink:show="embed" xlink:actuate="onLoad"/><svg:title/><svg:desc/></draw:frame></text:span></text:p>
      <text:p text:style-name="P610">Ce graphique permet de comprendre que toutes les saisons ne présentent pas le même niveau de risque pour le réseau électrique :</text:p>
      <text:p text:style-name="Normal"><text:span text:style-name="T611">·<text:s/></text:span><text:span text:style-name="T612">L'hiver, une saison sous haute tension :</text:span><text:span text:style-name="T613"><text:s/>Le diagramme montre que la saison hivernale est caractérisée par une très forte dispersion (la "boîte" est très étalée). La consommation y est particulièrement instable, car elle dépend de la rudesse imprévisible de la météo (la différence d'énergie requise entre un hiver très doux et une vague de froid polaire est immense).</text:span></text:p>
      <text:p text:style-name="Normal"><text:span text:style-name="T614">·<text:s/></text:span><text:span text:style-name="T615">L'été, une saison sous contrôle :</text:span><text:span text:style-name="T616"><text:s/>À l'inverse, la boîte représentant l'été est extrêmement resserrée. La consommation estivale est prévisible, stable et repose sur des usages constants qui varient très peu d'une année sur l'autre.</text:span></text:p>
      <text:h text:style-name="Titre3" text:outline-level="3"><text:bookmark-start text:name="_Toc229338132"/>4.3 Synthèse des indicateurs statistiques<text:bookmark-end text:name="_Toc229338132"/></text:h>
      <text:p text:style-name="P617">Figure 5 – Tableau des statistiques de consommation</text:p>
      <text:p text:style-name="Normal"><text:span text:style-name="T618"><draw:frame draw:style-name="a17" draw:name="Image 1" text:anchor-type="as-char" svg:x="0in" svg:y="0in" svg:width="6.3in" svg:height="2.02014in" style:rel-width="scale" style:rel-height="scale"><draw:image xlink:href="media/image12.png" xlink:type="simple" xlink:show="embed" xlink:actuate="onLoad"/><svg:title/><svg:desc/></draw:frame></text:span></text:p>
      <text:p text:style-name="Normal"><text:span text:style-name="T619">·<text:s/></text:span><text:span text:style-name="T620">La confirmation mathématique :</text:span><text:span text:style-name="T621"><text:s/>Les indicateurs calculés viennent appuyer nos observations graphiques. L'écart-type (qui mesure l'étalement des données autour de la moyenne) est massivement supérieur en hiver par rapport à l'été.<text:s/></text:span><text:soft-page-break/><text:span text:style-name="T622">Cela prouve mathématiquement la forte volatilité de la demande hivernale.</text:span></text:p>
      <text:p text:style-name="Normal"><text:span text:style-name="T623">·<text:s/></text:span><text:span text:style-name="T624">L'analyse des extrêmes :</text:span><text:span text:style-name="T625"><text:s/>Les minimums et maximums du tableau permettent d'identifier les mois exceptionnels de la décennie. Les maximums absolus correspondent aux vagues de froid historiques qui ont obligé la France à faire tourner son parc de production (étudié en Partie A) à plein régime.</text:span></text:p>
      <text:h text:style-name="Titre2" text:outline-level="2"><text:bookmark-start text:name="_Toc229338133"/>5. Conclusion de la Partie B<text:bookmark-end text:name="_Toc229338133"/></text:h>
      <text:p text:style-name="Normal"><text:span text:style-name="T626">L'analyse des données de consommation électrique entre 2011 et 2022 permet de tirer<text:s/></text:span><text:span text:style-name="T627">trois grands enseignements</text:span><text:span text:style-name="T628"><text:s/>:</text:span></text:p>
      <text:p text:style-name="Normal"><text:span text:style-name="T629">Une thermo sensibilité critique :</text:span><text:span text:style-name="T630"><text:s/>L'omniprésence du chauffage électrique rend le réseau français extrêmement vulnérable au climat. La demande augmente de 185,2 GWh à chaque degré perdu en hiver.</text:span></text:p>
      <text:p text:style-name="Normal"><text:span text:style-name="T631">Une asymétrie des risques d'approvisionnement :</text:span><text:span text:style-name="T632"><text:s/>Si la consommation estivale forme un "talon" stable et facile à anticiper, la période hivernale est soumise à une forte imprévisibilité statistique.</text:span></text:p>
      <text:p text:style-name="Normal"><text:span text:style-name="T633">Un enjeu direct pour le parc de production :</text:span><text:span text:style-name="T634"><text:s/>Ces pics hivernaux exigent une grande flexibilité. Comme vu en Partie A, la complémentarité entre le nucléaire, l'hydraulique et l'éolien est indispensable pour absorber ces variations extrêmes.</text:span></text:p>
      <text:p text:style-name="P635">Cette forte demande hivernale soulève un défi majeur : quand les sources bas-carbone ne suffisent plus à couvrir le pic de froid, le recours aux énergies fossiles devient inévitable. Ce constat fera l'objet de l'analyse sur les émissions de CO2 de la Partie C.</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OLE_LINK1"/><text:bookmark-start text:name="_Toc229338134"/><text:soft-page-break/>Partie C : Mix énergétique, indépendance et CO2<text:bookmark-end text:name="_Toc229338134"/></text:h>
      <text:p text:style-name="P636"><text:tab/>Dans cette partie, nous abordons l’évolution du mix énergétique français sur la période de notre travail, de 2006 à 2022, en observant son degré de dépendance et la corrélation entre la consommation d’énergie et les émissions de dioxyde de carbone (CO2).</text:p>
      <text:p text:style-name="P637"/>
      <text:list text:style-name="LFO23" text:continue-numbering="true">
        <text:list-item>
          <text:p text:style-name="P638"><text:bookmark-start text:name="_Toc229338135"/>Observation du mix énergétique<text:bookmark-end text:name="_Toc229338135"/></text:p>
        </text:list-item>
      </text:list>
      <text:p text:style-name="Normal">Le mix énergétique national s’observe avec deux grandes catégories de sources d’énergie : les énergies dites fossiles (charbon, pétrole, gaz) et les énergies dites décarbonées (le nucléaire et les énergies renouvelables).</text:p>
      <text:p text:style-name="Normal"><draw:frame draw:style-name="a18" draw:name="Graphique 1" text:anchor-type="as-char" svg:x="0in" svg:y="0in" svg:width="6.3in" svg:height="3.32014in" style:rel-width="scale" style:rel-height="scale"><draw:object xlink:href="Object 5/" xlink:type="simple" xlink:show="embed" xlink:actuate="onLoad"/><svg:title/><svg:desc/></draw:frame></text:p>
      <text:p text:style-name="P639">Évolution du mix énergétique français</text:p>
      <text:p text:style-name="Normal">Nous pouvons observer sur ce graphique que les parts des différentes sources d’énergies sont assez stables sur toute la période étudiée. On peut observer une tendance à la baisse de la consommation du charbon.</text:p>
      <text:p text:style-name="Normal"/>
      <text:soft-page-break/>
      <text:p text:style-name="Normal"><draw:frame draw:style-name="a19" draw:name="Graphique 1" text:anchor-type="as-char" svg:x="0in" svg:y="0in" svg:width="6.3in" svg:height="4.04236in" style:rel-width="scale" style:rel-height="scale"><draw:object xlink:href="Object 6/" xlink:type="simple" xlink:show="embed" xlink:actuate="onLoad"/><svg:title/><svg:desc/></draw:frame></text:p>
      <text:p text:style-name="P640">Évolution du mix énergétique français</text:p>
      <text:p text:style-name="Normal">Avec ce graphique, en moyenne sur cette période, nous pouvons observer également qu’il n’y a pas de différence assez franche entre ces deux types d’énergies, avec une tendance à être légèrement plus dépendant aux énergies fossiles.</text:p>
      <text:p text:style-name="P641"/>
      <text:list text:style-name="LFO23" text:continue-numbering="true">
        <text:list-item>
          <text:p text:style-name="P642"><text:bookmark-start text:name="_Toc229338136"/><text:soft-page-break/>Indépendance énergétique et flux commerciaux<text:bookmark-end text:name="_Toc229338136"/></text:p>
        </text:list-item>
      </text:list>
      <text:p text:style-name="Normal">Nous savons que l’indépendance énergétique est un enjeu de souveraineté majeur. En France, notre parc de production d’énergies décarbonées est un avantage pour assurer à termes cet enjeu.</text:p>
      <table:table table:style-name="Table643">
        <table:table-columns>
          <table:table-column table:style-name="TableColumn644"/>
          <table:table-column table:style-name="TableColumn645"/>
        </table:table-columns>
        <table:table-row table:style-name="TableRow646">
          <table:table-cell table:style-name="TableCell647">
            <text:p text:style-name="Normal">Moyenne</text:p>
          </table:table-cell>
          <table:table-cell table:style-name="TableCell648">
            <text:p text:style-name="Normal">49,88865025</text:p>
          </table:table-cell>
        </table:table-row>
        <table:table-row table:style-name="TableRow649">
          <table:table-cell table:style-name="TableCell650">
            <text:p text:style-name="Normal">Écart-type</text:p>
          </table:table-cell>
          <table:table-cell table:style-name="TableCell651">
            <text:p text:style-name="Normal">1,552803715</text:p>
          </table:table-cell>
        </table:table-row>
        <table:table-row table:style-name="TableRow652">
          <table:table-cell table:style-name="TableCell653">
            <text:p text:style-name="Normal">Minimum</text:p>
          </table:table-cell>
          <table:table-cell table:style-name="TableCell654">
            <text:p text:style-name="Normal">44,884</text:p>
          </table:table-cell>
        </table:table-row>
        <table:table-row table:style-name="TableRow655">
          <table:table-cell table:style-name="TableCell656">
            <text:p text:style-name="Normal">Maximum</text:p>
          </table:table-cell>
          <table:table-cell table:style-name="TableCell657">
            <text:p text:style-name="Normal">53,246</text:p>
          </table:table-cell>
        </table:table-row>
      </table:table>
      <text:p text:style-name="P658">Analyse du taux d’indépendance</text:p>
      <text:p text:style-name="Normal">En moyenne, nous pouvons observer sur la période un taux d’indépendance d’environ 49,89%. Sur la période donnée, l’écart-type est d’environ 1,55%, ce qui montre une stabilité du taux d’indépendance. Il a pu évoluer d’environ 44,88% à 53,25%.</text:p>
      <text:p text:style-name="P659"><draw:frame draw:style-name="a20" draw:name="Graphique 1" text:anchor-type="as-char" svg:x="0in" svg:y="0in" svg:width="6.30903in" svg:height="3.76111in" style:rel-width="scale" style:rel-height="scale"><draw:object xlink:href="Object 7/" xlink:type="simple" xlink:show="embed" xlink:actuate="onLoad"/><svg:title/><svg:desc/></draw:frame></text:p>
      <text:p text:style-name="P660">Imports et exports d’énergie par année</text:p>
      <text:p text:style-name="Normal">Nous pouvons observer ici que l’importation totale d’énergie est bien supérieure aux exportations totales. Précédemment nous avons observé une part significative était issue des hydrocarbures, dont le pétrole à 33% et le gaz à 16%. Ceux-ci sont issues majoritairement d’importations et correspondent à des utilisations qui ne peuvent pas être remplacées facilement, notamment pour le pétrole avec le secteur du transport par exemple. En contrepartie, notre parc nucléaire imposant permet d’être exportatrice nette dans la production et distribution d’électricité.</text:p>
      <text:p text:style-name="P661"/>
      <text:list text:style-name="LFO23" text:continue-numbering="true">
        <text:list-item>
          <text:p text:style-name="P662"><text:bookmark-start text:name="_Toc229338137"/><text:soft-page-break/>Corrélation entre consommation et émission de CO2<text:bookmark-end text:name="_Toc229338137"/></text:p>
        </text:list-item>
      </text:list>
      <text:p text:style-name="Normal">Cette section aborde le lien entre les émission de CO2 et la consommation d’énergie</text:p>
      <table:table table:style-name="Table663">
        <table:table-columns>
          <table:table-column table:style-name="TableColumn664"/>
          <table:table-column table:style-name="TableColumn665"/>
          <table:table-column table:style-name="TableColumn666"/>
        </table:table-columns>
        <table:table-row table:style-name="TableRow667">
          <table:table-cell table:style-name="TableCell668">
            <text:p text:style-name="P669">Type</text:p>
          </table:table-cell>
          <table:table-cell table:style-name="TableCell670">
            <text:p text:style-name="P671">Consommation totale - Emission CO2</text:p>
          </table:table-cell>
          <table:table-cell table:style-name="TableCell672">
            <text:p text:style-name="P673">Consommation fossiles - CO2</text:p>
          </table:table-cell>
        </table:table-row>
        <table:table-row table:style-name="TableRow674">
          <table:table-cell table:style-name="TableCell675">
            <text:p text:style-name="P676">Coefficient de correlation</text:p>
          </table:table-cell>
          <table:table-cell table:style-name="TableCell677">
            <text:p text:style-name="P678">0,96603668</text:p>
          </table:table-cell>
          <table:table-cell table:style-name="TableCell679">
            <text:p text:style-name="P680">0,996866047</text:p>
          </table:table-cell>
        </table:table-row>
        <table:table-row table:style-name="TableRow681">
          <table:table-cell table:style-name="TableCell682">
            <text:p text:style-name="P683">Coefficient de détermination</text:p>
          </table:table-cell>
          <table:table-cell table:style-name="TableCell684">
            <text:p text:style-name="P685">0,933226868</text:p>
          </table:table-cell>
          <table:table-cell table:style-name="TableCell686">
            <text:p text:style-name="P687"/>
          </table:table-cell>
        </table:table-row>
        <table:table-row table:style-name="TableRow688">
          <table:table-cell table:style-name="TableCell689">
            <text:p text:style-name="P690">Pente de la droite</text:p>
          </table:table-cell>
          <table:table-cell table:style-name="TableCell691">
            <text:p text:style-name="P692">0,132966056</text:p>
          </table:table-cell>
          <table:table-cell table:style-name="TableCell693">
            <text:p text:style-name="P694"/>
          </table:table-cell>
        </table:table-row>
        <table:table-row table:style-name="TableRow695">
          <table:table-cell table:style-name="TableCell696">
            <text:p text:style-name="P697">Ordonnée à l'origine</text:p>
          </table:table-cell>
          <table:table-cell table:style-name="TableCell698">
            <text:p text:style-name="P699">-2978,634937</text:p>
          </table:table-cell>
          <table:table-cell table:style-name="TableCell700">
            <text:p text:style-name="P701"/>
          </table:table-cell>
        </table:table-row>
      </table:table>
      <text:p text:style-name="Normal"/>
      <text:p text:style-name="Normal">Si nous pouvons voir une forte corrélation entre la consommation totale et les émissions de CO2, elle est encore plus forte avec les énergies fossiles. Cela s’explique avec plusieurs informations. Lors de l’analyse du mix énergétique, les parts restent assez stables sur les proportions des sources d’énergies au fil des années.<text:s/></text:p>
      <text:soft-page-break/>
      <text:p text:style-name="Normal"><draw:frame draw:style-name="a21" draw:name="Graphique 1" text:anchor-type="as-char" svg:x="0in" svg:y="0in" svg:width="6.45139in" svg:height="5in" style:rel-width="scale" style:rel-height="scale"><draw:object xlink:href="Object 8/" xlink:type="simple" xlink:show="embed" xlink:actuate="onLoad"/><svg:title/><svg:desc/></draw:frame></text:p>
      <text:p text:style-name="P702">Lien entre consommation d’énergies fossiles et émissions de CO2</text:p>
      <text:p text:style-name="P703">Note : en abscisse la consommation d’énergie fossile en GWh, et en ordonnée les émissions de CO2 en kilotonnes.</text:p>
      <text:p text:style-name="Normal">Mais si la corrélation est plus forte avec les énergies fossiles, c’est parce que l’émission de CO2 est calculée sur la combustion des énergies fossiles. Ce graphique nous montre le lien donc entre les énergies fossiles et l’émission de CO2.<text:bookmark-end text:name="OLE_LINK1"/></text:p>
      <text:p text:style-name="Normal"/>
      <text:h text:style-name="Titre1" text:outline-level="1"><text:bookmark-start text:name="_Toc229338138"/>Conclusion général<text:bookmark-end text:name="_Toc229338138"/></text:h>
      <text:p text:style-name="Normal">Au terme de cette étude croisée, plusieurs grands enseignements se dégagent du système énergétique français entre 2006 et 2022.</text:p>
      <text:p text:style-name="Normal"/>
      <text:p text:style-name="Normal"><text:span text:style-name="T704">Sur la production électrique (Partie A)</text:span>, le mix français reste profondément marqué par le poids du nucléaire, qui représente encore plus des deux tiers de la production. Toutefois, la dynamique des dernières années montre une transformation en cours : l'éolien a vu sa production multipliée par près de 17, le solaire est passé d'une production marginale à plus de 18 000 GWh annuels, tandis que l'hydraulique reste stable mais soumise aux aléas climatiques. La<text:s/><text:soft-page-break/>crise de corrosion sous contrainte (CSC) de 2022 a par ailleurs révélé la fragilité d'un système trop concentré sur une seule source.</text:p>
      <text:p text:style-name="Normal"><text:span text:style-name="T705">Sur la consommation électrique (Partie B)</text:span>, l'analyse a mis en évidence une<text:s/><text:span text:style-name="T706">forte<text:s/></text:span><text:span text:style-name="T707">thermo sensibilité</text:span><text:s/>de la France : la consommation suit étroitement les variations de rigueur climatique, avec une régression linéaire (R² = 0,59) qui confirme statistiquement le lien entre degrés jours unifiés et consommation mensuelle. La part importante du chauffage électrique dans le pays explique cette vulnérabilité aux hivers rigoureux, vulnérabilité qui interroge la résilience du système énergétique face au changement climatique.</text:p>
      <text:p text:style-name="Normal"/>
      <text:p text:style-name="Normal"><text:span text:style-name="T708">Sur le mix énergétique global et les émissions de CO2 (Partie C)</text:span>, deux constats forts émergent. D'une part, la France demeure largement dépendante des importations de pétrole et de gaz, son taux d'indépendance énergétique restant majoritairement porté par le seul nucléaire. D'autre part, la corrélation<text:s/><text:span text:style-name="T709">quasi parfaite (r = 0,997, R² = 0,994)</text:span><text:s/>entre consommation d'énergies fossiles et émissions de CO2 démontre que la décarbonation passera nécessairement par une réduction de cette consommation, et non par des ajustements à la marge.</text:p>
      <text:p text:style-name="Normal"/>
      <text:p text:style-name="Normal"><text:span text:style-name="T710">En croisant les trois parties</text:span>, une cohérence d'ensemble apparaît : la France dispose d'un atout majeur avec son électricité décarbonée, mais cet atout est insuffisant tant que les usages fossiles (transport, chauffage non électrique, industrie) dominent la consommation finale. La transition énergétique française repose donc sur un double mouvement :<text:s/><text:span text:style-name="T711">augmenter la production électrique bas carbone</text:span><text:s/>(renouvelables + maintien d'un parc nucléaire fiable) et<text:s/><text:span text:style-name="T712">électrifier les usages aujourd'hui carbonés</text:span>.</text:p>
      <text:p text:style-name="Normal"/>
      <text:p text:style-name="Normal">Cette étude, bien que limitée aux données mensuelles agrégées au niveau national, montre tout l'intérêt d'une approche statistique pour objectiver des débats souvent dominés par les opinions. Une analyse à granularité plus fine (régionale, voire infra-journalière) permettrait d'aller plus loin, notamment sur la question de l'intermittence des renouvelables et de l'équilibre offre-demande en temps réel.</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Narrow" svg:font-family="Aptos Narrow"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fo:color="#000000" style:letter-kerning="true"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fo:color="#000000" style:letter-kerning="true" fo:font-size="18pt" style:font-size-asian="18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fo:color="#000000" fo:font-size="16pt" style:font-size-asian="16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fo:color="#2F5496"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fo:color="#595959" fo:hyphenate="false"/>
    </style:style>
    <style:style style:name="Titre8" style:display-name="Titre 8" style:family="paragraph" style:parent-style-name="Normal" style:next-style-name="Normal" style:default-outline-level="8">
      <style:paragraph-properties fo:keep-with-next="always" fo:keep-together="always"/>
      <style:text-properties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style:text-properties fo:color="#272727" fo:hyphenate="false"/>
    </style:style>
    <style:style style:name="Normal" style:display-name="Normal" style:family="paragraph">
      <style:paragraph-properties fo:widows="0" fo:orphans="0" style:text-autospace="none" fo:margin-bottom="0in" fo:line-height="100%"/>
      <style:text-properties style:font-name-asian="Times New Roman" style:letter-kerning="false" fo:font-size="14pt" style:font-size-asian="14pt"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000000"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000000" fo:font-size="18pt" style:font-size-asian="18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Calibri Light"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fo:color="#595959" fo:letter-spacing="0.0104in"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fo:widows="2" fo:orphans="2" style:text-autospace="ideograph-alpha" fo:margin-top="0.0694in" fo:margin-bottom="0.0694in"/>
      <style:text-properties style:font-name="Times New Roman"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En-têtedetabledesmatières" style:display-name="En-tête de table des matières" style:family="paragraph" style:parent-style-name="Titre1" style:next-style-name="Normal">
      <style:paragraph-properties fo:widows="2" fo:orphans="2" style:text-autospace="ideograph-alpha" fo:margin-top="0.1666in" fo:margin-bottom="0in" fo:line-height="107%"/>
      <style:text-properties style:font-name="Aptos Display" style:font-name-asian="Times New Roman" style:font-name-complex="Times New Roman" fo:color="#0F4761"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944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888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oa Moal</meta:initial-creator>
    <dc:creator>Noa Moal</dc:creator>
    <meta:creation-date>2026-05-10T18:42:00Z</meta:creation-date>
    <dc:date>2026-05-10T18:42:00Z</dc:date>
    <meta:template xlink:href="Normal.dotm" xlink:type="simple"/>
    <meta:editing-cycles>2</meta:editing-cycles>
    <meta:editing-duration>PT0S</meta:editing-duration>
    <meta:document-statistic meta:page-count="22" meta:paragraph-count="73" meta:word-count="5692" meta:character-count="36925" meta:row-count="260" meta:non-whitespace-character-count="3130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interval-major="12" chart:tick-marks-major-inner="false" chart:tick-marks-major-outer="false" chart:tick-marks-minor-inner="false" chart:tick-marks-minor-outer="false" chart:display-label="true" chart:axis-label-position="near-axis" chart:axis-position="start" chart:reverse-direction="tru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minimum="50000" chart:tick-marks-major-inner="false" chart:tick-marks-major-outer="false" chart:tick-marks-minor-inner="false" chart:tick-marks-minor-outer="false" chart:display-label="true" chart:axis-label-position="near-axis" chart:axis-position="start" chart:reverse-direction="false" chart:major-origin="500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3125in" svg:stroke-color="#156082"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367.95pt" svg:width="490.25pt" chart:style-name="Crt0">
        <chart:title chart:style-name="CT00">
          <text:p text:style-name="a0" text:class-names="" text:cond-style-name="">Evolution de la consommation</text:p>
        </chart:title>
        <chart:plot-area svg:x="2.632677165354331pt" svg:y="48.1848031496063pt" svg:width="439.8284251968504pt" svg:height="302.842283464567pt" chart:style-name="Plt0" chart:data-source-has-labels="both">
          <chart:axis chart:dimension="x" chart:name="primary-x" chart:style-name="Axs0">
            <chart:title chart:style-name="AT00">
              <text:p text:style-name="a1" text:class-names="" text:cond-style-name="">Années</text:p>
            </chart:title>
            <chart:categories table:cell-range-address="local-table.$A$2:.$A$145"/>
          </chart:axis>
          <chart:axis chart:dimension="y" chart:name="primary-y" chart:style-name="Axs1">
            <chart:title svg:x="471.4010236220473pt" svg:y="123.7259842519685pt" chart:style-name="AT01">
              <text:p text:style-name="a2" text:class-names="" text:cond-style-name="">Consommation (GWh)</text:p>
            </chart:title>
            <chart:grid chart:class="major" chart:style-name="GMa1"/>
          </chart:axis>
          <chart:series chart:label-cell-address="local-table.$B$1" chart:values-cell-range-address="local-table.$B$2:.$B$145" chart:class="chart:line" chart:attached-axis="primary-y" chart:style-name="G0S0">
            <chart:data-point chart:repeated="14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nso_CVC_CJO</text:p>
              </table:table-cell>
            </table:table-row>
          </table:table-header-rows>
          <table:table-row>
            <table:table-cell office:value-type="string">
              <text:p>2022-12</text:p>
            </table:table-cell>
            <table:table-cell office:value-type="float" office:value="101739.33"/>
          </table:table-row>
          <table:table-row>
            <table:table-cell office:value-type="string">
              <text:p>2022-11</text:p>
            </table:table-cell>
            <table:table-cell office:value-type="float" office:value="82618.320999999996"/>
          </table:table-row>
          <table:table-row>
            <table:table-cell office:value-type="string">
              <text:p>2022-10</text:p>
            </table:table-cell>
            <table:table-cell office:value-type="float" office:value="77235.451000000001"/>
          </table:table-row>
          <table:table-row>
            <table:table-cell office:value-type="string">
              <text:p>2022-09</text:p>
            </table:table-cell>
            <table:table-cell office:value-type="float" office:value="68889.017999999996"/>
          </table:table-row>
          <table:table-row>
            <table:table-cell office:value-type="string">
              <text:p>2022-08</text:p>
            </table:table-cell>
            <table:table-cell office:value-type="float" office:value="67857.819000000003"/>
          </table:table-row>
          <table:table-row>
            <table:table-cell office:value-type="string">
              <text:p>2022-07</text:p>
            </table:table-cell>
            <table:table-cell office:value-type="float" office:value="71804.539999999994"/>
          </table:table-row>
          <table:table-row>
            <table:table-cell office:value-type="string">
              <text:p>2022-06</text:p>
            </table:table-cell>
            <table:table-cell office:value-type="float" office:value="72673.888999999996"/>
          </table:table-row>
          <table:table-row>
            <table:table-cell office:value-type="string">
              <text:p>2022-05</text:p>
            </table:table-cell>
            <table:table-cell office:value-type="float" office:value="76347.869000000006"/>
          </table:table-row>
          <table:table-row>
            <table:table-cell office:value-type="string">
              <text:p>2022-04</text:p>
            </table:table-cell>
            <table:table-cell office:value-type="float" office:value="81476.797000000006"/>
          </table:table-row>
          <table:table-row>
            <table:table-cell office:value-type="string">
              <text:p>2022-03</text:p>
            </table:table-cell>
            <table:table-cell office:value-type="float" office:value="98215.301999999996"/>
          </table:table-row>
          <table:table-row>
            <table:table-cell office:value-type="string">
              <text:p>2022-02</text:p>
            </table:table-cell>
            <table:table-cell office:value-type="float" office:value="105420.47100000001"/>
          </table:table-row>
          <table:table-row>
            <table:table-cell office:value-type="string">
              <text:p>2022-01</text:p>
            </table:table-cell>
            <table:table-cell office:value-type="float" office:value="122244.81299999999"/>
          </table:table-row>
          <table:table-row>
            <table:table-cell office:value-type="string">
              <text:p>2021-12</text:p>
            </table:table-cell>
            <table:table-cell office:value-type="float" office:value="113862.836"/>
          </table:table-row>
          <table:table-row>
            <table:table-cell office:value-type="string">
              <text:p>2021-11</text:p>
            </table:table-cell>
            <table:table-cell office:value-type="float" office:value="103338.44899999999"/>
          </table:table-row>
          <table:table-row>
            <table:table-cell office:value-type="string">
              <text:p>2021-10</text:p>
            </table:table-cell>
            <table:table-cell office:value-type="float" office:value="100824.03200000001"/>
          </table:table-row>
          <table:table-row>
            <table:table-cell office:value-type="string">
              <text:p>2021-09</text:p>
            </table:table-cell>
            <table:table-cell office:value-type="float" office:value="93302.29"/>
          </table:table-row>
          <table:table-row>
            <table:table-cell office:value-type="string">
              <text:p>2021-08</text:p>
            </table:table-cell>
            <table:table-cell office:value-type="float" office:value="94077.998999999996"/>
          </table:table-row>
          <table:table-row>
            <table:table-cell office:value-type="string">
              <text:p>2021-07</text:p>
            </table:table-cell>
            <table:table-cell office:value-type="float" office:value="93748.603000000003"/>
          </table:table-row>
          <table:table-row>
            <table:table-cell office:value-type="string">
              <text:p>2021-06</text:p>
            </table:table-cell>
            <table:table-cell office:value-type="float" office:value="89891.153999999995"/>
          </table:table-row>
          <table:table-row>
            <table:table-cell office:value-type="string">
              <text:p>2021-05</text:p>
            </table:table-cell>
            <table:table-cell office:value-type="float" office:value="91972.191999999995"/>
          </table:table-row>
          <table:table-row>
            <table:table-cell office:value-type="string">
              <text:p>2021-04</text:p>
            </table:table-cell>
            <table:table-cell office:value-type="float" office:value="92509.194000000003"/>
          </table:table-row>
          <table:table-row>
            <table:table-cell office:value-type="string">
              <text:p>2021-03</text:p>
            </table:table-cell>
            <table:table-cell office:value-type="float" office:value="108001.88499999999"/>
          </table:table-row>
          <table:table-row>
            <table:table-cell office:value-type="string">
              <text:p>2021-02</text:p>
            </table:table-cell>
            <table:table-cell office:value-type="float" office:value="107337.637"/>
          </table:table-row>
          <table:table-row>
            <table:table-cell office:value-type="string">
              <text:p>2021-01</text:p>
            </table:table-cell>
            <table:table-cell office:value-type="float" office:value="126996.304"/>
          </table:table-row>
          <table:table-row>
            <table:table-cell office:value-type="string">
              <text:p>2020-12</text:p>
            </table:table-cell>
            <table:table-cell office:value-type="float" office:value="118633.62699999999"/>
          </table:table-row>
          <table:table-row>
            <table:table-cell office:value-type="string">
              <text:p>2020-11</text:p>
            </table:table-cell>
            <table:table-cell office:value-type="float" office:value="106034.62699999999"/>
          </table:table-row>
          <table:table-row>
            <table:table-cell office:value-type="string">
              <text:p>2020-10</text:p>
            </table:table-cell>
            <table:table-cell office:value-type="float" office:value="97153.659"/>
          </table:table-row>
          <table:table-row>
            <table:table-cell office:value-type="string">
              <text:p>2020-09</text:p>
            </table:table-cell>
            <table:table-cell office:value-type="float" office:value="77356.474000000002"/>
          </table:table-row>
          <table:table-row>
            <table:table-cell office:value-type="string">
              <text:p>2020-08</text:p>
            </table:table-cell>
            <table:table-cell office:value-type="float" office:value="78900.646999999997"/>
          </table:table-row>
          <table:table-row>
            <table:table-cell office:value-type="string">
              <text:p>2020-07</text:p>
            </table:table-cell>
            <table:table-cell office:value-type="float" office:value="79794.891000000003"/>
          </table:table-row>
          <table:table-row>
            <table:table-cell office:value-type="string">
              <text:p>2020-06</text:p>
            </table:table-cell>
            <table:table-cell office:value-type="float" office:value="75457.934999999998"/>
          </table:table-row>
          <table:table-row>
            <table:table-cell office:value-type="string">
              <text:p>2020-05</text:p>
            </table:table-cell>
            <table:table-cell office:value-type="float" office:value="84761.683000000005"/>
          </table:table-row>
          <table:table-row>
            <table:table-cell office:value-type="string">
              <text:p>2020-04</text:p>
            </table:table-cell>
            <table:table-cell office:value-type="float" office:value="91742.873000000007"/>
          </table:table-row>
          <table:table-row>
            <table:table-cell office:value-type="string">
              <text:p>2020-03</text:p>
            </table:table-cell>
            <table:table-cell office:value-type="float" office:value="104942.89"/>
          </table:table-row>
          <table:table-row>
            <table:table-cell office:value-type="string">
              <text:p>2020-02</text:p>
            </table:table-cell>
            <table:table-cell office:value-type="float" office:value="112056.784"/>
          </table:table-row>
          <table:table-row>
            <table:table-cell office:value-type="string">
              <text:p>2020-01</text:p>
            </table:table-cell>
            <table:table-cell office:value-type="float" office:value="127652.379"/>
          </table:table-row>
          <table:table-row>
            <table:table-cell office:value-type="string">
              <text:p>2019-12</text:p>
            </table:table-cell>
            <table:table-cell office:value-type="float" office:value="116757.08500000001"/>
          </table:table-row>
          <table:table-row>
            <table:table-cell office:value-type="string">
              <text:p>2019-11</text:p>
            </table:table-cell>
            <table:table-cell office:value-type="float" office:value="101727.058"/>
          </table:table-row>
          <table:table-row>
            <table:table-cell office:value-type="string">
              <text:p>2019-10</text:p>
            </table:table-cell>
            <table:table-cell office:value-type="float" office:value="98557.437000000005"/>
          </table:table-row>
          <table:table-row>
            <table:table-cell office:value-type="string">
              <text:p>2019-09</text:p>
            </table:table-cell>
            <table:table-cell office:value-type="float" office:value="89656.631999999998"/>
          </table:table-row>
          <table:table-row>
            <table:table-cell office:value-type="string">
              <text:p>2019-08</text:p>
            </table:table-cell>
            <table:table-cell office:value-type="float" office:value="89475.376999999993"/>
          </table:table-row>
          <table:table-row>
            <table:table-cell office:value-type="string">
              <text:p>2019-07</text:p>
            </table:table-cell>
            <table:table-cell office:value-type="float" office:value="95641.773000000001"/>
          </table:table-row>
          <table:table-row>
            <table:table-cell office:value-type="string">
              <text:p>2019-06</text:p>
            </table:table-cell>
            <table:table-cell office:value-type="float" office:value="92925.342000000004"/>
          </table:table-row>
          <table:table-row>
            <table:table-cell office:value-type="string">
              <text:p>2019-05</text:p>
            </table:table-cell>
            <table:table-cell office:value-type="float" office:value="101378.798"/>
          </table:table-row>
          <table:table-row>
            <table:table-cell office:value-type="string">
              <text:p>2019-04</text:p>
            </table:table-cell>
            <table:table-cell office:value-type="float" office:value="104769.129"/>
          </table:table-row>
          <table:table-row>
            <table:table-cell office:value-type="string">
              <text:p>2019-03</text:p>
            </table:table-cell>
            <table:table-cell office:value-type="float" office:value="118562.564"/>
          </table:table-row>
          <table:table-row>
            <table:table-cell office:value-type="string">
              <text:p>2019-02</text:p>
            </table:table-cell>
            <table:table-cell office:value-type="float" office:value="119624.963"/>
          </table:table-row>
          <table:table-row>
            <table:table-cell office:value-type="string">
              <text:p>2019-01</text:p>
            </table:table-cell>
            <table:table-cell office:value-type="float" office:value="133434.58600000001"/>
          </table:table-row>
          <table:table-row>
            <table:table-cell office:value-type="string">
              <text:p>2018-12</text:p>
            </table:table-cell>
            <table:table-cell office:value-type="float" office:value="128804.89200000001"/>
          </table:table-row>
          <table:table-row>
            <table:table-cell office:value-type="string">
              <text:p>2018-11</text:p>
            </table:table-cell>
            <table:table-cell office:value-type="float" office:value="110141.77800000001"/>
          </table:table-row>
          <table:table-row>
            <table:table-cell office:value-type="string">
              <text:p>2018-10</text:p>
            </table:table-cell>
            <table:table-cell office:value-type="float" office:value="103174.075"/>
          </table:table-row>
          <table:table-row>
            <table:table-cell office:value-type="string">
              <text:p>2018-09</text:p>
            </table:table-cell>
            <table:table-cell office:value-type="float" office:value="96200.369000000006"/>
          </table:table-row>
          <table:table-row>
            <table:table-cell office:value-type="string">
              <text:p>2018-08</text:p>
            </table:table-cell>
            <table:table-cell office:value-type="float" office:value="89685.150999999998"/>
          </table:table-row>
          <table:table-row>
            <table:table-cell office:value-type="string">
              <text:p>2018-07</text:p>
            </table:table-cell>
            <table:table-cell office:value-type="float" office:value="97487.360000000001"/>
          </table:table-row>
          <table:table-row>
            <table:table-cell office:value-type="string">
              <text:p>2018-06</text:p>
            </table:table-cell>
            <table:table-cell office:value-type="float" office:value="93112.986999999994"/>
          </table:table-row>
          <table:table-row>
            <table:table-cell office:value-type="string">
              <text:p>2018-05</text:p>
            </table:table-cell>
            <table:table-cell office:value-type="float" office:value="101143.84699999999"/>
          </table:table-row>
          <table:table-row>
            <table:table-cell office:value-type="string">
              <text:p>2018-04</text:p>
            </table:table-cell>
            <table:table-cell office:value-type="float" office:value="104119.656"/>
          </table:table-row>
          <table:table-row>
            <table:table-cell office:value-type="string">
              <text:p>2018-03</text:p>
            </table:table-cell>
            <table:table-cell office:value-type="float" office:value="119066.515"/>
          </table:table-row>
          <table:table-row>
            <table:table-cell office:value-type="string">
              <text:p>2018-02</text:p>
            </table:table-cell>
            <table:table-cell office:value-type="float" office:value="121378.588"/>
          </table:table-row>
          <table:table-row>
            <table:table-cell office:value-type="string">
              <text:p>2018-01</text:p>
            </table:table-cell>
            <table:table-cell office:value-type="float" office:value="137924.897"/>
          </table:table-row>
          <table:table-row>
            <table:table-cell office:value-type="string">
              <text:p>2017-12</text:p>
            </table:table-cell>
            <table:table-cell office:value-type="float" office:value="126402.583"/>
          </table:table-row>
          <table:table-row>
            <table:table-cell office:value-type="string">
              <text:p>2017-11</text:p>
            </table:table-cell>
            <table:table-cell office:value-type="float" office:value="103027.705"/>
          </table:table-row>
          <table:table-row>
            <table:table-cell office:value-type="string">
              <text:p>2017-10</text:p>
            </table:table-cell>
            <table:table-cell office:value-type="float" office:value="94094.212"/>
          </table:table-row>
          <table:table-row>
            <table:table-cell office:value-type="string">
              <text:p>2017-09</text:p>
            </table:table-cell>
            <table:table-cell office:value-type="float" office:value="94579.952999999994"/>
          </table:table-row>
          <table:table-row>
            <table:table-cell office:value-type="string">
              <text:p>2017-08</text:p>
            </table:table-cell>
            <table:table-cell office:value-type="float" office:value="92577.668999999994"/>
          </table:table-row>
          <table:table-row>
            <table:table-cell office:value-type="string">
              <text:p>2017-07</text:p>
            </table:table-cell>
            <table:table-cell office:value-type="float" office:value="91963.101999999999"/>
          </table:table-row>
          <table:table-row>
            <table:table-cell office:value-type="string">
              <text:p>2017-06</text:p>
            </table:table-cell>
            <table:table-cell office:value-type="float" office:value="89238.354000000007"/>
          </table:table-row>
          <table:table-row>
            <table:table-cell office:value-type="string">
              <text:p>2017-05</text:p>
            </table:table-cell>
            <table:table-cell office:value-type="float" office:value="98583.262000000002"/>
          </table:table-row>
          <table:table-row>
            <table:table-cell office:value-type="string">
              <text:p>2017-04</text:p>
            </table:table-cell>
            <table:table-cell office:value-type="float" office:value="101559.806"/>
          </table:table-row>
          <table:table-row>
            <table:table-cell office:value-type="string">
              <text:p>2017-03</text:p>
            </table:table-cell>
            <table:table-cell office:value-type="float" office:value="115976.24400000001"/>
          </table:table-row>
          <table:table-row>
            <table:table-cell office:value-type="string">
              <text:p>2017-02</text:p>
            </table:table-cell>
            <table:table-cell office:value-type="float" office:value="113502.993"/>
          </table:table-row>
          <table:table-row>
            <table:table-cell office:value-type="string">
              <text:p>2017-01</text:p>
            </table:table-cell>
            <table:table-cell office:value-type="float" office:value="132932.36499999999"/>
          </table:table-row>
          <table:table-row>
            <table:table-cell office:value-type="string">
              <text:p>2016-12</text:p>
            </table:table-cell>
            <table:table-cell office:value-type="float" office:value="121746.79399999999"/>
          </table:table-row>
          <table:table-row>
            <table:table-cell office:value-type="string">
              <text:p>2016-11</text:p>
            </table:table-cell>
            <table:table-cell office:value-type="float" office:value="105120.86900000001"/>
          </table:table-row>
          <table:table-row>
            <table:table-cell office:value-type="string">
              <text:p>2016-10</text:p>
            </table:table-cell>
            <table:table-cell office:value-type="float" office:value="94924.881999999998"/>
          </table:table-row>
          <table:table-row>
            <table:table-cell office:value-type="string">
              <text:p>2016-09</text:p>
            </table:table-cell>
            <table:table-cell office:value-type="float" office:value="87030.551999999996"/>
          </table:table-row>
          <table:table-row>
            <table:table-cell office:value-type="string">
              <text:p>2016-08</text:p>
            </table:table-cell>
            <table:table-cell office:value-type="float" office:value="89063.804999999993"/>
          </table:table-row>
          <table:table-row>
            <table:table-cell office:value-type="string">
              <text:p>2016-07</text:p>
            </table:table-cell>
            <table:table-cell office:value-type="float" office:value="93365.251999999993"/>
          </table:table-row>
          <table:table-row>
            <table:table-cell office:value-type="string">
              <text:p>2016-06</text:p>
            </table:table-cell>
            <table:table-cell office:value-type="float" office:value="93667.933999999994"/>
          </table:table-row>
          <table:table-row>
            <table:table-cell office:value-type="string">
              <text:p>2016-05</text:p>
            </table:table-cell>
            <table:table-cell office:value-type="float" office:value="97483.324999999997"/>
          </table:table-row>
          <table:table-row>
            <table:table-cell office:value-type="string">
              <text:p>2016-04</text:p>
            </table:table-cell>
            <table:table-cell office:value-type="float" office:value="102910.13"/>
          </table:table-row>
          <table:table-row>
            <table:table-cell office:value-type="string">
              <text:p>2016-03</text:p>
            </table:table-cell>
            <table:table-cell office:value-type="float" office:value="120861.255"/>
          </table:table-row>
          <table:table-row>
            <table:table-cell office:value-type="string">
              <text:p>2016-02</text:p>
            </table:table-cell>
            <table:table-cell office:value-type="float" office:value="121057.969"/>
          </table:table-row>
          <table:table-row>
            <table:table-cell office:value-type="string">
              <text:p>2016-01</text:p>
            </table:table-cell>
            <table:table-cell office:value-type="float" office:value="137200.48300000001"/>
          </table:table-row>
          <table:table-row>
            <table:table-cell office:value-type="string">
              <text:p>2015-12</text:p>
            </table:table-cell>
            <table:table-cell office:value-type="float" office:value="131878.228"/>
          </table:table-row>
          <table:table-row>
            <table:table-cell office:value-type="string">
              <text:p>2015-11</text:p>
            </table:table-cell>
            <table:table-cell office:value-type="float" office:value="117025.652"/>
          </table:table-row>
          <table:table-row>
            <table:table-cell office:value-type="string">
              <text:p>2015-10</text:p>
            </table:table-cell>
            <table:table-cell office:value-type="float" office:value="108690.212"/>
          </table:table-row>
          <table:table-row>
            <table:table-cell office:value-type="string">
              <text:p>2015-09</text:p>
            </table:table-cell>
            <table:table-cell office:value-type="float" office:value="98332.945999999996"/>
          </table:table-row>
          <table:table-row>
            <table:table-cell office:value-type="string">
              <text:p>2015-08</text:p>
            </table:table-cell>
            <table:table-cell office:value-type="float" office:value="100290.107"/>
          </table:table-row>
          <table:table-row>
            <table:table-cell office:value-type="string">
              <text:p>2015-07</text:p>
            </table:table-cell>
            <table:table-cell office:value-type="float" office:value="106188.031"/>
          </table:table-row>
          <table:table-row>
            <table:table-cell office:value-type="string">
              <text:p>2015-06</text:p>
            </table:table-cell>
            <table:table-cell office:value-type="float" office:value="99228.376999999993"/>
          </table:table-row>
          <table:table-row>
            <table:table-cell office:value-type="string">
              <text:p>2015-05</text:p>
            </table:table-cell>
            <table:table-cell office:value-type="float" office:value="99710.020999999993"/>
          </table:table-row>
          <table:table-row>
            <table:table-cell office:value-type="string">
              <text:p>2015-04</text:p>
            </table:table-cell>
            <table:table-cell office:value-type="float" office:value="104238.194"/>
          </table:table-row>
          <table:table-row>
            <table:table-cell office:value-type="string">
              <text:p>2015-03</text:p>
            </table:table-cell>
            <table:table-cell office:value-type="float" office:value="121420.841"/>
          </table:table-row>
          <table:table-row>
            <table:table-cell office:value-type="string">
              <text:p>2015-02</text:p>
            </table:table-cell>
            <table:table-cell office:value-type="float" office:value="124040.258"/>
          </table:table-row>
          <table:table-row>
            <table:table-cell office:value-type="string">
              <text:p>2015-01</text:p>
            </table:table-cell>
            <table:table-cell office:value-type="float" office:value="142068.386"/>
          </table:table-row>
          <table:table-row>
            <table:table-cell office:value-type="string">
              <text:p>2014-12</text:p>
            </table:table-cell>
            <table:table-cell office:value-type="float" office:value="135360.068"/>
          </table:table-row>
          <table:table-row>
            <table:table-cell office:value-type="string">
              <text:p>2014-11</text:p>
            </table:table-cell>
            <table:table-cell office:value-type="float" office:value="118985.633"/>
          </table:table-row>
          <table:table-row>
            <table:table-cell office:value-type="string">
              <text:p>2014-10</text:p>
            </table:table-cell>
            <table:table-cell office:value-type="float" office:value="108071.08100000001"/>
          </table:table-row>
          <table:table-row>
            <table:table-cell office:value-type="string">
              <text:p>2014-09</text:p>
            </table:table-cell>
            <table:table-cell office:value-type="float" office:value="101267.886"/>
          </table:table-row>
          <table:table-row>
            <table:table-cell office:value-type="string">
              <text:p>2014-08</text:p>
            </table:table-cell>
            <table:table-cell office:value-type="float" office:value="100251.541"/>
          </table:table-row>
          <table:table-row>
            <table:table-cell office:value-type="string">
              <text:p>2014-07</text:p>
            </table:table-cell>
            <table:table-cell office:value-type="float" office:value="106406.202"/>
          </table:table-row>
          <table:table-row>
            <table:table-cell office:value-type="string">
              <text:p>2014-06</text:p>
            </table:table-cell>
            <table:table-cell office:value-type="float" office:value="98834.731"/>
          </table:table-row>
          <table:table-row>
            <table:table-cell office:value-type="string">
              <text:p>2014-05</text:p>
            </table:table-cell>
            <table:table-cell office:value-type="float" office:value="100689.303"/>
          </table:table-row>
          <table:table-row>
            <table:table-cell office:value-type="string">
              <text:p>2014-04</text:p>
            </table:table-cell>
            <table:table-cell office:value-type="float" office:value="104416.71799999999"/>
          </table:table-row>
          <table:table-row>
            <table:table-cell office:value-type="string">
              <text:p>2014-03</text:p>
            </table:table-cell>
            <table:table-cell office:value-type="float" office:value="119372.99400000001"/>
          </table:table-row>
          <table:table-row>
            <table:table-cell office:value-type="string">
              <text:p>2014-02</text:p>
            </table:table-cell>
            <table:table-cell office:value-type="float" office:value="123315.409"/>
          </table:table-row>
          <table:table-row>
            <table:table-cell office:value-type="string">
              <text:p>2014-01</text:p>
            </table:table-cell>
            <table:table-cell office:value-type="float" office:value="141988.77100000001"/>
          </table:table-row>
          <table:table-row>
            <table:table-cell office:value-type="string">
              <text:p>2013-12</text:p>
            </table:table-cell>
            <table:table-cell office:value-type="float" office:value="133477.69699999999"/>
          </table:table-row>
          <table:table-row>
            <table:table-cell office:value-type="string">
              <text:p>2013-11</text:p>
            </table:table-cell>
            <table:table-cell office:value-type="float" office:value="114378.76700000001"/>
          </table:table-row>
          <table:table-row>
            <table:table-cell office:value-type="string">
              <text:p>2013-10</text:p>
            </table:table-cell>
            <table:table-cell office:value-type="float" office:value="103602.09699999999"/>
          </table:table-row>
          <table:table-row>
            <table:table-cell office:value-type="string">
              <text:p>2013-09</text:p>
            </table:table-cell>
            <table:table-cell office:value-type="float" office:value="95267.828999999998"/>
          </table:table-row>
          <table:table-row>
            <table:table-cell office:value-type="string">
              <text:p>2013-08</text:p>
            </table:table-cell>
            <table:table-cell office:value-type="float" office:value="94410.301000000007"/>
          </table:table-row>
          <table:table-row>
            <table:table-cell office:value-type="string">
              <text:p>2013-07</text:p>
            </table:table-cell>
            <table:table-cell office:value-type="float" office:value="100539.86599999999"/>
          </table:table-row>
          <table:table-row>
            <table:table-cell office:value-type="string">
              <text:p>2013-06</text:p>
            </table:table-cell>
            <table:table-cell office:value-type="float" office:value="95271.593999999997"/>
          </table:table-row>
          <table:table-row>
            <table:table-cell office:value-type="string">
              <text:p>2013-05</text:p>
            </table:table-cell>
            <table:table-cell office:value-type="float" office:value="100798.121"/>
          </table:table-row>
          <table:table-row>
            <table:table-cell office:value-type="string">
              <text:p>2013-04</text:p>
            </table:table-cell>
            <table:table-cell office:value-type="float" office:value="105144.986"/>
          </table:table-row>
          <table:table-row>
            <table:table-cell office:value-type="string">
              <text:p>2013-03</text:p>
            </table:table-cell>
            <table:table-cell office:value-type="float" office:value="117945.99"/>
          </table:table-row>
          <table:table-row>
            <table:table-cell office:value-type="string">
              <text:p>2013-02</text:p>
            </table:table-cell>
            <table:table-cell office:value-type="float" office:value="121653.34600000001"/>
          </table:table-row>
          <table:table-row>
            <table:table-cell office:value-type="string">
              <text:p>2013-01</text:p>
            </table:table-cell>
            <table:table-cell office:value-type="float" office:value="137794.986"/>
          </table:table-row>
          <table:table-row>
            <table:table-cell office:value-type="string">
              <text:p>2012-12</text:p>
            </table:table-cell>
            <table:table-cell office:value-type="float" office:value="131612.47899999999"/>
          </table:table-row>
          <table:table-row>
            <table:table-cell office:value-type="string">
              <text:p>2012-11</text:p>
            </table:table-cell>
            <table:table-cell office:value-type="float" office:value="120039.368"/>
          </table:table-row>
          <table:table-row>
            <table:table-cell office:value-type="string">
              <text:p>2012-10</text:p>
            </table:table-cell>
            <table:table-cell office:value-type="float" office:value="107111.125"/>
          </table:table-row>
          <table:table-row>
            <table:table-cell office:value-type="string">
              <text:p>2012-09</text:p>
            </table:table-cell>
            <table:table-cell office:value-type="float" office:value="96929.414000000004"/>
          </table:table-row>
          <table:table-row>
            <table:table-cell office:value-type="string">
              <text:p>2012-08</text:p>
            </table:table-cell>
            <table:table-cell office:value-type="float" office:value="91486.59"/>
          </table:table-row>
          <table:table-row>
            <table:table-cell office:value-type="string">
              <text:p>2012-07</text:p>
            </table:table-cell>
            <table:table-cell office:value-type="float" office:value="95154.142000000007"/>
          </table:table-row>
          <table:table-row>
            <table:table-cell office:value-type="string">
              <text:p>2012-06</text:p>
            </table:table-cell>
            <table:table-cell office:value-type="float" office:value="89777.911999999997"/>
          </table:table-row>
          <table:table-row>
            <table:table-cell office:value-type="string">
              <text:p>2012-05</text:p>
            </table:table-cell>
            <table:table-cell office:value-type="float" office:value="97823.307000000001"/>
          </table:table-row>
          <table:table-row>
            <table:table-cell office:value-type="string">
              <text:p>2012-04</text:p>
            </table:table-cell>
            <table:table-cell office:value-type="float" office:value="107680.724"/>
          </table:table-row>
          <table:table-row>
            <table:table-cell office:value-type="string">
              <text:p>2012-03</text:p>
            </table:table-cell>
            <table:table-cell office:value-type="float" office:value="122394.708"/>
          </table:table-row>
          <table:table-row>
            <table:table-cell office:value-type="string">
              <text:p>2012-02</text:p>
            </table:table-cell>
            <table:table-cell office:value-type="float" office:value="122863.35400000001"/>
          </table:table-row>
          <table:table-row>
            <table:table-cell office:value-type="string">
              <text:p>2012-01</text:p>
            </table:table-cell>
            <table:table-cell office:value-type="float" office:value="140006.758"/>
          </table:table-row>
          <table:table-row>
            <table:table-cell office:value-type="string">
              <text:p>2011-12</text:p>
            </table:table-cell>
            <table:table-cell office:value-type="float" office:value="131284.288"/>
          </table:table-row>
          <table:table-row>
            <table:table-cell office:value-type="string">
              <text:p>2011-11</text:p>
            </table:table-cell>
            <table:table-cell office:value-type="float" office:value="111091.747"/>
          </table:table-row>
          <table:table-row>
            <table:table-cell office:value-type="string">
              <text:p>2011-10</text:p>
            </table:table-cell>
            <table:table-cell office:value-type="float" office:value="105485.333"/>
          </table:table-row>
          <table:table-row>
            <table:table-cell office:value-type="string">
              <text:p>2011-09</text:p>
            </table:table-cell>
            <table:table-cell office:value-type="float" office:value="100310.711"/>
          </table:table-row>
          <table:table-row>
            <table:table-cell office:value-type="string">
              <text:p>2011-08</text:p>
            </table:table-cell>
            <table:table-cell office:value-type="float" office:value="100757.18"/>
          </table:table-row>
          <table:table-row>
            <table:table-cell office:value-type="string">
              <text:p>2011-07</text:p>
            </table:table-cell>
            <table:table-cell office:value-type="float" office:value="105693.101"/>
          </table:table-row>
          <table:table-row>
            <table:table-cell office:value-type="string">
              <text:p>2011-06</text:p>
            </table:table-cell>
            <table:table-cell office:value-type="float" office:value="103686.879"/>
          </table:table-row>
          <table:table-row>
            <table:table-cell office:value-type="string">
              <text:p>2011-05</text:p>
            </table:table-cell>
            <table:table-cell office:value-type="float" office:value="106048.662"/>
          </table:table-row>
          <table:table-row>
            <table:table-cell office:value-type="string">
              <text:p>2011-04</text:p>
            </table:table-cell>
            <table:table-cell office:value-type="float" office:value="107686.867"/>
          </table:table-row>
          <table:table-row>
            <table:table-cell office:value-type="string">
              <text:p>2011-03</text:p>
            </table:table-cell>
            <table:table-cell office:value-type="float" office:value="121598.295"/>
          </table:table-row>
          <table:table-row>
            <table:table-cell office:value-type="string">
              <text:p>2011-02</text:p>
            </table:table-cell>
            <table:table-cell office:value-type="float" office:value="124086.333"/>
          </table:table-row>
          <table:table-row>
            <table:table-cell office:value-type="string">
              <text:p>2011-01</text:p>
            </table:table-cell>
            <table:table-cell office:value-type="float" office:value="141886.17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interval-major="15" chart:tick-marks-major-inner="false" chart:tick-marks-major-outer="false" chart:tick-marks-minor-inner="false" chart:tick-marks-minor-outer="false" chart:display-label="true" chart:axis-label-position="near-axis" chart:axis-position="start" chart:reverse-direction="tru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chart:stacked="false" chart:percentage="false"/>
      <style:graphic-properties draw:fill="none" draw:stroke="solid" svg:stroke-width="0.03125in" svg:stroke-color="#e97132"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false"/>
      <style:graphic-properties draw:fill="none" draw:stroke="none"/>
    </style:style>
  </office:automatic-styles>
  <office:body>
    <office:chart>
      <chart:chart chart:class="chart:line" svg:height="312.25pt" svg:width="490.25pt" chart:style-name="Crt0">
        <chart:title chart:style-name="CT00">
          <text:p text:style-name="a0" text:class-names="" text:cond-style-name="">DJU</text:p>
        </chart:title>
        <chart:plot-area svg:x="0.625433070866142pt" svg:y="29.61370078740158pt" svg:width="453.485905511811pt" svg:height="260.916062992126pt" chart:style-name="Plt0" chart:data-source-has-labels="both">
          <chart:axis chart:dimension="x" chart:name="primary-x" chart:style-name="Axs0">
            <chart:title svg:x="221.6566929133858pt" svg:y="291.2592913385827pt" chart:style-name="AT00">
              <text:p text:style-name="a1" text:class-names="" text:cond-style-name="">Années</text:p>
            </chart:title>
            <chart:categories table:cell-range-address="local-table.$A$2:.$A$205"/>
          </chart:axis>
          <chart:axis chart:dimension="y" chart:name="primary-y" chart:style-name="Axs1">
            <chart:title svg:x="466.3162992125984pt" svg:y="95.39228346456693pt" chart:style-name="AT01">
              <text:p text:style-name="a2" text:class-names="" text:cond-style-name="">DJU (Degrés Jours Unifiés)</text:p>
            </chart:title>
            <chart:grid chart:class="major" chart:style-name="GMa1"/>
          </chart:axis>
          <chart:series chart:label-cell-address="local-table.$B$1" chart:values-cell-range-address="local-table.$B$2:.$B$205" chart:class="chart:line" chart:attached-axis="primary-y" chart:style-name="G0S0">
            <chart:data-point chart:repeated="20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DJU</text:p>
              </table:table-cell>
            </table:table-row>
          </table:table-header-rows>
          <table:table-row>
            <table:table-cell office:value-type="string">
              <text:p>2022-12</text:p>
            </table:table-cell>
            <table:table-cell office:value-type="float" office:value="280.3"/>
          </table:table-row>
          <table:table-row>
            <table:table-cell office:value-type="string">
              <text:p>2022-11</text:p>
            </table:table-cell>
            <table:table-cell office:value-type="float" office:value="144.9"/>
          </table:table-row>
          <table:table-row>
            <table:table-cell office:value-type="string">
              <text:p>2022-10</text:p>
            </table:table-cell>
            <table:table-cell office:value-type="float" office:value="17.2"/>
          </table:table-row>
          <table:table-row>
            <table:table-cell office:value-type="string">
              <text:p>2022-09</text:p>
            </table:table-cell>
            <table:table-cell office:value-type="float" office:value="0"/>
          </table:table-row>
          <table:table-row>
            <table:table-cell office:value-type="string">
              <text:p>2022-08</text:p>
            </table:table-cell>
            <table:table-cell office:value-type="float" office:value="0"/>
          </table:table-row>
          <table:table-row>
            <table:table-cell office:value-type="string">
              <text:p>2022-07</text:p>
            </table:table-cell>
            <table:table-cell office:value-type="float" office:value="0"/>
          </table:table-row>
          <table:table-row>
            <table:table-cell office:value-type="string">
              <text:p>2022-06</text:p>
            </table:table-cell>
            <table:table-cell office:value-type="float" office:value="0"/>
          </table:table-row>
          <table:table-row>
            <table:table-cell office:value-type="string">
              <text:p>2022-05</text:p>
            </table:table-cell>
            <table:table-cell office:value-type="float" office:value="20.100000000000001"/>
          </table:table-row>
          <table:table-row>
            <table:table-cell office:value-type="string">
              <text:p>2022-04</text:p>
            </table:table-cell>
            <table:table-cell office:value-type="float" office:value="0"/>
          </table:table-row>
          <table:table-row>
            <table:table-cell office:value-type="string">
              <text:p>2022-03</text:p>
            </table:table-cell>
            <table:table-cell office:value-type="float" office:value="173.3"/>
          </table:table-row>
          <table:table-row>
            <table:table-cell office:value-type="string">
              <text:p>2022-02</text:p>
            </table:table-cell>
            <table:table-cell office:value-type="float" office:value="208.4"/>
          </table:table-row>
          <table:table-row>
            <table:table-cell office:value-type="string">
              <text:p>2022-01</text:p>
            </table:table-cell>
            <table:table-cell office:value-type="float" office:value="321.8"/>
          </table:table-row>
          <table:table-row>
            <table:table-cell office:value-type="string">
              <text:p>2021-12</text:p>
            </table:table-cell>
            <table:table-cell office:value-type="float" office:value="260.3"/>
          </table:table-row>
          <table:table-row>
            <table:table-cell office:value-type="string">
              <text:p>2021-11</text:p>
            </table:table-cell>
            <table:table-cell office:value-type="float" office:value="233.5"/>
          </table:table-row>
          <table:table-row>
            <table:table-cell office:value-type="string">
              <text:p>2021-10</text:p>
            </table:table-cell>
            <table:table-cell office:value-type="float" office:value="81.3"/>
          </table:table-row>
          <table:table-row>
            <table:table-cell office:value-type="string">
              <text:p>2021-09</text:p>
            </table:table-cell>
            <table:table-cell office:value-type="float" office:value="0"/>
          </table:table-row>
          <table:table-row>
            <table:table-cell office:value-type="string">
              <text:p>2021-08</text:p>
            </table:table-cell>
            <table:table-cell office:value-type="float" office:value="0"/>
          </table:table-row>
          <table:table-row>
            <table:table-cell office:value-type="string">
              <text:p>2021-07</text:p>
            </table:table-cell>
            <table:table-cell office:value-type="float" office:value="0"/>
          </table:table-row>
          <table:table-row>
            <table:table-cell office:value-type="string">
              <text:p>2021-06</text:p>
            </table:table-cell>
            <table:table-cell office:value-type="float" office:value="0"/>
          </table:table-row>
          <table:table-row>
            <table:table-cell office:value-type="string">
              <text:p>2021-05</text:p>
            </table:table-cell>
            <table:table-cell office:value-type="float" office:value="79.2"/>
          </table:table-row>
          <table:table-row>
            <table:table-cell office:value-type="string">
              <text:p>2021-04</text:p>
            </table:table-cell>
            <table:table-cell office:value-type="float" office:value="167.2"/>
          </table:table-row>
          <table:table-row>
            <table:table-cell office:value-type="string">
              <text:p>2021-03</text:p>
            </table:table-cell>
            <table:table-cell office:value-type="float" office:value="209.3"/>
          </table:table-row>
          <table:table-row>
            <table:table-cell office:value-type="string">
              <text:p>2021-02</text:p>
            </table:table-cell>
            <table:table-cell office:value-type="float" office:value="210.2"/>
          </table:table-row>
          <table:table-row>
            <table:table-cell office:value-type="string">
              <text:p>2021-01</text:p>
            </table:table-cell>
            <table:table-cell office:value-type="float" office:value="0"/>
          </table:table-row>
          <table:table-row>
            <table:table-cell office:value-type="string">
              <text:p>2020-12</text:p>
            </table:table-cell>
            <table:table-cell office:value-type="float" office:value="264.2"/>
          </table:table-row>
          <table:table-row>
            <table:table-cell office:value-type="string">
              <text:p>2020-11</text:p>
            </table:table-cell>
            <table:table-cell office:value-type="float" office:value="0"/>
          </table:table-row>
          <table:table-row>
            <table:table-cell office:value-type="string">
              <text:p>2020-10</text:p>
            </table:table-cell>
            <table:table-cell office:value-type="float" office:value="87.4"/>
          </table:table-row>
          <table:table-row>
            <table:table-cell office:value-type="string">
              <text:p>2020-09</text:p>
            </table:table-cell>
            <table:table-cell office:value-type="float" office:value="0"/>
          </table:table-row>
          <table:table-row>
            <table:table-cell office:value-type="string">
              <text:p>2020-08</text:p>
            </table:table-cell>
            <table:table-cell office:value-type="float" office:value="0"/>
          </table:table-row>
          <table:table-row>
            <table:table-cell office:value-type="string">
              <text:p>2020-07</text:p>
            </table:table-cell>
            <table:table-cell office:value-type="float" office:value="0"/>
          </table:table-row>
          <table:table-row>
            <table:table-cell office:value-type="string">
              <text:p>2020-06</text:p>
            </table:table-cell>
            <table:table-cell office:value-type="float" office:value="0"/>
          </table:table-row>
          <table:table-row>
            <table:table-cell office:value-type="string">
              <text:p>2020-05</text:p>
            </table:table-cell>
            <table:table-cell office:value-type="float" office:value="36.200000000000003"/>
          </table:table-row>
          <table:table-row>
            <table:table-cell office:value-type="string">
              <text:p>2020-04</text:p>
            </table:table-cell>
            <table:table-cell office:value-type="float" office:value="58.6"/>
          </table:table-row>
          <table:table-row>
            <table:table-cell office:value-type="string">
              <text:p>2020-03</text:p>
            </table:table-cell>
            <table:table-cell office:value-type="float" office:value="0"/>
          </table:table-row>
          <table:table-row>
            <table:table-cell office:value-type="string">
              <text:p>2020-02</text:p>
            </table:table-cell>
            <table:table-cell office:value-type="float" office:value="181.1"/>
          </table:table-row>
          <table:table-row>
            <table:table-cell office:value-type="string">
              <text:p>2020-01</text:p>
            </table:table-cell>
            <table:table-cell office:value-type="float" office:value="259.8"/>
          </table:table-row>
          <table:table-row>
            <table:table-cell office:value-type="string">
              <text:p>2019-12</text:p>
            </table:table-cell>
            <table:table-cell office:value-type="float" office:value="235.4"/>
          </table:table-row>
          <table:table-row>
            <table:table-cell office:value-type="string">
              <text:p>2019-11</text:p>
            </table:table-cell>
            <table:table-cell office:value-type="float" office:value="206.5"/>
          </table:table-row>
          <table:table-row>
            <table:table-cell office:value-type="string">
              <text:p>2019-10</text:p>
            </table:table-cell>
            <table:table-cell office:value-type="float" office:value="50.8"/>
          </table:table-row>
          <table:table-row>
            <table:table-cell office:value-type="string">
              <text:p>2019-09</text:p>
            </table:table-cell>
            <table:table-cell office:value-type="float" office:value="0"/>
          </table:table-row>
          <table:table-row>
            <table:table-cell office:value-type="string">
              <text:p>2019-08</text:p>
            </table:table-cell>
            <table:table-cell office:value-type="float" office:value="0"/>
          </table:table-row>
          <table:table-row>
            <table:table-cell office:value-type="string">
              <text:p>2019-07</text:p>
            </table:table-cell>
            <table:table-cell office:value-type="float" office:value="0"/>
          </table:table-row>
          <table:table-row>
            <table:table-cell office:value-type="string">
              <text:p>2019-06</text:p>
            </table:table-cell>
            <table:table-cell office:value-type="float" office:value="0"/>
          </table:table-row>
          <table:table-row>
            <table:table-cell office:value-type="string">
              <text:p>2019-05</text:p>
            </table:table-cell>
            <table:table-cell office:value-type="float" office:value="71.7"/>
          </table:table-row>
          <table:table-row>
            <table:table-cell office:value-type="string">
              <text:p>2019-04</text:p>
            </table:table-cell>
            <table:table-cell office:value-type="float" office:value="124.7"/>
          </table:table-row>
          <table:table-row>
            <table:table-cell office:value-type="string">
              <text:p>2019-03</text:p>
            </table:table-cell>
            <table:table-cell office:value-type="float" office:value="171.3"/>
          </table:table-row>
          <table:table-row>
            <table:table-cell office:value-type="string">
              <text:p>2019-02</text:p>
            </table:table-cell>
            <table:table-cell office:value-type="float" office:value="209.8"/>
          </table:table-row>
          <table:table-row>
            <table:table-cell office:value-type="string">
              <text:p>2019-01</text:p>
            </table:table-cell>
            <table:table-cell office:value-type="float" office:value="338.4"/>
          </table:table-row>
          <table:table-row>
            <table:table-cell office:value-type="string">
              <text:p>2018-12</text:p>
            </table:table-cell>
            <table:table-cell office:value-type="float" office:value="242.9"/>
          </table:table-row>
          <table:table-row>
            <table:table-cell office:value-type="string">
              <text:p>2018-11</text:p>
            </table:table-cell>
            <table:table-cell office:value-type="float" office:value="187.1"/>
          </table:table-row>
          <table:table-row>
            <table:table-cell office:value-type="string">
              <text:p>2018-10</text:p>
            </table:table-cell>
            <table:table-cell office:value-type="float" office:value="0"/>
          </table:table-row>
          <table:table-row>
            <table:table-cell office:value-type="string">
              <text:p>2018-09</text:p>
            </table:table-cell>
            <table:table-cell office:value-type="float" office:value="0"/>
          </table:table-row>
          <table:table-row>
            <table:table-cell office:value-type="string">
              <text:p>2018-08</text:p>
            </table:table-cell>
            <table:table-cell office:value-type="float" office:value="0"/>
          </table:table-row>
          <table:table-row>
            <table:table-cell office:value-type="string">
              <text:p>2018-07</text:p>
            </table:table-cell>
            <table:table-cell office:value-type="float" office:value="0"/>
          </table:table-row>
          <table:table-row>
            <table:table-cell office:value-type="string">
              <text:p>2018-06</text:p>
            </table:table-cell>
            <table:table-cell office:value-type="float" office:value="0"/>
          </table:table-row>
          <table:table-row>
            <table:table-cell office:value-type="string">
              <text:p>2018-05</text:p>
            </table:table-cell>
            <table:table-cell office:value-type="float" office:value="37.799999999999997"/>
          </table:table-row>
          <table:table-row>
            <table:table-cell office:value-type="string">
              <text:p>2018-04</text:p>
            </table:table-cell>
            <table:table-cell office:value-type="float" office:value="73.3"/>
          </table:table-row>
          <table:table-row>
            <table:table-cell office:value-type="string">
              <text:p>2018-03</text:p>
            </table:table-cell>
            <table:table-cell office:value-type="float" office:value="234.4"/>
          </table:table-row>
          <table:table-row>
            <table:table-cell office:value-type="string">
              <text:p>2018-02</text:p>
            </table:table-cell>
            <table:table-cell office:value-type="float" office:value="344.7"/>
          </table:table-row>
          <table:table-row>
            <table:table-cell office:value-type="string">
              <text:p>2018-01</text:p>
            </table:table-cell>
            <table:table-cell office:value-type="float" office:value="223.9"/>
          </table:table-row>
          <table:table-row>
            <table:table-cell office:value-type="string">
              <text:p>2017-12</text:p>
            </table:table-cell>
            <table:table-cell office:value-type="float" office:value="298.2"/>
          </table:table-row>
          <table:table-row>
            <table:table-cell office:value-type="string">
              <text:p>2017-11</text:p>
            </table:table-cell>
            <table:table-cell office:value-type="float" office:value="218.7"/>
          </table:table-row>
          <table:table-row>
            <table:table-cell office:value-type="string">
              <text:p>2017-10</text:p>
            </table:table-cell>
            <table:table-cell office:value-type="float" office:value="0"/>
          </table:table-row>
          <table:table-row>
            <table:table-cell office:value-type="string">
              <text:p>2017-09</text:p>
            </table:table-cell>
            <table:table-cell office:value-type="float" office:value="0"/>
          </table:table-row>
          <table:table-row>
            <table:table-cell office:value-type="string">
              <text:p>2017-08</text:p>
            </table:table-cell>
            <table:table-cell office:value-type="float" office:value="0"/>
          </table:table-row>
          <table:table-row>
            <table:table-cell office:value-type="string">
              <text:p>2017-07</text:p>
            </table:table-cell>
            <table:table-cell office:value-type="float" office:value="0"/>
          </table:table-row>
          <table:table-row>
            <table:table-cell office:value-type="string">
              <text:p>2017-06</text:p>
            </table:table-cell>
            <table:table-cell office:value-type="float" office:value="0"/>
          </table:table-row>
          <table:table-row>
            <table:table-cell office:value-type="string">
              <text:p>2017-05</text:p>
            </table:table-cell>
            <table:table-cell office:value-type="float" office:value="42.1"/>
          </table:table-row>
          <table:table-row>
            <table:table-cell office:value-type="string">
              <text:p>2017-04</text:p>
            </table:table-cell>
            <table:table-cell office:value-type="float" office:value="134.1"/>
          </table:table-row>
          <table:table-row>
            <table:table-cell office:value-type="string">
              <text:p>2017-03</text:p>
            </table:table-cell>
            <table:table-cell office:value-type="float" office:value="142.80000000000001"/>
          </table:table-row>
          <table:table-row>
            <table:table-cell office:value-type="string">
              <text:p>2017-02</text:p>
            </table:table-cell>
            <table:table-cell office:value-type="float" office:value="207.1"/>
          </table:table-row>
          <table:table-row>
            <table:table-cell office:value-type="string">
              <text:p>2017-01</text:p>
            </table:table-cell>
            <table:table-cell office:value-type="float" office:value="391.3"/>
          </table:table-row>
          <table:table-row>
            <table:table-cell office:value-type="string">
              <text:p>2016-12</text:p>
            </table:table-cell>
            <table:table-cell office:value-type="float" office:value="303.2"/>
          </table:table-row>
          <table:table-row>
            <table:table-cell office:value-type="string">
              <text:p>2016-11</text:p>
            </table:table-cell>
            <table:table-cell office:value-type="float" office:value="203.5"/>
          </table:table-row>
          <table:table-row>
            <table:table-cell office:value-type="string">
              <text:p>2016-10</text:p>
            </table:table-cell>
            <table:table-cell office:value-type="float" office:value="104.8"/>
          </table:table-row>
          <table:table-row>
            <table:table-cell office:value-type="string">
              <text:p>2016-09</text:p>
            </table:table-cell>
            <table:table-cell office:value-type="float" office:value="0"/>
          </table:table-row>
          <table:table-row>
            <table:table-cell office:value-type="string">
              <text:p>2016-08</text:p>
            </table:table-cell>
            <table:table-cell office:value-type="float" office:value="0"/>
          </table:table-row>
          <table:table-row>
            <table:table-cell office:value-type="string">
              <text:p>2016-07</text:p>
            </table:table-cell>
            <table:table-cell office:value-type="float" office:value="0"/>
          </table:table-row>
          <table:table-row>
            <table:table-cell office:value-type="string">
              <text:p>2016-06</text:p>
            </table:table-cell>
            <table:table-cell office:value-type="float" office:value="0"/>
          </table:table-row>
          <table:table-row>
            <table:table-cell office:value-type="string">
              <text:p>2016-05</text:p>
            </table:table-cell>
            <table:table-cell office:value-type="float" office:value="50.4"/>
          </table:table-row>
          <table:table-row>
            <table:table-cell office:value-type="string">
              <text:p>2016-04</text:p>
            </table:table-cell>
            <table:table-cell office:value-type="float" office:value="143.1"/>
          </table:table-row>
          <table:table-row>
            <table:table-cell office:value-type="string">
              <text:p>2016-03</text:p>
            </table:table-cell>
            <table:table-cell office:value-type="float" office:value="241.2"/>
          </table:table-row>
          <table:table-row>
            <table:table-cell office:value-type="string">
              <text:p>2016-02</text:p>
            </table:table-cell>
            <table:table-cell office:value-type="float" office:value="242.7"/>
          </table:table-row>
          <table:table-row>
            <table:table-cell office:value-type="string">
              <text:p>2016-01</text:p>
            </table:table-cell>
            <table:table-cell office:value-type="float" office:value="269.60000000000002"/>
          </table:table-row>
          <table:table-row>
            <table:table-cell office:value-type="string">
              <text:p>2015-12</text:p>
            </table:table-cell>
            <table:table-cell office:value-type="float" office:value="176.2"/>
          </table:table-row>
          <table:table-row>
            <table:table-cell office:value-type="string">
              <text:p>2015-11</text:p>
            </table:table-cell>
            <table:table-cell office:value-type="float" office:value="135.4"/>
          </table:table-row>
          <table:table-row>
            <table:table-cell office:value-type="string">
              <text:p>2015-10</text:p>
            </table:table-cell>
            <table:table-cell office:value-type="float" office:value="0"/>
          </table:table-row>
          <table:table-row>
            <table:table-cell office:value-type="string">
              <text:p>2015-09</text:p>
            </table:table-cell>
            <table:table-cell office:value-type="float" office:value="0"/>
          </table:table-row>
          <table:table-row>
            <table:table-cell office:value-type="string">
              <text:p>2015-08</text:p>
            </table:table-cell>
            <table:table-cell office:value-type="float" office:value="0"/>
          </table:table-row>
          <table:table-row>
            <table:table-cell office:value-type="string">
              <text:p>2015-07</text:p>
            </table:table-cell>
            <table:table-cell office:value-type="float" office:value="0"/>
          </table:table-row>
          <table:table-row>
            <table:table-cell office:value-type="string">
              <text:p>2015-06</text:p>
            </table:table-cell>
            <table:table-cell office:value-type="float" office:value="0"/>
          </table:table-row>
          <table:table-row>
            <table:table-cell office:value-type="string">
              <text:p>2015-05</text:p>
            </table:table-cell>
            <table:table-cell office:value-type="float" office:value="43.6"/>
          </table:table-row>
          <table:table-row>
            <table:table-cell office:value-type="string">
              <text:p>2015-04</text:p>
            </table:table-cell>
            <table:table-cell office:value-type="float" office:value="98.8"/>
          </table:table-row>
          <table:table-row>
            <table:table-cell office:value-type="string">
              <text:p>2015-03</text:p>
            </table:table-cell>
            <table:table-cell office:value-type="float" office:value="204.8"/>
          </table:table-row>
          <table:table-row>
            <table:table-cell office:value-type="string">
              <text:p>2015-02</text:p>
            </table:table-cell>
            <table:table-cell office:value-type="float" office:value="299.60000000000002"/>
          </table:table-row>
          <table:table-row>
            <table:table-cell office:value-type="string">
              <text:p>2015-01</text:p>
            </table:table-cell>
            <table:table-cell office:value-type="float" office:value="310.60000000000002"/>
          </table:table-row>
          <table:table-row>
            <table:table-cell office:value-type="string">
              <text:p>2014-12</text:p>
            </table:table-cell>
            <table:table-cell office:value-type="float" office:value="287.2"/>
          </table:table-row>
          <table:table-row>
            <table:table-cell office:value-type="string">
              <text:p>2014-11</text:p>
            </table:table-cell>
            <table:table-cell office:value-type="float" office:value="136.4"/>
          </table:table-row>
          <table:table-row>
            <table:table-cell office:value-type="string">
              <text:p>2014-10</text:p>
            </table:table-cell>
            <table:table-cell office:value-type="float" office:value="37.9"/>
          </table:table-row>
          <table:table-row>
            <table:table-cell office:value-type="string">
              <text:p>2014-09</text:p>
            </table:table-cell>
            <table:table-cell office:value-type="float" office:value="0"/>
          </table:table-row>
          <table:table-row>
            <table:table-cell office:value-type="string">
              <text:p>2014-08</text:p>
            </table:table-cell>
            <table:table-cell office:value-type="float" office:value="0"/>
          </table:table-row>
          <table:table-row>
            <table:table-cell office:value-type="string">
              <text:p>2014-07</text:p>
            </table:table-cell>
            <table:table-cell office:value-type="float" office:value="0"/>
          </table:table-row>
          <table:table-row>
            <table:table-cell office:value-type="string">
              <text:p>2014-06</text:p>
            </table:table-cell>
            <table:table-cell office:value-type="float" office:value="0"/>
          </table:table-row>
          <table:table-row>
            <table:table-cell office:value-type="string">
              <text:p>2014-05</text:p>
            </table:table-cell>
            <table:table-cell office:value-type="float" office:value="51.6"/>
          </table:table-row>
          <table:table-row>
            <table:table-cell office:value-type="string">
              <text:p>2014-04</text:p>
            </table:table-cell>
            <table:table-cell office:value-type="float" office:value="83.8"/>
          </table:table-row>
          <table:table-row>
            <table:table-cell office:value-type="string">
              <text:p>2014-03</text:p>
            </table:table-cell>
            <table:table-cell office:value-type="float" office:value="175.4"/>
          </table:table-row>
          <table:table-row>
            <table:table-cell office:value-type="string">
              <text:p>2014-02</text:p>
            </table:table-cell>
            <table:table-cell office:value-type="float" office:value="214.4"/>
          </table:table-row>
          <table:table-row>
            <table:table-cell office:value-type="string">
              <text:p>2014-01</text:p>
            </table:table-cell>
            <table:table-cell office:value-type="float" office:value="246.8"/>
          </table:table-row>
          <table:table-row>
            <table:table-cell office:value-type="string">
              <text:p>2013-12</text:p>
            </table:table-cell>
            <table:table-cell office:value-type="float" office:value="278.3"/>
          </table:table-row>
          <table:table-row>
            <table:table-cell office:value-type="string">
              <text:p>2013-11</text:p>
            </table:table-cell>
            <table:table-cell office:value-type="float" office:value="229.4"/>
          </table:table-row>
          <table:table-row>
            <table:table-cell office:value-type="string">
              <text:p>2013-10</text:p>
            </table:table-cell>
            <table:table-cell office:value-type="float" office:value="52.9"/>
          </table:table-row>
          <table:table-row>
            <table:table-cell office:value-type="string">
              <text:p>2013-09</text:p>
            </table:table-cell>
            <table:table-cell office:value-type="float" office:value="0"/>
          </table:table-row>
          <table:table-row>
            <table:table-cell office:value-type="string">
              <text:p>2013-08</text:p>
            </table:table-cell>
            <table:table-cell office:value-type="float" office:value="0"/>
          </table:table-row>
          <table:table-row>
            <table:table-cell office:value-type="string">
              <text:p>2013-07</text:p>
            </table:table-cell>
            <table:table-cell office:value-type="float" office:value="0"/>
          </table:table-row>
          <table:table-row>
            <table:table-cell office:value-type="string">
              <text:p>2013-06</text:p>
            </table:table-cell>
            <table:table-cell office:value-type="float" office:value="0"/>
          </table:table-row>
          <table:table-row>
            <table:table-cell office:value-type="string">
              <text:p>2013-05</text:p>
            </table:table-cell>
            <table:table-cell office:value-type="float" office:value="96.9"/>
          </table:table-row>
          <table:table-row>
            <table:table-cell office:value-type="string">
              <text:p>2013-04</text:p>
            </table:table-cell>
            <table:table-cell office:value-type="float" office:value="151.1"/>
          </table:table-row>
          <table:table-row>
            <table:table-cell office:value-type="string">
              <text:p>2013-03</text:p>
            </table:table-cell>
            <table:table-cell office:value-type="float" office:value="273.5"/>
          </table:table-row>
          <table:table-row>
            <table:table-cell office:value-type="string">
              <text:p>2013-02</text:p>
            </table:table-cell>
            <table:table-cell office:value-type="float" office:value="333.4"/>
          </table:table-row>
          <table:table-row>
            <table:table-cell office:value-type="string">
              <text:p>2013-01</text:p>
            </table:table-cell>
            <table:table-cell office:value-type="float" office:value="341.4"/>
          </table:table-row>
          <table:table-row>
            <table:table-cell office:value-type="string">
              <text:p>2012-12</text:p>
            </table:table-cell>
            <table:table-cell office:value-type="float" office:value="270.60000000000002"/>
          </table:table-row>
          <table:table-row>
            <table:table-cell office:value-type="string">
              <text:p>2012-11</text:p>
            </table:table-cell>
            <table:table-cell office:value-type="float" office:value="197.8"/>
          </table:table-row>
          <table:table-row>
            <table:table-cell office:value-type="string">
              <text:p>2012-10</text:p>
            </table:table-cell>
            <table:table-cell office:value-type="float" office:value="87.2"/>
          </table:table-row>
          <table:table-row>
            <table:table-cell office:value-type="string">
              <text:p>2012-09</text:p>
            </table:table-cell>
            <table:table-cell office:value-type="float" office:value="0"/>
          </table:table-row>
          <table:table-row>
            <table:table-cell office:value-type="string">
              <text:p>2012-08</text:p>
            </table:table-cell>
            <table:table-cell office:value-type="float" office:value="0"/>
          </table:table-row>
          <table:table-row>
            <table:table-cell office:value-type="string">
              <text:p>2012-07</text:p>
            </table:table-cell>
            <table:table-cell office:value-type="float" office:value="0"/>
          </table:table-row>
          <table:table-row>
            <table:table-cell office:value-type="string">
              <text:p>2012-06</text:p>
            </table:table-cell>
            <table:table-cell office:value-type="float" office:value="0"/>
          </table:table-row>
          <table:table-row>
            <table:table-cell office:value-type="string">
              <text:p>2012-05</text:p>
            </table:table-cell>
            <table:table-cell office:value-type="float" office:value="47.9"/>
          </table:table-row>
          <table:table-row>
            <table:table-cell office:value-type="string">
              <text:p>2012-04</text:p>
            </table:table-cell>
            <table:table-cell office:value-type="float" office:value="157.4"/>
          </table:table-row>
          <table:table-row>
            <table:table-cell office:value-type="string">
              <text:p>2012-03</text:p>
            </table:table-cell>
            <table:table-cell office:value-type="float" office:value="156.4"/>
          </table:table-row>
          <table:table-row>
            <table:table-cell office:value-type="string">
              <text:p>2012-02</text:p>
            </table:table-cell>
            <table:table-cell office:value-type="float" office:value="393.3"/>
          </table:table-row>
          <table:table-row>
            <table:table-cell office:value-type="string">
              <text:p>2012-01</text:p>
            </table:table-cell>
            <table:table-cell office:value-type="float" office:value="281.8"/>
          </table:table-row>
          <table:table-row>
            <table:table-cell office:value-type="string">
              <text:p>2011-12</text:p>
            </table:table-cell>
            <table:table-cell office:value-type="float" office:value="0"/>
          </table:table-row>
          <table:table-row>
            <table:table-cell office:value-type="string">
              <text:p>2011-11</text:p>
            </table:table-cell>
            <table:table-cell office:value-type="float" office:value="145.19999999999999"/>
          </table:table-row>
          <table:table-row>
            <table:table-cell office:value-type="string">
              <text:p>2011-10</text:p>
            </table:table-cell>
            <table:table-cell office:value-type="float" office:value="71.5"/>
          </table:table-row>
          <table:table-row>
            <table:table-cell office:value-type="string">
              <text:p>2011-09</text:p>
            </table:table-cell>
            <table:table-cell office:value-type="float" office:value="0"/>
          </table:table-row>
          <table:table-row>
            <table:table-cell office:value-type="string">
              <text:p>2011-08</text:p>
            </table:table-cell>
            <table:table-cell office:value-type="float" office:value="0"/>
          </table:table-row>
          <table:table-row>
            <table:table-cell office:value-type="string">
              <text:p>2011-07</text:p>
            </table:table-cell>
            <table:table-cell office:value-type="float" office:value="0"/>
          </table:table-row>
          <table:table-row>
            <table:table-cell office:value-type="string">
              <text:p>2011-06</text:p>
            </table:table-cell>
            <table:table-cell office:value-type="float" office:value="0"/>
          </table:table-row>
          <table:table-row>
            <table:table-cell office:value-type="string">
              <text:p>2011-05</text:p>
            </table:table-cell>
            <table:table-cell office:value-type="float" office:value="24.3"/>
          </table:table-row>
          <table:table-row>
            <table:table-cell office:value-type="string">
              <text:p>2011-04</text:p>
            </table:table-cell>
            <table:table-cell office:value-type="float" office:value="0"/>
          </table:table-row>
          <table:table-row>
            <table:table-cell office:value-type="string">
              <text:p>2011-03</text:p>
            </table:table-cell>
            <table:table-cell office:value-type="float" office:value="189.5"/>
          </table:table-row>
          <table:table-row>
            <table:table-cell office:value-type="string">
              <text:p>2011-02</text:p>
            </table:table-cell>
            <table:table-cell office:value-type="float" office:value="237.8"/>
          </table:table-row>
          <table:table-row>
            <table:table-cell office:value-type="string">
              <text:p>2011-01</text:p>
            </table:table-cell>
            <table:table-cell office:value-type="float" office:value="322.10000000000002"/>
          </table:table-row>
          <table:table-row>
            <table:table-cell office:value-type="string">
              <text:p>2010-12</text:p>
            </table:table-cell>
            <table:table-cell office:value-type="float" office:value="408.2"/>
          </table:table-row>
          <table:table-row>
            <table:table-cell office:value-type="string">
              <text:p>2010-11</text:p>
            </table:table-cell>
            <table:table-cell office:value-type="float" office:value="224.6"/>
          </table:table-row>
          <table:table-row>
            <table:table-cell office:value-type="string">
              <text:p>2010-10</text:p>
            </table:table-cell>
            <table:table-cell office:value-type="float" office:value="114.8"/>
          </table:table-row>
          <table:table-row>
            <table:table-cell office:value-type="string">
              <text:p>2010-09</text:p>
            </table:table-cell>
            <table:table-cell office:value-type="float" office:value="0"/>
          </table:table-row>
          <table:table-row>
            <table:table-cell office:value-type="string">
              <text:p>2010-08</text:p>
            </table:table-cell>
            <table:table-cell office:value-type="float" office:value="0"/>
          </table:table-row>
          <table:table-row>
            <table:table-cell office:value-type="string">
              <text:p>2010-07</text:p>
            </table:table-cell>
            <table:table-cell office:value-type="float" office:value="0"/>
          </table:table-row>
          <table:table-row>
            <table:table-cell office:value-type="string">
              <text:p>2010-06</text:p>
            </table:table-cell>
            <table:table-cell office:value-type="float" office:value="0"/>
          </table:table-row>
          <table:table-row>
            <table:table-cell office:value-type="string">
              <text:p>2010-05</text:p>
            </table:table-cell>
            <table:table-cell office:value-type="float" office:value="89.9"/>
          </table:table-row>
          <table:table-row>
            <table:table-cell office:value-type="string">
              <text:p>2010-04</text:p>
            </table:table-cell>
            <table:table-cell office:value-type="float" office:value="116.6"/>
          </table:table-row>
          <table:table-row>
            <table:table-cell office:value-type="string">
              <text:p>2010-03</text:p>
            </table:table-cell>
            <table:table-cell office:value-type="float" office:value="0"/>
          </table:table-row>
          <table:table-row>
            <table:table-cell office:value-type="string">
              <text:p>2010-02</text:p>
            </table:table-cell>
            <table:table-cell office:value-type="float" office:value="301.7"/>
          </table:table-row>
          <table:table-row>
            <table:table-cell office:value-type="string">
              <text:p>2010-01</text:p>
            </table:table-cell>
            <table:table-cell office:value-type="float" office:value="415.5"/>
          </table:table-row>
          <table:table-row>
            <table:table-cell office:value-type="string">
              <text:p>2009-12</text:p>
            </table:table-cell>
            <table:table-cell office:value-type="float" office:value="323.39999999999998"/>
          </table:table-row>
          <table:table-row>
            <table:table-cell office:value-type="string">
              <text:p>2009-11</text:p>
            </table:table-cell>
            <table:table-cell office:value-type="float" office:value="142.9"/>
          </table:table-row>
          <table:table-row>
            <table:table-cell office:value-type="string">
              <text:p>2009-10</text:p>
            </table:table-cell>
            <table:table-cell office:value-type="float" office:value="0"/>
          </table:table-row>
          <table:table-row>
            <table:table-cell office:value-type="string">
              <text:p>2009-09</text:p>
            </table:table-cell>
            <table:table-cell office:value-type="float" office:value="0"/>
          </table:table-row>
          <table:table-row>
            <table:table-cell office:value-type="string">
              <text:p>2009-08</text:p>
            </table:table-cell>
            <table:table-cell office:value-type="float" office:value="0"/>
          </table:table-row>
          <table:table-row>
            <table:table-cell office:value-type="string">
              <text:p>2009-07</text:p>
            </table:table-cell>
            <table:table-cell office:value-type="float" office:value="0"/>
          </table:table-row>
          <table:table-row>
            <table:table-cell office:value-type="string">
              <text:p>2009-06</text:p>
            </table:table-cell>
            <table:table-cell office:value-type="float" office:value="0"/>
          </table:table-row>
          <table:table-row>
            <table:table-cell office:value-type="string">
              <text:p>2009-05</text:p>
            </table:table-cell>
            <table:table-cell office:value-type="float" office:value="32.4"/>
          </table:table-row>
          <table:table-row>
            <table:table-cell office:value-type="string">
              <text:p>2009-04</text:p>
            </table:table-cell>
            <table:table-cell office:value-type="float" office:value="94.5"/>
          </table:table-row>
          <table:table-row>
            <table:table-cell office:value-type="string">
              <text:p>2009-03</text:p>
            </table:table-cell>
            <table:table-cell office:value-type="float" office:value="224.9"/>
          </table:table-row>
          <table:table-row>
            <table:table-cell office:value-type="string">
              <text:p>2009-02</text:p>
            </table:table-cell>
            <table:table-cell office:value-type="float" office:value="292.60000000000002"/>
          </table:table-row>
          <table:table-row>
            <table:table-cell office:value-type="string">
              <text:p>2009-01</text:p>
            </table:table-cell>
            <table:table-cell office:value-type="float" office:value="391.8"/>
          </table:table-row>
          <table:table-row>
            <table:table-cell office:value-type="string">
              <text:p>2008-12</text:p>
            </table:table-cell>
            <table:table-cell office:value-type="float" office:value="346.8"/>
          </table:table-row>
          <table:table-row>
            <table:table-cell office:value-type="string">
              <text:p>2008-11</text:p>
            </table:table-cell>
            <table:table-cell office:value-type="float" office:value="212.9"/>
          </table:table-row>
          <table:table-row>
            <table:table-cell office:value-type="string">
              <text:p>2008-10</text:p>
            </table:table-cell>
            <table:table-cell office:value-type="float" office:value="109.9"/>
          </table:table-row>
          <table:table-row>
            <table:table-cell office:value-type="string">
              <text:p>2008-09</text:p>
            </table:table-cell>
            <table:table-cell office:value-type="float" office:value="0"/>
          </table:table-row>
          <table:table-row>
            <table:table-cell office:value-type="string">
              <text:p>2008-08</text:p>
            </table:table-cell>
            <table:table-cell office:value-type="float" office:value="0"/>
          </table:table-row>
          <table:table-row>
            <table:table-cell office:value-type="string">
              <text:p>2008-07</text:p>
            </table:table-cell>
            <table:table-cell office:value-type="float" office:value="0"/>
          </table:table-row>
          <table:table-row>
            <table:table-cell office:value-type="string">
              <text:p>2008-06</text:p>
            </table:table-cell>
            <table:table-cell office:value-type="float" office:value="0"/>
          </table:table-row>
          <table:table-row>
            <table:table-cell office:value-type="string">
              <text:p>2008-05</text:p>
            </table:table-cell>
            <table:table-cell office:value-type="float" office:value="19.3"/>
          </table:table-row>
          <table:table-row>
            <table:table-cell office:value-type="string">
              <text:p>2008-04</text:p>
            </table:table-cell>
            <table:table-cell office:value-type="float" office:value="148.19999999999999"/>
          </table:table-row>
          <table:table-row>
            <table:table-cell office:value-type="string">
              <text:p>2008-03</text:p>
            </table:table-cell>
            <table:table-cell office:value-type="float" office:value="0"/>
          </table:table-row>
          <table:table-row>
            <table:table-cell office:value-type="string">
              <text:p>2008-02</text:p>
            </table:table-cell>
            <table:table-cell office:value-type="float" office:value="230.9"/>
          </table:table-row>
          <table:table-row>
            <table:table-cell office:value-type="string">
              <text:p>2008-01</text:p>
            </table:table-cell>
            <table:table-cell office:value-type="float" office:value="257.89999999999998"/>
          </table:table-row>
          <table:table-row>
            <table:table-cell office:value-type="string">
              <text:p>2007-12</text:p>
            </table:table-cell>
            <table:table-cell office:value-type="float" office:value="0"/>
          </table:table-row>
          <table:table-row>
            <table:table-cell office:value-type="string">
              <text:p>2007-11</text:p>
            </table:table-cell>
            <table:table-cell office:value-type="float" office:value="240.3"/>
          </table:table-row>
          <table:table-row>
            <table:table-cell office:value-type="string">
              <text:p>2007-10</text:p>
            </table:table-cell>
            <table:table-cell office:value-type="float" office:value="111.7"/>
          </table:table-row>
          <table:table-row>
            <table:table-cell office:value-type="string">
              <text:p>2007-09</text:p>
            </table:table-cell>
            <table:table-cell office:value-type="float" office:value="0"/>
          </table:table-row>
          <table:table-row>
            <table:table-cell office:value-type="string">
              <text:p>2007-08</text:p>
            </table:table-cell>
            <table:table-cell office:value-type="float" office:value="0"/>
          </table:table-row>
          <table:table-row>
            <table:table-cell office:value-type="string">
              <text:p>2007-07</text:p>
            </table:table-cell>
            <table:table-cell office:value-type="float" office:value="0"/>
          </table:table-row>
          <table:table-row>
            <table:table-cell office:value-type="string">
              <text:p>2007-06</text:p>
            </table:table-cell>
            <table:table-cell office:value-type="float" office:value="0"/>
          </table:table-row>
          <table:table-row>
            <table:table-cell office:value-type="string">
              <text:p>2007-05</text:p>
            </table:table-cell>
            <table:table-cell office:value-type="float" office:value="34.5"/>
          </table:table-row>
          <table:table-row>
            <table:table-cell office:value-type="string">
              <text:p>2007-04</text:p>
            </table:table-cell>
            <table:table-cell office:value-type="float" office:value="54.9"/>
          </table:table-row>
          <table:table-row>
            <table:table-cell office:value-type="string">
              <text:p>2007-03</text:p>
            </table:table-cell>
            <table:table-cell office:value-type="float" office:value="212.2"/>
          </table:table-row>
          <table:table-row>
            <table:table-cell office:value-type="string">
              <text:p>2007-02</text:p>
            </table:table-cell>
            <table:table-cell office:value-type="float" office:value="0"/>
          </table:table-row>
          <table:table-row>
            <table:table-cell office:value-type="string">
              <text:p>2007-01</text:p>
            </table:table-cell>
            <table:table-cell office:value-type="float" office:value="244.1"/>
          </table:table-row>
          <table:table-row>
            <table:table-cell office:value-type="string">
              <text:p>2006-12</text:p>
            </table:table-cell>
            <table:table-cell office:value-type="float" office:value="287.8"/>
          </table:table-row>
          <table:table-row>
            <table:table-cell office:value-type="string">
              <text:p>2006-11</text:p>
            </table:table-cell>
            <table:table-cell office:value-type="float" office:value="152.5"/>
          </table:table-row>
          <table:table-row>
            <table:table-cell office:value-type="string">
              <text:p>2006-10</text:p>
            </table:table-cell>
            <table:table-cell office:value-type="float" office:value="23.8"/>
          </table:table-row>
          <table:table-row>
            <table:table-cell office:value-type="string">
              <text:p>2006-09</text:p>
            </table:table-cell>
            <table:table-cell office:value-type="float" office:value="0"/>
          </table:table-row>
          <table:table-row>
            <table:table-cell office:value-type="string">
              <text:p>2006-08</text:p>
            </table:table-cell>
            <table:table-cell office:value-type="float" office:value="0"/>
          </table:table-row>
          <table:table-row>
            <table:table-cell office:value-type="string">
              <text:p>2006-07</text:p>
            </table:table-cell>
            <table:table-cell office:value-type="float" office:value="0"/>
          </table:table-row>
          <table:table-row>
            <table:table-cell office:value-type="string">
              <text:p>2006-06</text:p>
            </table:table-cell>
            <table:table-cell office:value-type="float" office:value="0"/>
          </table:table-row>
          <table:table-row>
            <table:table-cell office:value-type="string">
              <text:p>2006-05</text:p>
            </table:table-cell>
            <table:table-cell office:value-type="float" office:value="43.1"/>
          </table:table-row>
          <table:table-row>
            <table:table-cell office:value-type="string">
              <text:p>2006-04</text:p>
            </table:table-cell>
            <table:table-cell office:value-type="float" office:value="128.4"/>
          </table:table-row>
          <table:table-row>
            <table:table-cell office:value-type="string">
              <text:p>2006-03</text:p>
            </table:table-cell>
            <table:table-cell office:value-type="float" office:value="248.4"/>
          </table:table-row>
          <table:table-row>
            <table:table-cell office:value-type="string">
              <text:p>2006-02</text:p>
            </table:table-cell>
            <table:table-cell office:value-type="float" office:value="318.39999999999998"/>
          </table:table-row>
          <table:table-row>
            <table:table-cell office:value-type="string">
              <text:p>2006-01</text:p>
            </table:table-cell>
            <table:table-cell office:value-type="float" office:value="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chart-properties chart:regression-type="linear"/>
      <style:graphic-properties draw:fill="none" draw:stroke="dash" draw:stroke-dash="a3" svg:stroke-width="0.05556in" svg:stroke-color="#ff0000" svg:stroke-opacity="100%" svg:stroke-linecap="round"/>
    </style:style>
    <style:style style:family="chart" style:name="G0S0P1">
      <style:chart-properties chart:symbol-type="named-symbol" chart:symbol-name="circle" chart:symbol-width="0.04167in" chart:symbol-height="0.04167in"/>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maximum="400" chart:minimum="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4167in" chart:symbol-height="0.04167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4167in" chart:symbol-height="0.04167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366.0pt" svg:width="425.85pt" chart:style-name="Crt0">
        <chart:title chart:style-name="CT00">
          <text:p text:style-name="a0" text:class-names="" text:cond-style-name="">DJU</text:p>
        </chart:title>
        <chart:plot-area svg:x="20.66133858267716pt" svg:y="34.62826771653543pt" svg:width="405.1886614173229pt" svg:height="310.5744881889764pt" chart:style-name="Plt0" chart:data-source-has-labels="both">
          <chart:axis chart:dimension="x" chart:name="primary-x" chart:style-name="Axs0">
            <chart:title chart:style-name="AT00">
              <text:p text:style-name="a1" text:class-names="" text:cond-style-name="">Consommation électrique (GWh)</text:p>
            </chart:title>
            <chart:grid chart:class="major" chart:style-name="GMa0"/>
          </chart:axis>
          <chart:axis chart:dimension="y" chart:name="primary-y" chart:style-name="Axs1">
            <chart:title chart:style-name="AT01">
              <text:p text:style-name="a2" text:class-names="" text:cond-style-name="">Rigueur climatique (DJU)</text:p>
            </chart:title>
            <chart:grid chart:class="major" chart:style-name="GMa1"/>
          </chart:axis>
          <chart:series chart:label-cell-address="local-table.$C$1" chart:values-cell-range-address="local-table.$C$2:.$C$145" chart:class="chart:scatter" chart:attached-axis="primary-y" chart:style-name="G0S0">
            <chart:domain table:cell-range-address="local-table.$B$2:.$B$145"/>
            <chart:regression-curve chart:style-name="T000">
              <chart:equation chart:automatic-content="true" chart:display-equation="true" chart:display-r-square="true" svg:x="37.72677165354331pt" svg:y="0.0pt" chart:style-name="TL000"/>
            </chart:regression-curve>
            <chart:data-point/>
            <chart:data-point chart:style-name="G0S0P1"/>
            <chart:data-point chart:repeated="14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JU</text:p>
              </table:table-cell>
            </table:table-row>
          </table:table-header-rows>
          <table:table-row>
            <table:table-cell office:value-type="string">
              <text:p>101739,33</text:p>
            </table:table-cell>
            <table:table-cell office:value-type="float" office:value="101739.33"/>
            <table:table-cell office:value-type="float" office:value="280.3"/>
          </table:table-row>
          <table:table-row>
            <table:table-cell office:value-type="string">
              <text:p>82618,321</text:p>
            </table:table-cell>
            <table:table-cell office:value-type="float" office:value="82618.320999999996"/>
            <table:table-cell office:value-type="float" office:value="144.9"/>
          </table:table-row>
          <table:table-row>
            <table:table-cell office:value-type="string">
              <text:p>77235,451</text:p>
            </table:table-cell>
            <table:table-cell office:value-type="float" office:value="77235.451000000001"/>
            <table:table-cell office:value-type="float" office:value="17.2"/>
          </table:table-row>
          <table:table-row>
            <table:table-cell office:value-type="string">
              <text:p>68889,018</text:p>
            </table:table-cell>
            <table:table-cell office:value-type="float" office:value="68889.017999999996"/>
            <table:table-cell office:value-type="float" office:value="0"/>
          </table:table-row>
          <table:table-row>
            <table:table-cell office:value-type="string">
              <text:p>67857,819</text:p>
            </table:table-cell>
            <table:table-cell office:value-type="float" office:value="67857.819000000003"/>
            <table:table-cell office:value-type="float" office:value="0"/>
          </table:table-row>
          <table:table-row>
            <table:table-cell office:value-type="string">
              <text:p>71804,54</text:p>
            </table:table-cell>
            <table:table-cell office:value-type="float" office:value="71804.539999999994"/>
            <table:table-cell office:value-type="float" office:value="0"/>
          </table:table-row>
          <table:table-row>
            <table:table-cell office:value-type="string">
              <text:p>72673,889</text:p>
            </table:table-cell>
            <table:table-cell office:value-type="float" office:value="72673.888999999996"/>
            <table:table-cell office:value-type="float" office:value="0"/>
          </table:table-row>
          <table:table-row>
            <table:table-cell office:value-type="string">
              <text:p>76347,869</text:p>
            </table:table-cell>
            <table:table-cell office:value-type="float" office:value="76347.869000000006"/>
            <table:table-cell office:value-type="float" office:value="20.100000000000001"/>
          </table:table-row>
          <table:table-row>
            <table:table-cell office:value-type="string">
              <text:p>81476,797</text:p>
            </table:table-cell>
            <table:table-cell office:value-type="float" office:value="81476.797000000006"/>
            <table:table-cell office:value-type="float" office:value="0"/>
          </table:table-row>
          <table:table-row>
            <table:table-cell office:value-type="string">
              <text:p>98215,302</text:p>
            </table:table-cell>
            <table:table-cell office:value-type="float" office:value="98215.301999999996"/>
            <table:table-cell office:value-type="float" office:value="173.3"/>
          </table:table-row>
          <table:table-row>
            <table:table-cell office:value-type="string">
              <text:p>105420,471</text:p>
            </table:table-cell>
            <table:table-cell office:value-type="float" office:value="105420.47100000001"/>
            <table:table-cell office:value-type="float" office:value="208.4"/>
          </table:table-row>
          <table:table-row>
            <table:table-cell office:value-type="string">
              <text:p>122244,813</text:p>
            </table:table-cell>
            <table:table-cell office:value-type="float" office:value="122244.81299999999"/>
            <table:table-cell office:value-type="float" office:value="321.8"/>
          </table:table-row>
          <table:table-row>
            <table:table-cell office:value-type="string">
              <text:p>113862,836</text:p>
            </table:table-cell>
            <table:table-cell office:value-type="float" office:value="113862.836"/>
            <table:table-cell office:value-type="float" office:value="260.3"/>
          </table:table-row>
          <table:table-row>
            <table:table-cell office:value-type="string">
              <text:p>103338,449</text:p>
            </table:table-cell>
            <table:table-cell office:value-type="float" office:value="103338.44899999999"/>
            <table:table-cell office:value-type="float" office:value="233.5"/>
          </table:table-row>
          <table:table-row>
            <table:table-cell office:value-type="string">
              <text:p>100824,032</text:p>
            </table:table-cell>
            <table:table-cell office:value-type="float" office:value="100824.03200000001"/>
            <table:table-cell office:value-type="float" office:value="81.3"/>
          </table:table-row>
          <table:table-row>
            <table:table-cell office:value-type="string">
              <text:p>93302,29</text:p>
            </table:table-cell>
            <table:table-cell office:value-type="float" office:value="93302.29"/>
            <table:table-cell office:value-type="float" office:value="0"/>
          </table:table-row>
          <table:table-row>
            <table:table-cell office:value-type="string">
              <text:p>94077,999</text:p>
            </table:table-cell>
            <table:table-cell office:value-type="float" office:value="94077.998999999996"/>
            <table:table-cell office:value-type="float" office:value="0"/>
          </table:table-row>
          <table:table-row>
            <table:table-cell office:value-type="string">
              <text:p>93748,603</text:p>
            </table:table-cell>
            <table:table-cell office:value-type="float" office:value="93748.603000000003"/>
            <table:table-cell office:value-type="float" office:value="0"/>
          </table:table-row>
          <table:table-row>
            <table:table-cell office:value-type="string">
              <text:p>89891,154</text:p>
            </table:table-cell>
            <table:table-cell office:value-type="float" office:value="89891.153999999995"/>
            <table:table-cell office:value-type="float" office:value="0"/>
          </table:table-row>
          <table:table-row>
            <table:table-cell office:value-type="string">
              <text:p>91972,192</text:p>
            </table:table-cell>
            <table:table-cell office:value-type="float" office:value="91972.191999999995"/>
            <table:table-cell office:value-type="float" office:value="79.2"/>
          </table:table-row>
          <table:table-row>
            <table:table-cell office:value-type="string">
              <text:p>92509,194</text:p>
            </table:table-cell>
            <table:table-cell office:value-type="float" office:value="92509.194000000003"/>
            <table:table-cell office:value-type="float" office:value="167.2"/>
          </table:table-row>
          <table:table-row>
            <table:table-cell office:value-type="string">
              <text:p>108001,885</text:p>
            </table:table-cell>
            <table:table-cell office:value-type="float" office:value="108001.88499999999"/>
            <table:table-cell office:value-type="float" office:value="209.3"/>
          </table:table-row>
          <table:table-row>
            <table:table-cell office:value-type="string">
              <text:p>107337,637</text:p>
            </table:table-cell>
            <table:table-cell office:value-type="float" office:value="107337.637"/>
            <table:table-cell office:value-type="float" office:value="210.2"/>
          </table:table-row>
          <table:table-row>
            <table:table-cell office:value-type="string">
              <text:p>126996,304</text:p>
            </table:table-cell>
            <table:table-cell office:value-type="float" office:value="126996.304"/>
            <table:table-cell office:value-type="float" office:value="0"/>
          </table:table-row>
          <table:table-row>
            <table:table-cell office:value-type="string">
              <text:p>118633,627</text:p>
            </table:table-cell>
            <table:table-cell office:value-type="float" office:value="118633.62699999999"/>
            <table:table-cell office:value-type="float" office:value="264.2"/>
          </table:table-row>
          <table:table-row>
            <table:table-cell office:value-type="string">
              <text:p>106034,627</text:p>
            </table:table-cell>
            <table:table-cell office:value-type="float" office:value="106034.62699999999"/>
            <table:table-cell office:value-type="float" office:value="0"/>
          </table:table-row>
          <table:table-row>
            <table:table-cell office:value-type="string">
              <text:p>97153,659</text:p>
            </table:table-cell>
            <table:table-cell office:value-type="float" office:value="97153.659"/>
            <table:table-cell office:value-type="float" office:value="87.4"/>
          </table:table-row>
          <table:table-row>
            <table:table-cell office:value-type="string">
              <text:p>77356,474</text:p>
            </table:table-cell>
            <table:table-cell office:value-type="float" office:value="77356.474000000002"/>
            <table:table-cell office:value-type="float" office:value="0"/>
          </table:table-row>
          <table:table-row>
            <table:table-cell office:value-type="string">
              <text:p>78900,647</text:p>
            </table:table-cell>
            <table:table-cell office:value-type="float" office:value="78900.646999999997"/>
            <table:table-cell office:value-type="float" office:value="0"/>
          </table:table-row>
          <table:table-row>
            <table:table-cell office:value-type="string">
              <text:p>79794,891</text:p>
            </table:table-cell>
            <table:table-cell office:value-type="float" office:value="79794.891000000003"/>
            <table:table-cell office:value-type="float" office:value="0"/>
          </table:table-row>
          <table:table-row>
            <table:table-cell office:value-type="string">
              <text:p>75457,935</text:p>
            </table:table-cell>
            <table:table-cell office:value-type="float" office:value="75457.934999999998"/>
            <table:table-cell office:value-type="float" office:value="0"/>
          </table:table-row>
          <table:table-row>
            <table:table-cell office:value-type="string">
              <text:p>84761,683</text:p>
            </table:table-cell>
            <table:table-cell office:value-type="float" office:value="84761.683000000005"/>
            <table:table-cell office:value-type="float" office:value="36.200000000000003"/>
          </table:table-row>
          <table:table-row>
            <table:table-cell office:value-type="string">
              <text:p>91742,873</text:p>
            </table:table-cell>
            <table:table-cell office:value-type="float" office:value="91742.873000000007"/>
            <table:table-cell office:value-type="float" office:value="58.6"/>
          </table:table-row>
          <table:table-row>
            <table:table-cell office:value-type="string">
              <text:p>104942,89</text:p>
            </table:table-cell>
            <table:table-cell office:value-type="float" office:value="104942.89"/>
            <table:table-cell office:value-type="float" office:value="0"/>
          </table:table-row>
          <table:table-row>
            <table:table-cell office:value-type="string">
              <text:p>112056,784</text:p>
            </table:table-cell>
            <table:table-cell office:value-type="float" office:value="112056.784"/>
            <table:table-cell office:value-type="float" office:value="181.1"/>
          </table:table-row>
          <table:table-row>
            <table:table-cell office:value-type="string">
              <text:p>127652,379</text:p>
            </table:table-cell>
            <table:table-cell office:value-type="float" office:value="127652.379"/>
            <table:table-cell office:value-type="float" office:value="259.8"/>
          </table:table-row>
          <table:table-row>
            <table:table-cell office:value-type="string">
              <text:p>116757,085</text:p>
            </table:table-cell>
            <table:table-cell office:value-type="float" office:value="116757.08500000001"/>
            <table:table-cell office:value-type="float" office:value="235.4"/>
          </table:table-row>
          <table:table-row>
            <table:table-cell office:value-type="string">
              <text:p>101727,058</text:p>
            </table:table-cell>
            <table:table-cell office:value-type="float" office:value="101727.058"/>
            <table:table-cell office:value-type="float" office:value="206.5"/>
          </table:table-row>
          <table:table-row>
            <table:table-cell office:value-type="string">
              <text:p>98557,437</text:p>
            </table:table-cell>
            <table:table-cell office:value-type="float" office:value="98557.437000000005"/>
            <table:table-cell office:value-type="float" office:value="50.8"/>
          </table:table-row>
          <table:table-row>
            <table:table-cell office:value-type="string">
              <text:p>89656,632</text:p>
            </table:table-cell>
            <table:table-cell office:value-type="float" office:value="89656.631999999998"/>
            <table:table-cell office:value-type="float" office:value="0"/>
          </table:table-row>
          <table:table-row>
            <table:table-cell office:value-type="string">
              <text:p>89475,377</text:p>
            </table:table-cell>
            <table:table-cell office:value-type="float" office:value="89475.376999999993"/>
            <table:table-cell office:value-type="float" office:value="0"/>
          </table:table-row>
          <table:table-row>
            <table:table-cell office:value-type="string">
              <text:p>95641,773</text:p>
            </table:table-cell>
            <table:table-cell office:value-type="float" office:value="95641.773000000001"/>
            <table:table-cell office:value-type="float" office:value="0"/>
          </table:table-row>
          <table:table-row>
            <table:table-cell office:value-type="string">
              <text:p>92925,342</text:p>
            </table:table-cell>
            <table:table-cell office:value-type="float" office:value="92925.342000000004"/>
            <table:table-cell office:value-type="float" office:value="0"/>
          </table:table-row>
          <table:table-row>
            <table:table-cell office:value-type="string">
              <text:p>101378,798</text:p>
            </table:table-cell>
            <table:table-cell office:value-type="float" office:value="101378.798"/>
            <table:table-cell office:value-type="float" office:value="71.7"/>
          </table:table-row>
          <table:table-row>
            <table:table-cell office:value-type="string">
              <text:p>104769,129</text:p>
            </table:table-cell>
            <table:table-cell office:value-type="float" office:value="104769.129"/>
            <table:table-cell office:value-type="float" office:value="124.7"/>
          </table:table-row>
          <table:table-row>
            <table:table-cell office:value-type="string">
              <text:p>118562,564</text:p>
            </table:table-cell>
            <table:table-cell office:value-type="float" office:value="118562.564"/>
            <table:table-cell office:value-type="float" office:value="171.3"/>
          </table:table-row>
          <table:table-row>
            <table:table-cell office:value-type="string">
              <text:p>119624,963</text:p>
            </table:table-cell>
            <table:table-cell office:value-type="float" office:value="119624.963"/>
            <table:table-cell office:value-type="float" office:value="209.8"/>
          </table:table-row>
          <table:table-row>
            <table:table-cell office:value-type="string">
              <text:p>133434,586</text:p>
            </table:table-cell>
            <table:table-cell office:value-type="float" office:value="133434.58600000001"/>
            <table:table-cell office:value-type="float" office:value="338.4"/>
          </table:table-row>
          <table:table-row>
            <table:table-cell office:value-type="string">
              <text:p>128804,892</text:p>
            </table:table-cell>
            <table:table-cell office:value-type="float" office:value="128804.89200000001"/>
            <table:table-cell office:value-type="float" office:value="242.9"/>
          </table:table-row>
          <table:table-row>
            <table:table-cell office:value-type="string">
              <text:p>110141,778</text:p>
            </table:table-cell>
            <table:table-cell office:value-type="float" office:value="110141.77800000001"/>
            <table:table-cell office:value-type="float" office:value="187.1"/>
          </table:table-row>
          <table:table-row>
            <table:table-cell office:value-type="string">
              <text:p>103174,075</text:p>
            </table:table-cell>
            <table:table-cell office:value-type="float" office:value="103174.075"/>
            <table:table-cell office:value-type="float" office:value="0"/>
          </table:table-row>
          <table:table-row>
            <table:table-cell office:value-type="string">
              <text:p>96200,369</text:p>
            </table:table-cell>
            <table:table-cell office:value-type="float" office:value="96200.369000000006"/>
            <table:table-cell office:value-type="float" office:value="0"/>
          </table:table-row>
          <table:table-row>
            <table:table-cell office:value-type="string">
              <text:p>89685,151</text:p>
            </table:table-cell>
            <table:table-cell office:value-type="float" office:value="89685.150999999998"/>
            <table:table-cell office:value-type="float" office:value="0"/>
          </table:table-row>
          <table:table-row>
            <table:table-cell office:value-type="string">
              <text:p>97487,36</text:p>
            </table:table-cell>
            <table:table-cell office:value-type="float" office:value="97487.360000000001"/>
            <table:table-cell office:value-type="float" office:value="0"/>
          </table:table-row>
          <table:table-row>
            <table:table-cell office:value-type="string">
              <text:p>93112,987</text:p>
            </table:table-cell>
            <table:table-cell office:value-type="float" office:value="93112.986999999994"/>
            <table:table-cell office:value-type="float" office:value="0"/>
          </table:table-row>
          <table:table-row>
            <table:table-cell office:value-type="string">
              <text:p>101143,847</text:p>
            </table:table-cell>
            <table:table-cell office:value-type="float" office:value="101143.84699999999"/>
            <table:table-cell office:value-type="float" office:value="37.799999999999997"/>
          </table:table-row>
          <table:table-row>
            <table:table-cell office:value-type="string">
              <text:p>104119,656</text:p>
            </table:table-cell>
            <table:table-cell office:value-type="float" office:value="104119.656"/>
            <table:table-cell office:value-type="float" office:value="73.3"/>
          </table:table-row>
          <table:table-row>
            <table:table-cell office:value-type="string">
              <text:p>119066,515</text:p>
            </table:table-cell>
            <table:table-cell office:value-type="float" office:value="119066.515"/>
            <table:table-cell office:value-type="float" office:value="234.4"/>
          </table:table-row>
          <table:table-row>
            <table:table-cell office:value-type="string">
              <text:p>121378,588</text:p>
            </table:table-cell>
            <table:table-cell office:value-type="float" office:value="121378.588"/>
            <table:table-cell office:value-type="float" office:value="344.7"/>
          </table:table-row>
          <table:table-row>
            <table:table-cell office:value-type="string">
              <text:p>137924,897</text:p>
            </table:table-cell>
            <table:table-cell office:value-type="float" office:value="137924.897"/>
            <table:table-cell office:value-type="float" office:value="223.9"/>
          </table:table-row>
          <table:table-row>
            <table:table-cell office:value-type="string">
              <text:p>126402,583</text:p>
            </table:table-cell>
            <table:table-cell office:value-type="float" office:value="126402.583"/>
            <table:table-cell office:value-type="float" office:value="298.2"/>
          </table:table-row>
          <table:table-row>
            <table:table-cell office:value-type="string">
              <text:p>103027,705</text:p>
            </table:table-cell>
            <table:table-cell office:value-type="float" office:value="103027.705"/>
            <table:table-cell office:value-type="float" office:value="218.7"/>
          </table:table-row>
          <table:table-row>
            <table:table-cell office:value-type="string">
              <text:p>94094,212</text:p>
            </table:table-cell>
            <table:table-cell office:value-type="float" office:value="94094.212"/>
            <table:table-cell office:value-type="float" office:value="0"/>
          </table:table-row>
          <table:table-row>
            <table:table-cell office:value-type="string">
              <text:p>94579,953</text:p>
            </table:table-cell>
            <table:table-cell office:value-type="float" office:value="94579.952999999994"/>
            <table:table-cell office:value-type="float" office:value="0"/>
          </table:table-row>
          <table:table-row>
            <table:table-cell office:value-type="string">
              <text:p>92577,669</text:p>
            </table:table-cell>
            <table:table-cell office:value-type="float" office:value="92577.668999999994"/>
            <table:table-cell office:value-type="float" office:value="0"/>
          </table:table-row>
          <table:table-row>
            <table:table-cell office:value-type="string">
              <text:p>91963,102</text:p>
            </table:table-cell>
            <table:table-cell office:value-type="float" office:value="91963.101999999999"/>
            <table:table-cell office:value-type="float" office:value="0"/>
          </table:table-row>
          <table:table-row>
            <table:table-cell office:value-type="string">
              <text:p>89238,354</text:p>
            </table:table-cell>
            <table:table-cell office:value-type="float" office:value="89238.354000000007"/>
            <table:table-cell office:value-type="float" office:value="0"/>
          </table:table-row>
          <table:table-row>
            <table:table-cell office:value-type="string">
              <text:p>98583,262</text:p>
            </table:table-cell>
            <table:table-cell office:value-type="float" office:value="98583.262000000002"/>
            <table:table-cell office:value-type="float" office:value="42.1"/>
          </table:table-row>
          <table:table-row>
            <table:table-cell office:value-type="string">
              <text:p>101559,806</text:p>
            </table:table-cell>
            <table:table-cell office:value-type="float" office:value="101559.806"/>
            <table:table-cell office:value-type="float" office:value="134.1"/>
          </table:table-row>
          <table:table-row>
            <table:table-cell office:value-type="string">
              <text:p>115976,244</text:p>
            </table:table-cell>
            <table:table-cell office:value-type="float" office:value="115976.24400000001"/>
            <table:table-cell office:value-type="float" office:value="142.80000000000001"/>
          </table:table-row>
          <table:table-row>
            <table:table-cell office:value-type="string">
              <text:p>113502,993</text:p>
            </table:table-cell>
            <table:table-cell office:value-type="float" office:value="113502.993"/>
            <table:table-cell office:value-type="float" office:value="207.1"/>
          </table:table-row>
          <table:table-row>
            <table:table-cell office:value-type="string">
              <text:p>132932,365</text:p>
            </table:table-cell>
            <table:table-cell office:value-type="float" office:value="132932.36499999999"/>
            <table:table-cell office:value-type="float" office:value="391.3"/>
          </table:table-row>
          <table:table-row>
            <table:table-cell office:value-type="string">
              <text:p>121746,794</text:p>
            </table:table-cell>
            <table:table-cell office:value-type="float" office:value="121746.79399999999"/>
            <table:table-cell office:value-type="float" office:value="303.2"/>
          </table:table-row>
          <table:table-row>
            <table:table-cell office:value-type="string">
              <text:p>105120,869</text:p>
            </table:table-cell>
            <table:table-cell office:value-type="float" office:value="105120.86900000001"/>
            <table:table-cell office:value-type="float" office:value="203.5"/>
          </table:table-row>
          <table:table-row>
            <table:table-cell office:value-type="string">
              <text:p>94924,882</text:p>
            </table:table-cell>
            <table:table-cell office:value-type="float" office:value="94924.881999999998"/>
            <table:table-cell office:value-type="float" office:value="104.8"/>
          </table:table-row>
          <table:table-row>
            <table:table-cell office:value-type="string">
              <text:p>87030,552</text:p>
            </table:table-cell>
            <table:table-cell office:value-type="float" office:value="87030.551999999996"/>
            <table:table-cell office:value-type="float" office:value="0"/>
          </table:table-row>
          <table:table-row>
            <table:table-cell office:value-type="string">
              <text:p>89063,805</text:p>
            </table:table-cell>
            <table:table-cell office:value-type="float" office:value="89063.804999999993"/>
            <table:table-cell office:value-type="float" office:value="0"/>
          </table:table-row>
          <table:table-row>
            <table:table-cell office:value-type="string">
              <text:p>93365,252</text:p>
            </table:table-cell>
            <table:table-cell office:value-type="float" office:value="93365.251999999993"/>
            <table:table-cell office:value-type="float" office:value="0"/>
          </table:table-row>
          <table:table-row>
            <table:table-cell office:value-type="string">
              <text:p>93667,934</text:p>
            </table:table-cell>
            <table:table-cell office:value-type="float" office:value="93667.933999999994"/>
            <table:table-cell office:value-type="float" office:value="0"/>
          </table:table-row>
          <table:table-row>
            <table:table-cell office:value-type="string">
              <text:p>97483,325</text:p>
            </table:table-cell>
            <table:table-cell office:value-type="float" office:value="97483.324999999997"/>
            <table:table-cell office:value-type="float" office:value="50.4"/>
          </table:table-row>
          <table:table-row>
            <table:table-cell office:value-type="string">
              <text:p>102910,13</text:p>
            </table:table-cell>
            <table:table-cell office:value-type="float" office:value="102910.13"/>
            <table:table-cell office:value-type="float" office:value="143.1"/>
          </table:table-row>
          <table:table-row>
            <table:table-cell office:value-type="string">
              <text:p>120861,255</text:p>
            </table:table-cell>
            <table:table-cell office:value-type="float" office:value="120861.255"/>
            <table:table-cell office:value-type="float" office:value="241.2"/>
          </table:table-row>
          <table:table-row>
            <table:table-cell office:value-type="string">
              <text:p>121057,969</text:p>
            </table:table-cell>
            <table:table-cell office:value-type="float" office:value="121057.969"/>
            <table:table-cell office:value-type="float" office:value="242.7"/>
          </table:table-row>
          <table:table-row>
            <table:table-cell office:value-type="string">
              <text:p>137200,483</text:p>
            </table:table-cell>
            <table:table-cell office:value-type="float" office:value="137200.48300000001"/>
            <table:table-cell office:value-type="float" office:value="269.60000000000002"/>
          </table:table-row>
          <table:table-row>
            <table:table-cell office:value-type="string">
              <text:p>131878,228</text:p>
            </table:table-cell>
            <table:table-cell office:value-type="float" office:value="131878.228"/>
            <table:table-cell office:value-type="float" office:value="176.2"/>
          </table:table-row>
          <table:table-row>
            <table:table-cell office:value-type="string">
              <text:p>117025,652</text:p>
            </table:table-cell>
            <table:table-cell office:value-type="float" office:value="117025.652"/>
            <table:table-cell office:value-type="float" office:value="135.4"/>
          </table:table-row>
          <table:table-row>
            <table:table-cell office:value-type="string">
              <text:p>108690,212</text:p>
            </table:table-cell>
            <table:table-cell office:value-type="float" office:value="108690.212"/>
            <table:table-cell office:value-type="float" office:value="0"/>
          </table:table-row>
          <table:table-row>
            <table:table-cell office:value-type="string">
              <text:p>98332,946</text:p>
            </table:table-cell>
            <table:table-cell office:value-type="float" office:value="98332.945999999996"/>
            <table:table-cell office:value-type="float" office:value="0"/>
          </table:table-row>
          <table:table-row>
            <table:table-cell office:value-type="string">
              <text:p>100290,107</text:p>
            </table:table-cell>
            <table:table-cell office:value-type="float" office:value="100290.107"/>
            <table:table-cell office:value-type="float" office:value="0"/>
          </table:table-row>
          <table:table-row>
            <table:table-cell office:value-type="string">
              <text:p>106188,031</text:p>
            </table:table-cell>
            <table:table-cell office:value-type="float" office:value="106188.031"/>
            <table:table-cell office:value-type="float" office:value="0"/>
          </table:table-row>
          <table:table-row>
            <table:table-cell office:value-type="string">
              <text:p>99228,377</text:p>
            </table:table-cell>
            <table:table-cell office:value-type="float" office:value="99228.376999999993"/>
            <table:table-cell office:value-type="float" office:value="0"/>
          </table:table-row>
          <table:table-row>
            <table:table-cell office:value-type="string">
              <text:p>99710,021</text:p>
            </table:table-cell>
            <table:table-cell office:value-type="float" office:value="99710.020999999993"/>
            <table:table-cell office:value-type="float" office:value="43.6"/>
          </table:table-row>
          <table:table-row>
            <table:table-cell office:value-type="string">
              <text:p>104238,194</text:p>
            </table:table-cell>
            <table:table-cell office:value-type="float" office:value="104238.194"/>
            <table:table-cell office:value-type="float" office:value="98.8"/>
          </table:table-row>
          <table:table-row>
            <table:table-cell office:value-type="string">
              <text:p>121420,841</text:p>
            </table:table-cell>
            <table:table-cell office:value-type="float" office:value="121420.841"/>
            <table:table-cell office:value-type="float" office:value="204.8"/>
          </table:table-row>
          <table:table-row>
            <table:table-cell office:value-type="string">
              <text:p>124040,258</text:p>
            </table:table-cell>
            <table:table-cell office:value-type="float" office:value="124040.258"/>
            <table:table-cell office:value-type="float" office:value="299.60000000000002"/>
          </table:table-row>
          <table:table-row>
            <table:table-cell office:value-type="string">
              <text:p>142068,386</text:p>
            </table:table-cell>
            <table:table-cell office:value-type="float" office:value="142068.386"/>
            <table:table-cell office:value-type="float" office:value="310.60000000000002"/>
          </table:table-row>
          <table:table-row>
            <table:table-cell office:value-type="string">
              <text:p>135360,068</text:p>
            </table:table-cell>
            <table:table-cell office:value-type="float" office:value="135360.068"/>
            <table:table-cell office:value-type="float" office:value="287.2"/>
          </table:table-row>
          <table:table-row>
            <table:table-cell office:value-type="string">
              <text:p>118985,633</text:p>
            </table:table-cell>
            <table:table-cell office:value-type="float" office:value="118985.633"/>
            <table:table-cell office:value-type="float" office:value="136.4"/>
          </table:table-row>
          <table:table-row>
            <table:table-cell office:value-type="string">
              <text:p>108071,081</text:p>
            </table:table-cell>
            <table:table-cell office:value-type="float" office:value="108071.08100000001"/>
            <table:table-cell office:value-type="float" office:value="37.9"/>
          </table:table-row>
          <table:table-row>
            <table:table-cell office:value-type="string">
              <text:p>101267,886</text:p>
            </table:table-cell>
            <table:table-cell office:value-type="float" office:value="101267.886"/>
            <table:table-cell office:value-type="float" office:value="0"/>
          </table:table-row>
          <table:table-row>
            <table:table-cell office:value-type="string">
              <text:p>100251,541</text:p>
            </table:table-cell>
            <table:table-cell office:value-type="float" office:value="100251.541"/>
            <table:table-cell office:value-type="float" office:value="0"/>
          </table:table-row>
          <table:table-row>
            <table:table-cell office:value-type="string">
              <text:p>106406,202</text:p>
            </table:table-cell>
            <table:table-cell office:value-type="float" office:value="106406.202"/>
            <table:table-cell office:value-type="float" office:value="0"/>
          </table:table-row>
          <table:table-row>
            <table:table-cell office:value-type="string">
              <text:p>98834,731</text:p>
            </table:table-cell>
            <table:table-cell office:value-type="float" office:value="98834.731"/>
            <table:table-cell office:value-type="float" office:value="0"/>
          </table:table-row>
          <table:table-row>
            <table:table-cell office:value-type="string">
              <text:p>100689,303</text:p>
            </table:table-cell>
            <table:table-cell office:value-type="float" office:value="100689.303"/>
            <table:table-cell office:value-type="float" office:value="51.6"/>
          </table:table-row>
          <table:table-row>
            <table:table-cell office:value-type="string">
              <text:p>104416,718</text:p>
            </table:table-cell>
            <table:table-cell office:value-type="float" office:value="104416.71799999999"/>
            <table:table-cell office:value-type="float" office:value="83.8"/>
          </table:table-row>
          <table:table-row>
            <table:table-cell office:value-type="string">
              <text:p>119372,994</text:p>
            </table:table-cell>
            <table:table-cell office:value-type="float" office:value="119372.99400000001"/>
            <table:table-cell office:value-type="float" office:value="175.4"/>
          </table:table-row>
          <table:table-row>
            <table:table-cell office:value-type="string">
              <text:p>123315,409</text:p>
            </table:table-cell>
            <table:table-cell office:value-type="float" office:value="123315.409"/>
            <table:table-cell office:value-type="float" office:value="214.4"/>
          </table:table-row>
          <table:table-row>
            <table:table-cell office:value-type="string">
              <text:p>141988,771</text:p>
            </table:table-cell>
            <table:table-cell office:value-type="float" office:value="141988.77100000001"/>
            <table:table-cell office:value-type="float" office:value="246.8"/>
          </table:table-row>
          <table:table-row>
            <table:table-cell office:value-type="string">
              <text:p>133477,697</text:p>
            </table:table-cell>
            <table:table-cell office:value-type="float" office:value="133477.69699999999"/>
            <table:table-cell office:value-type="float" office:value="278.3"/>
          </table:table-row>
          <table:table-row>
            <table:table-cell office:value-type="string">
              <text:p>114378,767</text:p>
            </table:table-cell>
            <table:table-cell office:value-type="float" office:value="114378.76700000001"/>
            <table:table-cell office:value-type="float" office:value="229.4"/>
          </table:table-row>
          <table:table-row>
            <table:table-cell office:value-type="string">
              <text:p>103602,097</text:p>
            </table:table-cell>
            <table:table-cell office:value-type="float" office:value="103602.09699999999"/>
            <table:table-cell office:value-type="float" office:value="52.9"/>
          </table:table-row>
          <table:table-row>
            <table:table-cell office:value-type="string">
              <text:p>95267,829</text:p>
            </table:table-cell>
            <table:table-cell office:value-type="float" office:value="95267.828999999998"/>
            <table:table-cell office:value-type="float" office:value="0"/>
          </table:table-row>
          <table:table-row>
            <table:table-cell office:value-type="string">
              <text:p>94410,301</text:p>
            </table:table-cell>
            <table:table-cell office:value-type="float" office:value="94410.301000000007"/>
            <table:table-cell office:value-type="float" office:value="0"/>
          </table:table-row>
          <table:table-row>
            <table:table-cell office:value-type="string">
              <text:p>100539,866</text:p>
            </table:table-cell>
            <table:table-cell office:value-type="float" office:value="100539.86599999999"/>
            <table:table-cell office:value-type="float" office:value="0"/>
          </table:table-row>
          <table:table-row>
            <table:table-cell office:value-type="string">
              <text:p>95271,594</text:p>
            </table:table-cell>
            <table:table-cell office:value-type="float" office:value="95271.593999999997"/>
            <table:table-cell office:value-type="float" office:value="0"/>
          </table:table-row>
          <table:table-row>
            <table:table-cell office:value-type="string">
              <text:p>100798,121</text:p>
            </table:table-cell>
            <table:table-cell office:value-type="float" office:value="100798.121"/>
            <table:table-cell office:value-type="float" office:value="96.9"/>
          </table:table-row>
          <table:table-row>
            <table:table-cell office:value-type="string">
              <text:p>105144,986</text:p>
            </table:table-cell>
            <table:table-cell office:value-type="float" office:value="105144.986"/>
            <table:table-cell office:value-type="float" office:value="151.1"/>
          </table:table-row>
          <table:table-row>
            <table:table-cell office:value-type="string">
              <text:p>117945,99</text:p>
            </table:table-cell>
            <table:table-cell office:value-type="float" office:value="117945.99"/>
            <table:table-cell office:value-type="float" office:value="273.5"/>
          </table:table-row>
          <table:table-row>
            <table:table-cell office:value-type="string">
              <text:p>121653,346</text:p>
            </table:table-cell>
            <table:table-cell office:value-type="float" office:value="121653.34600000001"/>
            <table:table-cell office:value-type="float" office:value="333.4"/>
          </table:table-row>
          <table:table-row>
            <table:table-cell office:value-type="string">
              <text:p>137794,986</text:p>
            </table:table-cell>
            <table:table-cell office:value-type="float" office:value="137794.986"/>
            <table:table-cell office:value-type="float" office:value="341.4"/>
          </table:table-row>
          <table:table-row>
            <table:table-cell office:value-type="string">
              <text:p>131612,479</text:p>
            </table:table-cell>
            <table:table-cell office:value-type="float" office:value="131612.47899999999"/>
            <table:table-cell office:value-type="float" office:value="270.60000000000002"/>
          </table:table-row>
          <table:table-row>
            <table:table-cell office:value-type="string">
              <text:p>120039,368</text:p>
            </table:table-cell>
            <table:table-cell office:value-type="float" office:value="120039.368"/>
            <table:table-cell office:value-type="float" office:value="197.8"/>
          </table:table-row>
          <table:table-row>
            <table:table-cell office:value-type="string">
              <text:p>107111,125</text:p>
            </table:table-cell>
            <table:table-cell office:value-type="float" office:value="107111.125"/>
            <table:table-cell office:value-type="float" office:value="87.2"/>
          </table:table-row>
          <table:table-row>
            <table:table-cell office:value-type="string">
              <text:p>96929,414</text:p>
            </table:table-cell>
            <table:table-cell office:value-type="float" office:value="96929.414000000004"/>
            <table:table-cell office:value-type="float" office:value="0"/>
          </table:table-row>
          <table:table-row>
            <table:table-cell office:value-type="string">
              <text:p>91486,59</text:p>
            </table:table-cell>
            <table:table-cell office:value-type="float" office:value="91486.59"/>
            <table:table-cell office:value-type="float" office:value="0"/>
          </table:table-row>
          <table:table-row>
            <table:table-cell office:value-type="string">
              <text:p>95154,142</text:p>
            </table:table-cell>
            <table:table-cell office:value-type="float" office:value="95154.142000000007"/>
            <table:table-cell office:value-type="float" office:value="0"/>
          </table:table-row>
          <table:table-row>
            <table:table-cell office:value-type="string">
              <text:p>89777,912</text:p>
            </table:table-cell>
            <table:table-cell office:value-type="float" office:value="89777.911999999997"/>
            <table:table-cell office:value-type="float" office:value="0"/>
          </table:table-row>
          <table:table-row>
            <table:table-cell office:value-type="string">
              <text:p>97823,307</text:p>
            </table:table-cell>
            <table:table-cell office:value-type="float" office:value="97823.307000000001"/>
            <table:table-cell office:value-type="float" office:value="47.9"/>
          </table:table-row>
          <table:table-row>
            <table:table-cell office:value-type="string">
              <text:p>107680,724</text:p>
            </table:table-cell>
            <table:table-cell office:value-type="float" office:value="107680.724"/>
            <table:table-cell office:value-type="float" office:value="157.4"/>
          </table:table-row>
          <table:table-row>
            <table:table-cell office:value-type="string">
              <text:p>122394,708</text:p>
            </table:table-cell>
            <table:table-cell office:value-type="float" office:value="122394.708"/>
            <table:table-cell office:value-type="float" office:value="156.4"/>
          </table:table-row>
          <table:table-row>
            <table:table-cell office:value-type="string">
              <text:p>122863,354</text:p>
            </table:table-cell>
            <table:table-cell office:value-type="float" office:value="122863.35400000001"/>
            <table:table-cell office:value-type="float" office:value="393.3"/>
          </table:table-row>
          <table:table-row>
            <table:table-cell office:value-type="string">
              <text:p>140006,758</text:p>
            </table:table-cell>
            <table:table-cell office:value-type="float" office:value="140006.758"/>
            <table:table-cell office:value-type="float" office:value="281.8"/>
          </table:table-row>
          <table:table-row>
            <table:table-cell office:value-type="string">
              <text:p>131284,288</text:p>
            </table:table-cell>
            <table:table-cell office:value-type="float" office:value="131284.288"/>
            <table:table-cell office:value-type="float" office:value="0"/>
          </table:table-row>
          <table:table-row>
            <table:table-cell office:value-type="string">
              <text:p>111091,747</text:p>
            </table:table-cell>
            <table:table-cell office:value-type="float" office:value="111091.747"/>
            <table:table-cell office:value-type="float" office:value="145.19999999999999"/>
          </table:table-row>
          <table:table-row>
            <table:table-cell office:value-type="string">
              <text:p>105485,333</text:p>
            </table:table-cell>
            <table:table-cell office:value-type="float" office:value="105485.333"/>
            <table:table-cell office:value-type="float" office:value="71.5"/>
          </table:table-row>
          <table:table-row>
            <table:table-cell office:value-type="string">
              <text:p>100310,711</text:p>
            </table:table-cell>
            <table:table-cell office:value-type="float" office:value="100310.711"/>
            <table:table-cell office:value-type="float" office:value="0"/>
          </table:table-row>
          <table:table-row>
            <table:table-cell office:value-type="string">
              <text:p>100757,18</text:p>
            </table:table-cell>
            <table:table-cell office:value-type="float" office:value="100757.18"/>
            <table:table-cell office:value-type="float" office:value="0"/>
          </table:table-row>
          <table:table-row>
            <table:table-cell office:value-type="string">
              <text:p>105693,101</text:p>
            </table:table-cell>
            <table:table-cell office:value-type="float" office:value="105693.101"/>
            <table:table-cell office:value-type="float" office:value="0"/>
          </table:table-row>
          <table:table-row>
            <table:table-cell office:value-type="string">
              <text:p>103686,879</text:p>
            </table:table-cell>
            <table:table-cell office:value-type="float" office:value="103686.879"/>
            <table:table-cell office:value-type="float" office:value="0"/>
          </table:table-row>
          <table:table-row>
            <table:table-cell office:value-type="string">
              <text:p>106048,662</text:p>
            </table:table-cell>
            <table:table-cell office:value-type="float" office:value="106048.662"/>
            <table:table-cell office:value-type="float" office:value="24.3"/>
          </table:table-row>
          <table:table-row>
            <table:table-cell office:value-type="string">
              <text:p>107686,867</text:p>
            </table:table-cell>
            <table:table-cell office:value-type="float" office:value="107686.867"/>
            <table:table-cell office:value-type="float" office:value="0"/>
          </table:table-row>
          <table:table-row>
            <table:table-cell office:value-type="string">
              <text:p>121598,295</text:p>
            </table:table-cell>
            <table:table-cell office:value-type="float" office:value="121598.295"/>
            <table:table-cell office:value-type="float" office:value="189.5"/>
          </table:table-row>
          <table:table-row>
            <table:table-cell office:value-type="string">
              <text:p>124086,333</text:p>
            </table:table-cell>
            <table:table-cell office:value-type="float" office:value="124086.333"/>
            <table:table-cell office:value-type="float" office:value="237.8"/>
          </table:table-row>
          <table:table-row>
            <table:table-cell office:value-type="string">
              <text:p>141886,171</text:p>
            </table:table-cell>
            <table:table-cell office:value-type="float" office:value="141886.171"/>
            <table:table-cell office:value-type="float" office:value="322.1000000000000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stroke-dash draw:name="a3" draw:display-name="SysDot" draw:style="rect" draw:dots1="1" draw:dots1-length="0.05556in" draw:dots2="0" draw:dots2-length="0in" draw:distance="0.05556in"/>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389in" svg:stroke-color="#89898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solid" svg:stroke-width="0.01389in" svg:stroke-color="#89898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389in" svg:stroke-color="#89898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819in" svg:stroke-color="#156082"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389in" svg:stroke-color="#89898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false"/>
      <style:graphic-properties draw:fill="solid" draw:fill-color="#ffffff" draw:opacity="100%" draw:stroke="none"/>
    </style:style>
  </office:automatic-styles>
  <office:body>
    <office:chart>
      <chart:chart chart:class="chart:line" svg:height="211.25pt" svg:width="453.6pt" chart:style-name="Crt0">
        <chart:title chart:style-name="CT00">
          <text:p text:style-name="a0" text:class-names="" text:cond-style-name="">Consommation moyenne par mois</text:p>
        </chart:title>
        <chart:plot-area svg:x="8.761181102362205pt" svg:y="43.0796062992126pt" svg:width="435.2977952755905pt" svg:height="140.9391338582677pt" chart:style-name="Plt0" chart:data-source-has-labels="both">
          <chart:axis chart:dimension="x" chart:name="primary-x" chart:style-name="Axs0">
            <chart:title chart:style-name="AT00">
              <text:p text:style-name="a1" text:class-names="" text:cond-style-name="">Mois</text:p>
            </chart:title>
            <chart:categories table:cell-range-address="local-table.$A$2:.$A$13"/>
          </chart:axis>
          <chart:axis chart:dimension="y" chart:name="primary-y" chart:style-name="Axs1">
            <chart:title chart:style-name="AT01">
              <text:p text:style-name="a2" text:class-names="" text:cond-style-name="">Consommation (GWh)</text:p>
            </chart:title>
            <chart:grid chart:class="major" chart:style-name="GMa1"/>
          </chart:axis>
          <chart:series chart:label-cell-address="local-table.$B$1" chart:values-cell-range-address="local-table.$B$2:.$B$13" chart:class="chart:line" chart:attached-axis="primary-y" chart:style-name="G0S0">
            <chart:data-point chart:repeated="1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Janvier</text:p>
            </table:table-cell>
            <table:table-cell office:value-type="float" office:value="135177.57491666666"/>
          </table:table-row>
          <table:table-row>
            <table:table-cell office:value-type="string">
              <text:p>Février</text:p>
            </table:table-cell>
            <table:table-cell office:value-type="float" office:value="118028.17541666668"/>
          </table:table-row>
          <table:table-row>
            <table:table-cell office:value-type="string">
              <text:p>Mars</text:p>
            </table:table-cell>
            <table:table-cell office:value-type="float" office:value="115696.62358333333"/>
          </table:table-row>
          <table:table-row>
            <table:table-cell office:value-type="string">
              <text:p>Avril</text:p>
            </table:table-cell>
            <table:table-cell office:value-type="float" office:value="100687.92283333336"/>
          </table:table-row>
          <table:table-row>
            <table:table-cell office:value-type="string">
              <text:p>Mai</text:p>
            </table:table-cell>
            <table:table-cell office:value-type="float" office:value="96395.032499999987"/>
          </table:table-row>
          <table:table-row>
            <table:table-cell office:value-type="string">
              <text:p>Juin</text:p>
            </table:table-cell>
            <table:table-cell office:value-type="float" office:value="91147.257333333328"/>
          </table:table-row>
          <table:table-row>
            <table:table-cell office:value-type="string">
              <text:p>Juillet</text:p>
            </table:table-cell>
            <table:table-cell office:value-type="float" office:value="94815.571916666653"/>
          </table:table-row>
          <table:table-row>
            <table:table-cell office:value-type="string">
              <text:p>Août</text:p>
            </table:table-cell>
            <table:table-cell office:value-type="float" office:value="90736.182166666651"/>
          </table:table-row>
          <table:table-row>
            <table:table-cell office:value-type="string">
              <text:p>Septembre</text:p>
            </table:table-cell>
            <table:table-cell office:value-type="float" office:value="91593.672833333316"/>
          </table:table-row>
          <table:table-row>
            <table:table-cell office:value-type="string">
              <text:p>Octobre</text:p>
            </table:table-cell>
            <table:table-cell office:value-type="float" office:value="99910.299666666659"/>
          </table:table-row>
          <table:table-row>
            <table:table-cell office:value-type="string">
              <text:p>Novembre</text:p>
            </table:table-cell>
            <table:table-cell office:value-type="float" office:value="107794.16450000001"/>
          </table:table-row>
          <table:table-row>
            <table:table-cell office:value-type="string">
              <text:p>Décembre</text:p>
            </table:table-cell>
            <table:table-cell office:value-type="float" office:value="124296.65891666665"/>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Plt0">
      <style:chart-properties chart:three-dimensional="false" chart:deep="false" chart:stacked="false" chart:percentage="tru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tru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true"/>
      <style:graphic-properties draw:fill="solid" draw:fill-color="#156082" draw:opacity="100%" draw:stroke="none"/>
    </style:style>
    <style:style style:family="chart" style:name="G0S1">
      <style:chart-properties chart:symbol-type="none" chart:vertical="false" chart:connect-bars="false" chart:solid-type="cuboid" chart:stacked="false" chart:percentage="true"/>
      <style:graphic-properties draw:fill="solid" draw:fill-color="#e97132" draw:opacity="100%" draw:stroke="none"/>
    </style:style>
    <style:style style:family="chart" style:name="G0S2">
      <style:chart-properties chart:symbol-type="none" chart:vertical="false" chart:connect-bars="false" chart:solid-type="cuboid" chart:stacked="false" chart:percentage="true"/>
      <style:graphic-properties draw:fill="solid" draw:fill-color="#196b24"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true"/>
      <style:graphic-properties draw:fill="solid" draw:fill-color="#0f9ed5" draw:opacity="100%" draw:stroke="none"/>
    </style:style>
  </office:automatic-styles>
  <office:body>
    <office:chart>
      <chart:chart chart:class="chart:bar" svg:height="239.05pt" svg:width="453.6pt" chart:style-name="Crt0">
        <chart:legend chart:legend-position="end" chart:legend-align="center" chart:style-name="Lgnd"/>
        <chart:plot-area chart:style-name="Plt0" chart:data-source-has-labels="both">
          <chart:axis chart:dimension="x" chart:name="primary-x" chart:style-name="Axs0">
            <chart:categories table:cell-range-address="local-table.$A$2:.$A$18"/>
          </chart:axis>
          <chart:axis chart:dimension="y" chart:name="primary-y" chart:style-name="Axs1">
            <chart:grid chart:class="major" chart:style-name="GMa1"/>
          </chart:axis>
          <chart:series chart:label-cell-address="local-table.$B$1" chart:values-cell-range-address="local-table.$B$2:.$B$18" chart:class="chart:bar" chart:attached-axis="primary-y" chart:style-name="G0S0">
            <chart:data-point chart:repeated="17"/>
          </chart:series>
          <chart:series chart:label-cell-address="local-table.$C$1" chart:values-cell-range-address="local-table.$C$2:.$C$18" chart:class="chart:bar" chart:attached-axis="primary-y" chart:style-name="G0S1">
            <chart:data-point chart:repeated="17"/>
          </chart:series>
          <chart:series chart:label-cell-address="local-table.$D$1" chart:values-cell-range-address="local-table.$D$2:.$D$18" chart:class="chart:bar" chart:attached-axis="primary-y" chart:style-name="G0S2">
            <chart:data-point chart:repeated="17"/>
          </chart:series>
          <chart:series chart:label-cell-address="local-table.$E$1" chart:values-cell-range-address="local-table.$E$2:.$E$18" chart:class="chart:bar" chart:attached-axis="primary-y" chart:style-name="G0S3">
            <chart:data-point chart:repeated="17"/>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Conso charbon</text:p>
              </table:table-cell>
              <table:table-cell office:value-type="string">
                <text:p>Conso pétrole</text:p>
              </table:table-cell>
              <table:table-cell office:value-type="string">
                <text:p>Conso gaz</text:p>
              </table:table-cell>
              <table:table-cell office:value-type="string">
                <text:p>Conso nucléaire + ENR</text:p>
              </table:table-cell>
            </table:table-row>
          </table:table-header-rows>
          <table:table-row>
            <table:table-cell office:value-type="string">
              <text:p>2006</text:p>
            </table:table-cell>
            <table:table-cell office:value-type="float" office:value="12218.928999999998"/>
            <table:table-cell office:value-type="float" office:value="83301.722333333339"/>
            <table:table-cell office:value-type="float" office:value="37889.774416666674"/>
            <table:table-cell office:value-type="float" office:value="113783.61333333333"/>
          </table:table-row>
          <table:table-row>
            <table:table-cell office:value-type="string">
              <text:p>2007</text:p>
            </table:table-cell>
            <table:table-cell office:value-type="float" office:value="12812.668666666665"/>
            <table:table-cell office:value-type="float" office:value="81814.336333333325"/>
            <table:table-cell office:value-type="float" office:value="36812.326583333335"/>
            <table:table-cell office:value-type="float" office:value="112049.58333333333"/>
          </table:table-row>
          <table:table-row>
            <table:table-cell office:value-type="string">
              <text:p>2008</text:p>
            </table:table-cell>
            <table:table-cell office:value-type="float" office:value="11937.465000000002"/>
            <table:table-cell office:value-type="float" office:value="81208.607166666654"/>
            <table:table-cell office:value-type="float" office:value="38010.593666666675"/>
            <table:table-cell office:value-type="float" office:value="113245.27491666668"/>
          </table:table-row>
          <table:table-row>
            <table:table-cell office:value-type="string">
              <text:p>2009</text:p>
            </table:table-cell>
            <table:table-cell office:value-type="float" office:value="10024.17575"/>
            <table:table-cell office:value-type="float" office:value="77834.986499999999"/>
            <table:table-cell office:value-type="float" office:value="36251.513500000001"/>
            <table:table-cell office:value-type="float" office:value="107286.75275"/>
          </table:table-row>
          <table:table-row>
            <table:table-cell office:value-type="string">
              <text:p>2010</text:p>
            </table:table-cell>
            <table:table-cell office:value-type="float" office:value="10572.517249999999"/>
            <table:table-cell office:value-type="float" office:value="76709.250916666657"/>
            <table:table-cell office:value-type="float" office:value="40665.557000000008"/>
            <table:table-cell office:value-type="float" office:value="112115.58858333336"/>
          </table:table-row>
          <table:table-row>
            <table:table-cell office:value-type="string">
              <text:p>2011</text:p>
            </table:table-cell>
            <table:table-cell office:value-type="float" office:value="8865.206416666666"/>
            <table:table-cell office:value-type="float" office:value="75255.403999999995"/>
            <table:table-cell office:value-type="float" office:value="35128.693166666664"/>
            <table:table-cell office:value-type="float" office:value="112282.79758333333"/>
          </table:table-row>
          <table:table-row>
            <table:table-cell office:value-type="string">
              <text:p>2012</text:p>
            </table:table-cell>
            <table:table-cell office:value-type="float" office:value="9887.2260000000006"/>
            <table:table-cell office:value-type="float" office:value="74113.919499999989"/>
            <table:table-cell office:value-type="float" office:value="36647.776666666665"/>
            <table:table-cell office:value-type="float" office:value="110543.02275"/>
          </table:table-row>
          <table:table-row>
            <table:table-cell office:value-type="string">
              <text:p>2013</text:p>
            </table:table-cell>
            <table:table-cell office:value-type="float" office:value="10493.818333333335"/>
            <table:table-cell office:value-type="float" office:value="73384.39675"/>
            <table:table-cell office:value-type="float" office:value="37168.664916666668"/>
            <table:table-cell office:value-type="float" office:value="110861.22183333333"/>
          </table:table-row>
          <table:table-row>
            <table:table-cell office:value-type="string">
              <text:p>2014</text:p>
            </table:table-cell>
            <table:table-cell office:value-type="float" office:value="8098.090416666666"/>
            <table:table-cell office:value-type="float" office:value="71308.001833333328"/>
            <table:table-cell office:value-type="float" office:value="31109.791083333334"/>
            <table:table-cell office:value-type="float" office:value="111952.06508333333"/>
          </table:table-row>
          <table:table-row>
            <table:table-cell office:value-type="string">
              <text:p>2015</text:p>
            </table:table-cell>
            <table:table-cell office:value-type="float" office:value="8378.4714166666672"/>
            <table:table-cell office:value-type="float" office:value="72351.266166666654"/>
            <table:table-cell office:value-type="float" office:value="33538.27416666667"/>
            <table:table-cell office:value-type="float" office:value="112307.48616666667"/>
          </table:table-row>
          <table:table-row>
            <table:table-cell office:value-type="string">
              <text:p>2016</text:p>
            </table:table-cell>
            <table:table-cell office:value-type="float" office:value="7998.6869166666656"/>
            <table:table-cell office:value-type="float" office:value="72210.386166666663"/>
            <table:table-cell office:value-type="float" office:value="36660.038083333333"/>
            <table:table-cell office:value-type="float" office:value="106009.38683333334"/>
          </table:table-row>
          <table:table-row>
            <table:table-cell office:value-type="string">
              <text:p>2017</text:p>
            </table:table-cell>
            <table:table-cell office:value-type="float" office:value="8720.2171666666691"/>
            <table:table-cell office:value-type="float" office:value="72663.979166666686"/>
            <table:table-cell office:value-type="float" office:value="36808.644333333337"/>
            <table:table-cell office:value-type="float" office:value="104333.06500000002"/>
          </table:table-row>
          <table:table-row>
            <table:table-cell office:value-type="string">
              <text:p>2018</text:p>
            </table:table-cell>
            <table:table-cell office:value-type="float" office:value="8038.9015833333333"/>
            <table:table-cell office:value-type="float" office:value="73350.996333333344"/>
            <table:table-cell office:value-type="float" office:value="35096.324416666663"/>
            <table:table-cell office:value-type="float" office:value="108104.1675"/>
          </table:table-row>
          <table:table-row>
            <table:table-cell office:value-type="string">
              <text:p>2019</text:p>
            </table:table-cell>
            <table:table-cell office:value-type="float" office:value="6387.4827500000001"/>
            <table:table-cell office:value-type="float" office:value="73161.556916666668"/>
            <table:table-cell office:value-type="float" office:value="35735.377"/>
            <table:table-cell office:value-type="float" office:value="104945.53266666667"/>
          </table:table-row>
          <table:table-row>
            <table:table-cell office:value-type="string">
              <text:p>2020</text:p>
            </table:table-cell>
            <table:table-cell office:value-type="float" office:value="5290.6178181818177"/>
            <table:table-cell office:value-type="float" office:value="61693.213416666666"/>
            <table:table-cell office:value-type="float" office:value="33168.847083333334"/>
            <table:table-cell office:value-type="float" office:value="95592.662583333324"/>
          </table:table-row>
          <table:table-row>
            <table:table-cell office:value-type="string">
              <text:p>2021</text:p>
            </table:table-cell>
            <table:table-cell office:value-type="float" office:value="6629.4677499999998"/>
            <table:table-cell office:value-type="float" office:value="67425.234416666673"/>
            <table:table-cell office:value-type="float" office:value="35206.837500000001"/>
            <table:table-cell office:value-type="float" office:value="101715.93675000001"/>
          </table:table-row>
          <table:table-row>
            <table:table-cell office:value-type="string">
              <text:p>2022</text:p>
            </table:table-cell>
            <table:table-cell office:value-type="float" office:value="5622.2667499999998"/>
            <table:table-cell office:value-type="float" office:value="66336.680416666655"/>
            <table:table-cell office:value-type="float" office:value="31775.548999999999"/>
            <table:table-cell office:value-type="float" office:value="84673.646416666656"/>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solid" draw:fill-color="#156082" draw:opacity="100%" draw:stroke="none" draw:shadow="visible" draw:shadow-offset-x="0in" draw:shadow-offset-y="0in" draw:shadow-color="#000000" draw:shadow-opacity="20%"/>
    </style:style>
    <style:style style:family="chart" style:name="G0S0P1">
      <style:graphic-properties draw:fill="solid" draw:fill-color="#e97132" draw:opacity="100%" draw:stroke="none" draw:shadow="visible" draw:shadow-offset-x="0in" draw:shadow-offset-y="0in" draw:shadow-color="#000000" draw:shadow-opacity="20%"/>
    </style:style>
    <style:style style:family="chart" style:name="G0S0P2">
      <style:graphic-properties draw:fill="solid" draw:fill-color="#196b24" draw:opacity="100%" draw:stroke="none" draw:shadow="visible" draw:shadow-offset-x="0in" draw:shadow-offset-y="0in" draw:shadow-color="#000000" draw:shadow-opacity="20%"/>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0f9ed5" draw:opacity="100%" draw:stroke="none" draw:shadow="visible" draw:shadow-offset-x="0in" draw:shadow-offset-y="0in" draw:shadow-color="#000000" draw:shadow-opacity="20%"/>
    </style:style>
    <style:style style:family="chart" style:name="G0S0P4">
      <style:graphic-properties draw:fill="solid" draw:fill-color="#a02b93" draw:opacity="100%" draw:stroke="none" draw:shadow="visible" draw:shadow-offset-x="0in" draw:shadow-offset-y="0in" draw:shadow-color="#000000" draw:shadow-opacity="20%"/>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chart:label-position="center" chart:data-label-series="false">
        <chart:label-separator>
          <text:p text:style-name="a2" text:class-names="" text:cond-style-name="">;<text:s text:c="1"/></text:p>
        </chart:label-separator>
      </style:chart-properties>
      <style:graphic-properties draw:fill="solid" draw:fill-color="#156082"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bitmap" draw:fill-image-name="a3" style:repeat="repea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gradient" draw:fill-gradient-name="a0" draw:stroke="solid" svg:stroke-width="0.01042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91.05pt" svg:width="453.6pt" chart:style-name="Crt0">
        <chart:title chart:style-name="CT00">
          <text:p text:style-name="a1" text:class-names="" text:cond-style-name="">Mix de consommation énergétique moyen en France</text:p>
        </chart:title>
        <chart:legend chart:legend-position="end"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érie1</text:p>
              </table:table-cell>
            </table:table-row>
          </table:table-header-rows>
          <table:table-row>
            <table:table-cell office:value-type="string">
              <text:p>Moyennes totales</text:p>
            </table:table-cell>
            <table:table-cell/>
          </table:table-row>
          <table:table-row>
            <table:table-cell office:value-type="string">
              <text:p> Charbon</text:p>
            </table:table-cell>
            <table:table-cell office:value-type="float" office:value="8957.7531527093543"/>
          </table:table-row>
          <table:table-row>
            <table:table-cell office:value-type="string">
              <text:p>Pétrole</text:p>
            </table:table-cell>
            <table:table-cell office:value-type="float" office:value="73771.996372549009"/>
          </table:table-row>
          <table:table-row>
            <table:table-cell office:value-type="string">
              <text:p>Gaz</text:p>
            </table:table-cell>
            <table:table-cell office:value-type="float" office:value="35745.56368137255"/>
          </table:table-row>
          <table:table-row>
            <table:table-cell office:value-type="string">
              <text:p>Nucléaire + ENR</text:p>
            </table:table-cell>
            <table:table-cell office:value-type="float" office:value="107164.81200490192"/>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gradient draw:name="a0" draw:style="radial" draw:cx="50%" draw:cy="-80%" draw:start-color="#ffffff" draw:end-color="#ffffff" draw:start-intensity="100%" draw:end-intensity="100%"/>
    <draw:fill-image xmlns:xlink="http://www.w3.org/1999/xlink" draw:name="a3" xlink:href="media/image1.png" xlink:show="embed" xlink:actuate="onLoad"/>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156082" draw:opacity="100%" draw:stroke="none"/>
    </style:style>
    <style:style style:family="chart" style:name="G0S1">
      <style:chart-properties chart:symbol-type="none" chart:vertical="false" chart:connect-bars="false" chart:solid-type="cuboid" chart:stacked="false" chart:percentage="false"/>
      <style:graphic-properties draw:fill="solid" draw:fill-color="#e97132"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70.8pt" svg:width="454.25pt" chart:style-name="Crt0">
        <chart:legend chart:legend-position="end" chart:legend-align="center" chart:style-name="Lgnd"/>
        <chart:plot-area chart:style-name="Plt0" chart:data-source-has-labels="both">
          <chart:axis chart:dimension="x" chart:name="primary-x" chart:style-name="Axs0">
            <chart:categories table:cell-range-address="local-table.$A$2:.$A$18"/>
          </chart:axis>
          <chart:axis chart:dimension="y" chart:name="primary-y" chart:style-name="Axs1">
            <chart:grid chart:class="major" chart:style-name="GMa1"/>
          </chart:axis>
          <chart:series chart:label-cell-address="local-table.$B$1" chart:values-cell-range-address="local-table.$B$2:.$B$18" chart:class="chart:bar" chart:attached-axis="primary-y" chart:style-name="G0S0">
            <chart:data-point chart:repeated="17"/>
          </chart:series>
          <chart:series chart:label-cell-address="local-table.$C$1" chart:values-cell-range-address="local-table.$C$2:.$C$18" chart:class="chart:bar" chart:attached-axis="primary-y" chart:style-name="G0S1">
            <chart:data-point chart:repeated="1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Imports total (en GWh)</text:p>
              </table:table-cell>
              <table:table-cell office:value-type="string">
                <text:p>Exports total (en GWh)</text:p>
              </table:table-cell>
            </table:table-row>
          </table:table-header-rows>
          <table:table-row>
            <table:table-cell office:value-type="string">
              <text:p>2006</text:p>
            </table:table-cell>
            <table:table-cell office:value-type="float" office:value="2006985.486"/>
            <table:table-cell office:value-type="float" office:value="383231.01400000002"/>
          </table:table-row>
          <table:table-row>
            <table:table-cell office:value-type="string">
              <text:p>2007</text:p>
            </table:table-cell>
            <table:table-cell office:value-type="float" office:value="1940772.9349999996"/>
            <table:table-cell office:value-type="float" office:value="366504.07299999997"/>
          </table:table-row>
          <table:table-row>
            <table:table-cell office:value-type="string">
              <text:p>2008</text:p>
            </table:table-cell>
            <table:table-cell office:value-type="float" office:value="2010048.8849999995"/>
            <table:table-cell office:value-type="float" office:value="401100.90899999999"/>
          </table:table-row>
          <table:table-row>
            <table:table-cell office:value-type="string">
              <text:p>2009</text:p>
            </table:table-cell>
            <table:table-cell office:value-type="float" office:value="1870809.8219999999"/>
            <table:table-cell office:value-type="float" office:value="317527.57500000001"/>
          </table:table-row>
          <table:table-row>
            <table:table-cell office:value-type="string">
              <text:p>2010</text:p>
            </table:table-cell>
            <table:table-cell office:value-type="float" office:value="1837908.7540000002"/>
            <table:table-cell office:value-type="float" office:value="318941.42800000001"/>
          </table:table-row>
          <table:table-row>
            <table:table-cell office:value-type="string">
              <text:p>2011</text:p>
            </table:table-cell>
            <table:table-cell office:value-type="float" office:value="1796817.6290000002"/>
            <table:table-cell office:value-type="float" office:value="342700.66600000003"/>
          </table:table-row>
          <table:table-row>
            <table:table-cell office:value-type="string">
              <text:p>2012</text:p>
            </table:table-cell>
            <table:table-cell office:value-type="float" office:value="1744378.4219999998"/>
            <table:table-cell office:value-type="float" office:value="303051.24599999998"/>
          </table:table-row>
          <table:table-row>
            <table:table-cell office:value-type="string">
              <text:p>2013</text:p>
            </table:table-cell>
            <table:table-cell office:value-type="float" office:value="1731394.8180000002"/>
            <table:table-cell office:value-type="float" office:value="286366.62199999997"/>
          </table:table-row>
          <table:table-row>
            <table:table-cell office:value-type="string">
              <text:p>2014</text:p>
            </table:table-cell>
            <table:table-cell office:value-type="float" office:value="1633823.8979999998"/>
            <table:table-cell office:value-type="float" office:value="326947.64199999993"/>
          </table:table-row>
          <table:table-row>
            <table:table-cell office:value-type="string">
              <text:p>2015</text:p>
            </table:table-cell>
            <table:table-cell office:value-type="float" office:value="1673220.5370000002"/>
            <table:table-cell office:value-type="float" office:value="341633.50099999999"/>
          </table:table-row>
          <table:table-row>
            <table:table-cell office:value-type="string">
              <text:p>2016</text:p>
            </table:table-cell>
            <table:table-cell office:value-type="float" office:value="1674874.7590000001"/>
            <table:table-cell office:value-type="float" office:value="311756.35399999993"/>
          </table:table-row>
          <table:table-row>
            <table:table-cell office:value-type="string">
              <text:p>2017</text:p>
            </table:table-cell>
            <table:table-cell office:value-type="float" office:value="1702017.3080000004"/>
            <table:table-cell office:value-type="float" office:value="333024.78899999999"/>
          </table:table-row>
          <table:table-row>
            <table:table-cell office:value-type="string">
              <text:p>2018</text:p>
            </table:table-cell>
            <table:table-cell office:value-type="float" office:value="1528087.3640000001"/>
            <table:table-cell office:value-type="float" office:value="310000.55099999998"/>
          </table:table-row>
          <table:table-row>
            <table:table-cell office:value-type="string">
              <text:p>2019</text:p>
            </table:table-cell>
            <table:table-cell office:value-type="float" office:value="1628608.9670000002"/>
            <table:table-cell office:value-type="float" office:value="337065.88700000005"/>
          </table:table-row>
          <table:table-row>
            <table:table-cell office:value-type="string">
              <text:p>2020</text:p>
            </table:table-cell>
            <table:table-cell office:value-type="float" office:value="1339609.726"/>
            <table:table-cell office:value-type="float" office:value="268338.55900000001"/>
          </table:table-row>
          <table:table-row>
            <table:table-cell office:value-type="string">
              <text:p>2021</text:p>
            </table:table-cell>
            <table:table-cell office:value-type="float" office:value="1416681.612"/>
            <table:table-cell office:value-type="float" office:value="242906.06099999996"/>
          </table:table-row>
          <table:table-row>
            <table:table-cell office:value-type="string">
              <text:p>2022</text:p>
            </table:table-cell>
            <table:table-cell office:value-type="float" office:value="1481204.3180000002"/>
            <table:table-cell office:value-type="float" office:value="264714.14199999999"/>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00">
      <style:chart-properties chart:regression-type="linear"/>
      <style:graphic-properties draw:fill="none" draw:stroke="dash" draw:stroke-dash="a1" svg:stroke-width="0.02083in" svg:stroke-color="#000000" svg:stroke-opacity="100%" svg:stroke-linecap="round"/>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500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x"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x"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360.0pt" svg:width="464.5pt" chart:style-name="Crt0">
        <chart:title chart:style-name="CT00">
          <text:p text:style-name="a0" text:class-names="" text:cond-style-name="">Lien entre consommation d'énergies fossiles et émissions de CO2</text:p>
        </chart:title>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206" chart:class="chart:scatter" chart:attached-axis="primary-y" chart:style-name="G0S0">
            <chart:domain table:cell-range-address="local-table.$B$2:.$B$206"/>
            <chart:regression-curve chart:style-name="T000">
              <chart:equation chart:automatic-content="true" chart:display-equation="true" chart:display-r-square="false" chart:style-name="TL000"/>
            </chart:regression-curve>
            <chart:data-point chart:repeated="20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5, Emissions CO2 ECO2</text:p>
              </table:table-cell>
            </table:table-row>
          </table:table-header-rows>
          <table:table-row>
            <table:table-cell office:value-type="string">
              <text:p>122933,762</text:p>
            </table:table-cell>
            <table:table-cell office:value-type="float" office:value="122933.76199999999"/>
            <table:table-cell office:value-type="float" office:value="28473.823"/>
          </table:table-row>
          <table:table-row>
            <table:table-cell office:value-type="string">
              <text:p>105869,867</text:p>
            </table:table-cell>
            <table:table-cell office:value-type="float" office:value="105869.867"/>
            <table:table-cell office:value-type="float" office:value="24742.311000000002"/>
          </table:table-row>
          <table:table-row>
            <table:table-cell office:value-type="string">
              <text:p>92594,183</text:p>
            </table:table-cell>
            <table:table-cell office:value-type="float" office:value="92594.183000000005"/>
            <table:table-cell office:value-type="float" office:value="21862.687000000002"/>
          </table:table-row>
          <table:table-row>
            <table:table-cell office:value-type="string">
              <text:p>96821,803</text:p>
            </table:table-cell>
            <table:table-cell office:value-type="float" office:value="96821.803"/>
            <table:table-cell office:value-type="float" office:value="22735.098999999998"/>
          </table:table-row>
          <table:table-row>
            <table:table-cell office:value-type="string">
              <text:p>89188,683</text:p>
            </table:table-cell>
            <table:table-cell office:value-type="float" office:value="89188.683000000005"/>
            <table:table-cell office:value-type="float" office:value="20885.91"/>
          </table:table-row>
          <table:table-row>
            <table:table-cell office:value-type="string">
              <text:p>92303,512</text:p>
            </table:table-cell>
            <table:table-cell office:value-type="float" office:value="92303.511999999988"/>
            <table:table-cell office:value-type="float" office:value="20873.255000000001"/>
          </table:table-row>
          <table:table-row>
            <table:table-cell office:value-type="string">
              <text:p>90098,809</text:p>
            </table:table-cell>
            <table:table-cell office:value-type="float" office:value="90098.809000000008"/>
            <table:table-cell office:value-type="float" office:value="20464.407999999999"/>
          </table:table-row>
          <table:table-row>
            <table:table-cell office:value-type="string">
              <text:p>90385,085</text:p>
            </table:table-cell>
            <table:table-cell office:value-type="float" office:value="90385.084999999992"/>
            <table:table-cell office:value-type="float" office:value="21017.409"/>
          </table:table-row>
          <table:table-row>
            <table:table-cell office:value-type="string">
              <text:p>98606,561</text:p>
            </table:table-cell>
            <table:table-cell office:value-type="float" office:value="98606.561000000002"/>
            <table:table-cell office:value-type="float" office:value="22794.816999999999"/>
          </table:table-row>
          <table:table-row>
            <table:table-cell office:value-type="string">
              <text:p>118433,545</text:p>
            </table:table-cell>
            <table:table-cell office:value-type="float" office:value="118433.545"/>
            <table:table-cell office:value-type="float" office:value="27182.589"/>
          </table:table-row>
          <table:table-row>
            <table:table-cell office:value-type="string">
              <text:p>115218,55</text:p>
            </table:table-cell>
            <table:table-cell office:value-type="float" office:value="115218.54999999999"/>
            <table:table-cell office:value-type="float" office:value="26121.538"/>
          </table:table-row>
          <table:table-row>
            <table:table-cell office:value-type="string">
              <text:p>132359,594</text:p>
            </table:table-cell>
            <table:table-cell office:value-type="float" office:value="132359.59400000001"/>
            <table:table-cell office:value-type="float" office:value="29528.624"/>
          </table:table-row>
          <table:table-row>
            <table:table-cell office:value-type="string">
              <text:p>134375,324</text:p>
            </table:table-cell>
            <table:table-cell office:value-type="float" office:value="134375.32399999999"/>
            <table:table-cell office:value-type="float" office:value="30304.5"/>
          </table:table-row>
          <table:table-row>
            <table:table-cell office:value-type="string">
              <text:p>126814,513</text:p>
            </table:table-cell>
            <table:table-cell office:value-type="float" office:value="126814.51300000001"/>
            <table:table-cell office:value-type="float" office:value="28349.595000000001"/>
          </table:table-row>
          <table:table-row>
            <table:table-cell office:value-type="string">
              <text:p>112892,273</text:p>
            </table:table-cell>
            <table:table-cell office:value-type="float" office:value="112892.273"/>
            <table:table-cell office:value-type="float" office:value="25579.041000000001"/>
          </table:table-row>
          <table:table-row>
            <table:table-cell office:value-type="string">
              <text:p>97576,713</text:p>
            </table:table-cell>
            <table:table-cell office:value-type="float" office:value="97576.713000000018"/>
            <table:table-cell office:value-type="float" office:value="22061.422999999999"/>
          </table:table-row>
          <table:table-row>
            <table:table-cell office:value-type="string">
              <text:p>89823,212</text:p>
            </table:table-cell>
            <table:table-cell office:value-type="float" office:value="89823.212"/>
            <table:table-cell office:value-type="float" office:value="20749.761999999999"/>
          </table:table-row>
          <table:table-row>
            <table:table-cell office:value-type="string">
              <text:p>95166,603</text:p>
            </table:table-cell>
            <table:table-cell office:value-type="float" office:value="95166.603000000003"/>
            <table:table-cell office:value-type="float" office:value="21535.487000000001"/>
          </table:table-row>
          <table:table-row>
            <table:table-cell office:value-type="string">
              <text:p>91917,127</text:p>
            </table:table-cell>
            <table:table-cell office:value-type="float" office:value="91917.127000000008"/>
            <table:table-cell office:value-type="float" office:value="20881.253000000001"/>
          </table:table-row>
          <table:table-row>
            <table:table-cell office:value-type="string">
              <text:p>92046,731</text:p>
            </table:table-cell>
            <table:table-cell office:value-type="float" office:value="92046.731"/>
            <table:table-cell office:value-type="float" office:value="20758.112000000001"/>
          </table:table-row>
          <table:table-row>
            <table:table-cell office:value-type="string">
              <text:p>101016,114</text:p>
            </table:table-cell>
            <table:table-cell office:value-type="float" office:value="101016.114"/>
            <table:table-cell office:value-type="float" office:value="22994.138999999999"/>
          </table:table-row>
          <table:table-row>
            <table:table-cell office:value-type="string">
              <text:p>121876,033</text:p>
            </table:table-cell>
            <table:table-cell office:value-type="float" office:value="121876.03300000001"/>
            <table:table-cell office:value-type="float" office:value="27487.170999999998"/>
          </table:table-row>
          <table:table-row>
            <table:table-cell office:value-type="string">
              <text:p>114623,083</text:p>
            </table:table-cell>
            <table:table-cell office:value-type="float" office:value="114623.08300000001"/>
            <table:table-cell office:value-type="float" office:value="25494.646000000001"/>
          </table:table-row>
          <table:table-row>
            <table:table-cell office:value-type="string">
              <text:p>133010,75</text:p>
            </table:table-cell>
            <table:table-cell office:value-type="float" office:value="133010.75"/>
            <table:table-cell office:value-type="float" office:value="29592.929"/>
          </table:table-row>
          <table:table-row>
            <table:table-cell office:value-type="string">
              <text:p>126254,465</text:p>
            </table:table-cell>
            <table:table-cell office:value-type="float" office:value="126254.465"/>
            <table:table-cell office:value-type="float" office:value="28208.703000000001"/>
          </table:table-row>
          <table:table-row>
            <table:table-cell office:value-type="string">
              <text:p>103866,477</text:p>
            </table:table-cell>
            <table:table-cell office:value-type="float" office:value="103866.477"/>
            <table:table-cell office:value-type="float" office:value="22663.078000000001"/>
          </table:table-row>
          <table:table-row>
            <table:table-cell office:value-type="string">
              <text:p>103304,051</text:p>
            </table:table-cell>
            <table:table-cell office:value-type="float" office:value="103304.05100000001"/>
            <table:table-cell office:value-type="float" office:value="24319.416000000001"/>
          </table:table-row>
          <table:table-row>
            <table:table-cell office:value-type="string">
              <text:p>94020,221</text:p>
            </table:table-cell>
            <table:table-cell office:value-type="float" office:value="94020.22100000002"/>
            <table:table-cell office:value-type="float" office:value="21216.001"/>
          </table:table-row>
          <table:table-row>
            <table:table-cell office:value-type="string">
              <text:p>82814,13</text:p>
            </table:table-cell>
            <table:table-cell office:value-type="float" office:value="82814.13"/>
            <table:table-cell office:value-type="float" office:value="18754.808000000001"/>
          </table:table-row>
          <table:table-row>
            <table:table-cell office:value-type="string">
              <text:p>92785,395</text:p>
            </table:table-cell>
            <table:table-cell office:value-type="float" office:value="92785.395000000004"/>
            <table:table-cell office:value-type="float" office:value="20644.256000000001"/>
          </table:table-row>
          <table:table-row>
            <table:table-cell office:value-type="string">
              <text:p>83359,334</text:p>
            </table:table-cell>
            <table:table-cell office:value-type="float" office:value="83359.334000000003"/>
            <table:table-cell office:value-type="float" office:value="18535.758000000002"/>
          </table:table-row>
          <table:table-row>
            <table:table-cell office:value-type="string">
              <text:p>75028,932</text:p>
            </table:table-cell>
            <table:table-cell office:value-type="float" office:value="75028.932000000001"/>
            <table:table-cell office:value-type="float" office:value="16738.677"/>
          </table:table-row>
          <table:table-row>
            <table:table-cell office:value-type="string">
              <text:p>67681,899</text:p>
            </table:table-cell>
            <table:table-cell office:value-type="float" office:value="67681.899000000005"/>
            <table:table-cell office:value-type="float" office:value="14804.465"/>
          </table:table-row>
          <table:table-row>
            <table:table-cell office:value-type="string">
              <text:p>110808,723</text:p>
            </table:table-cell>
            <table:table-cell office:value-type="float" office:value="110808.723"/>
            <table:table-cell office:value-type="float" office:value="24593.407999999999"/>
          </table:table-row>
          <table:table-row>
            <table:table-cell office:value-type="string">
              <text:p>120003,034</text:p>
            </table:table-cell>
            <table:table-cell office:value-type="float" office:value="120003.03399999999"/>
            <table:table-cell office:value-type="float" office:value="27227.206999999999"/>
          </table:table-row>
          <table:table-row>
            <table:table-cell office:value-type="string">
              <text:p>136614,861</text:p>
            </table:table-cell>
            <table:table-cell office:value-type="float" office:value="136614.861"/>
            <table:table-cell office:value-type="float" office:value="30979.055"/>
          </table:table-row>
          <table:table-row>
            <table:table-cell office:value-type="string">
              <text:p>129792,367</text:p>
            </table:table-cell>
            <table:table-cell office:value-type="float" office:value="129792.367"/>
            <table:table-cell office:value-type="float" office:value="29575.141"/>
          </table:table-row>
          <table:table-row>
            <table:table-cell office:value-type="string">
              <text:p>127554,456</text:p>
            </table:table-cell>
            <table:table-cell office:value-type="float" office:value="127554.45600000001"/>
            <table:table-cell office:value-type="float" office:value="28744.403999999999"/>
          </table:table-row>
          <table:table-row>
            <table:table-cell office:value-type="string">
              <text:p>113588,961</text:p>
            </table:table-cell>
            <table:table-cell office:value-type="float" office:value="113588.96100000001"/>
            <table:table-cell office:value-type="float" office:value="25740.879000000001"/>
          </table:table-row>
          <table:table-row>
            <table:table-cell office:value-type="string">
              <text:p>102715,879</text:p>
            </table:table-cell>
            <table:table-cell office:value-type="float" office:value="102715.87899999999"/>
            <table:table-cell office:value-type="float" office:value="23568.001"/>
          </table:table-row>
          <table:table-row>
            <table:table-cell office:value-type="string">
              <text:p>94626,787</text:p>
            </table:table-cell>
            <table:table-cell office:value-type="float" office:value="94626.786999999997"/>
            <table:table-cell office:value-type="float" office:value="21569.106"/>
          </table:table-row>
          <table:table-row>
            <table:table-cell office:value-type="string">
              <text:p>106940,528</text:p>
            </table:table-cell>
            <table:table-cell office:value-type="float" office:value="106940.52799999999"/>
            <table:table-cell office:value-type="float" office:value="24412.564999999999"/>
          </table:table-row>
          <table:table-row>
            <table:table-cell office:value-type="string">
              <text:p>97674,932</text:p>
            </table:table-cell>
            <table:table-cell office:value-type="float" office:value="97674.931999999986"/>
            <table:table-cell office:value-type="float" office:value="22278.934000000001"/>
          </table:table-row>
          <table:table-row>
            <table:table-cell office:value-type="string">
              <text:p>105712,758</text:p>
            </table:table-cell>
            <table:table-cell office:value-type="float" office:value="105712.75799999999"/>
            <table:table-cell office:value-type="float" office:value="23834.272000000001"/>
          </table:table-row>
          <table:table-row>
            <table:table-cell office:value-type="string">
              <text:p>112826,744</text:p>
            </table:table-cell>
            <table:table-cell office:value-type="float" office:value="112826.74400000001"/>
            <table:table-cell office:value-type="float" office:value="25550.724999999999"/>
          </table:table-row>
          <table:table-row>
            <table:table-cell office:value-type="string">
              <text:p>120496,967</text:p>
            </table:table-cell>
            <table:table-cell office:value-type="float" office:value="120496.967"/>
            <table:table-cell office:value-type="float" office:value="27250.952000000001"/>
          </table:table-row>
          <table:table-row>
            <table:table-cell office:value-type="string">
              <text:p>123368,971</text:p>
            </table:table-cell>
            <table:table-cell office:value-type="float" office:value="123368.97100000002"/>
            <table:table-cell office:value-type="float" office:value="27900.272000000001"/>
          </table:table-row>
          <table:table-row>
            <table:table-cell office:value-type="string">
              <text:p>148113,65</text:p>
            </table:table-cell>
            <table:table-cell office:value-type="float" office:value="148113.65"/>
            <table:table-cell office:value-type="float" office:value="33176.821000000004"/>
          </table:table-row>
          <table:table-row>
            <table:table-cell office:value-type="string">
              <text:p>130319,606</text:p>
            </table:table-cell>
            <table:table-cell office:value-type="float" office:value="130319.606"/>
            <table:table-cell office:value-type="float" office:value="29819.382000000001"/>
          </table:table-row>
          <table:table-row>
            <table:table-cell office:value-type="string">
              <text:p>128231,354</text:p>
            </table:table-cell>
            <table:table-cell office:value-type="float" office:value="128231.35399999999"/>
            <table:table-cell office:value-type="float" office:value="29588.454000000002"/>
          </table:table-row>
          <table:table-row>
            <table:table-cell office:value-type="string">
              <text:p>120719,808</text:p>
            </table:table-cell>
            <table:table-cell office:value-type="float" office:value="120719.80800000002"/>
            <table:table-cell office:value-type="float" office:value="28257.317999999999"/>
          </table:table-row>
          <table:table-row>
            <table:table-cell office:value-type="string">
              <text:p>99193,955</text:p>
            </table:table-cell>
            <table:table-cell office:value-type="float" office:value="99193.955000000016"/>
            <table:table-cell office:value-type="float" office:value="22887.280999999999"/>
          </table:table-row>
          <table:table-row>
            <table:table-cell office:value-type="string">
              <text:p>98148,142</text:p>
            </table:table-cell>
            <table:table-cell office:value-type="float" office:value="98148.142000000007"/>
            <table:table-cell office:value-type="float" office:value="22538.203000000001"/>
          </table:table-row>
          <table:table-row>
            <table:table-cell office:value-type="string">
              <text:p>103687,001</text:p>
            </table:table-cell>
            <table:table-cell office:value-type="float" office:value="103687.00100000002"/>
            <table:table-cell office:value-type="float" office:value="23823.973999999998"/>
          </table:table-row>
          <table:table-row>
            <table:table-cell office:value-type="string">
              <text:p>99856,557</text:p>
            </table:table-cell>
            <table:table-cell office:value-type="float" office:value="99856.557000000001"/>
            <table:table-cell office:value-type="float" office:value="22899.856"/>
          </table:table-row>
          <table:table-row>
            <table:table-cell office:value-type="string">
              <text:p>100456,81</text:p>
            </table:table-cell>
            <table:table-cell office:value-type="float" office:value="100456.81"/>
            <table:table-cell office:value-type="float" office:value="23099.888999999999"/>
          </table:table-row>
          <table:table-row>
            <table:table-cell office:value-type="string">
              <text:p>104785,811</text:p>
            </table:table-cell>
            <table:table-cell office:value-type="float" office:value="104785.81099999999"/>
            <table:table-cell office:value-type="float" office:value="23928.256000000001"/>
          </table:table-row>
          <table:table-row>
            <table:table-cell office:value-type="string">
              <text:p>140060,63</text:p>
            </table:table-cell>
            <table:table-cell office:value-type="float" office:value="140060.63"/>
            <table:table-cell office:value-type="float" office:value="31777.415000000001"/>
          </table:table-row>
          <table:table-row>
            <table:table-cell office:value-type="string">
              <text:p>141957,067</text:p>
            </table:table-cell>
            <table:table-cell office:value-type="float" office:value="141957.06700000001"/>
            <table:table-cell office:value-type="float" office:value="32063.788"/>
          </table:table-row>
          <table:table-row>
            <table:table-cell office:value-type="string">
              <text:p>130417,927</text:p>
            </table:table-cell>
            <table:table-cell office:value-type="float" office:value="130417.92700000001"/>
            <table:table-cell office:value-type="float" office:value="29525.858"/>
          </table:table-row>
          <table:table-row>
            <table:table-cell office:value-type="string">
              <text:p>142415,935</text:p>
            </table:table-cell>
            <table:table-cell office:value-type="float" office:value="142415.935"/>
            <table:table-cell office:value-type="float" office:value="32406.144"/>
          </table:table-row>
          <table:table-row>
            <table:table-cell office:value-type="string">
              <text:p>130993,67</text:p>
            </table:table-cell>
            <table:table-cell office:value-type="float" office:value="130993.66999999998"/>
            <table:table-cell office:value-type="float" office:value="30137.957999999999"/>
          </table:table-row>
          <table:table-row>
            <table:table-cell office:value-type="string">
              <text:p>113227,058</text:p>
            </table:table-cell>
            <table:table-cell office:value-type="float" office:value="113227.058"/>
            <table:table-cell office:value-type="float" office:value="26122.44"/>
          </table:table-row>
          <table:table-row>
            <table:table-cell office:value-type="string">
              <text:p>109395,265</text:p>
            </table:table-cell>
            <table:table-cell office:value-type="float" office:value="109395.265"/>
            <table:table-cell office:value-type="float" office:value="25188.008999999998"/>
          </table:table-row>
          <table:table-row>
            <table:table-cell office:value-type="string">
              <text:p>97487,455</text:p>
            </table:table-cell>
            <table:table-cell office:value-type="float" office:value="97487.455000000002"/>
            <table:table-cell office:value-type="float" office:value="22082.251"/>
          </table:table-row>
          <table:table-row>
            <table:table-cell office:value-type="string">
              <text:p>102932,117</text:p>
            </table:table-cell>
            <table:table-cell office:value-type="float" office:value="102932.117"/>
            <table:table-cell office:value-type="float" office:value="23363.875"/>
          </table:table-row>
          <table:table-row>
            <table:table-cell office:value-type="string">
              <text:p>98314,356</text:p>
            </table:table-cell>
            <table:table-cell office:value-type="float" office:value="98314.356"/>
            <table:table-cell office:value-type="float" office:value="22167.327000000001"/>
          </table:table-row>
          <table:table-row>
            <table:table-cell office:value-type="string">
              <text:p>104120,424</text:p>
            </table:table-cell>
            <table:table-cell office:value-type="float" office:value="104120.424"/>
            <table:table-cell office:value-type="float" office:value="23720.232"/>
          </table:table-row>
          <table:table-row>
            <table:table-cell office:value-type="string">
              <text:p>108538,754</text:p>
            </table:table-cell>
            <table:table-cell office:value-type="float" office:value="108538.754"/>
            <table:table-cell office:value-type="float" office:value="24456.39"/>
          </table:table-row>
          <table:table-row>
            <table:table-cell office:value-type="string">
              <text:p>125663,056</text:p>
            </table:table-cell>
            <table:table-cell office:value-type="float" office:value="125663.05600000001"/>
            <table:table-cell office:value-type="float" office:value="28158.465"/>
          </table:table-row>
          <table:table-row>
            <table:table-cell office:value-type="string">
              <text:p>126700,856</text:p>
            </table:table-cell>
            <table:table-cell office:value-type="float" office:value="126700.856"/>
            <table:table-cell office:value-type="float" office:value="28499.558000000001"/>
          </table:table-row>
          <table:table-row>
            <table:table-cell office:value-type="string">
              <text:p>158525,142</text:p>
            </table:table-cell>
            <table:table-cell office:value-type="float" office:value="158525.14199999999"/>
            <table:table-cell office:value-type="float" office:value="35756.438999999998"/>
          </table:table-row>
          <table:table-row>
            <table:table-cell office:value-type="string">
              <text:p>146830,088</text:p>
            </table:table-cell>
            <table:table-cell office:value-type="float" office:value="146830.08799999999"/>
            <table:table-cell office:value-type="float" office:value="33663.178999999996"/>
          </table:table-row>
          <table:table-row>
            <table:table-cell office:value-type="string">
              <text:p>129150,635</text:p>
            </table:table-cell>
            <table:table-cell office:value-type="float" office:value="129150.63500000001"/>
            <table:table-cell office:value-type="float" office:value="29799.629000000001"/>
          </table:table-row>
          <table:table-row>
            <table:table-cell office:value-type="string">
              <text:p>121707,082</text:p>
            </table:table-cell>
            <table:table-cell office:value-type="float" office:value="121707.08200000001"/>
            <table:table-cell office:value-type="float" office:value="28126.491999999998"/>
          </table:table-row>
          <table:table-row>
            <table:table-cell office:value-type="string">
              <text:p>104162,608</text:p>
            </table:table-cell>
            <table:table-cell office:value-type="float" office:value="104162.60800000001"/>
            <table:table-cell office:value-type="float" office:value="24084.5"/>
          </table:table-row>
          <table:table-row>
            <table:table-cell office:value-type="string">
              <text:p>96875,174</text:p>
            </table:table-cell>
            <table:table-cell office:value-type="float" office:value="96875.174000000014"/>
            <table:table-cell office:value-type="float" office:value="22003.518"/>
          </table:table-row>
          <table:table-row>
            <table:table-cell office:value-type="string">
              <text:p>98452,59</text:p>
            </table:table-cell>
            <table:table-cell office:value-type="float" office:value="98452.59"/>
            <table:table-cell office:value-type="float" office:value="21936.501"/>
          </table:table-row>
          <table:table-row>
            <table:table-cell office:value-type="string">
              <text:p>94193,813</text:p>
            </table:table-cell>
            <table:table-cell office:value-type="float" office:value="94193.813000000009"/>
            <table:table-cell office:value-type="float" office:value="20753.175999999999"/>
          </table:table-row>
          <table:table-row>
            <table:table-cell office:value-type="string">
              <text:p>104172,092</text:p>
            </table:table-cell>
            <table:table-cell office:value-type="float" office:value="104172.092"/>
            <table:table-cell office:value-type="float" office:value="23572.771000000001"/>
          </table:table-row>
          <table:table-row>
            <table:table-cell office:value-type="string">
              <text:p>112349,039</text:p>
            </table:table-cell>
            <table:table-cell office:value-type="float" office:value="112349.03899999999"/>
            <table:table-cell office:value-type="float" office:value="25136.51"/>
          </table:table-row>
          <table:table-row>
            <table:table-cell office:value-type="string">
              <text:p>134635,69</text:p>
            </table:table-cell>
            <table:table-cell office:value-type="float" office:value="134635.69"/>
            <table:table-cell office:value-type="float" office:value="30121.217000000001"/>
          </table:table-row>
          <table:table-row>
            <table:table-cell office:value-type="string">
              <text:p>127995,556</text:p>
            </table:table-cell>
            <table:table-cell office:value-type="float" office:value="127995.55600000001"/>
            <table:table-cell office:value-type="float" office:value="28644.22"/>
          </table:table-row>
          <table:table-row>
            <table:table-cell office:value-type="string">
              <text:p>131904,967</text:p>
            </table:table-cell>
            <table:table-cell office:value-type="float" office:value="131904.967"/>
            <table:table-cell office:value-type="float" office:value="29345.185000000001"/>
          </table:table-row>
          <table:table-row>
            <table:table-cell office:value-type="string">
              <text:p>129227,76</text:p>
            </table:table-cell>
            <table:table-cell office:value-type="float" office:value="129227.75999999998"/>
            <table:table-cell office:value-type="float" office:value="29872.909"/>
          </table:table-row>
          <table:table-row>
            <table:table-cell office:value-type="string">
              <text:p>113503,432</text:p>
            </table:table-cell>
            <table:table-cell office:value-type="float" office:value="113503.432"/>
            <table:table-cell office:value-type="float" office:value="26238.851999999999"/>
          </table:table-row>
          <table:table-row>
            <table:table-cell office:value-type="string">
              <text:p>117963,255</text:p>
            </table:table-cell>
            <table:table-cell office:value-type="float" office:value="117963.255"/>
            <table:table-cell office:value-type="float" office:value="27383.455999999998"/>
          </table:table-row>
          <table:table-row>
            <table:table-cell office:value-type="string">
              <text:p>104743,508</text:p>
            </table:table-cell>
            <table:table-cell office:value-type="float" office:value="104743.508"/>
            <table:table-cell office:value-type="float" office:value="24347.728999999999"/>
          </table:table-row>
          <table:table-row>
            <table:table-cell office:value-type="string">
              <text:p>94889,933</text:p>
            </table:table-cell>
            <table:table-cell office:value-type="float" office:value="94889.933000000005"/>
            <table:table-cell office:value-type="float" office:value="21795.48"/>
          </table:table-row>
          <table:table-row>
            <table:table-cell office:value-type="string">
              <text:p>102892,239</text:p>
            </table:table-cell>
            <table:table-cell office:value-type="float" office:value="102892.239"/>
            <table:table-cell office:value-type="float" office:value="23465.138999999999"/>
          </table:table-row>
          <table:table-row>
            <table:table-cell office:value-type="string">
              <text:p>97024,094</text:p>
            </table:table-cell>
            <table:table-cell office:value-type="float" office:value="97024.094000000012"/>
            <table:table-cell office:value-type="float" office:value="21771.620999999999"/>
          </table:table-row>
          <table:table-row>
            <table:table-cell office:value-type="string">
              <text:p>93195,652</text:p>
            </table:table-cell>
            <table:table-cell office:value-type="float" office:value="93195.652000000002"/>
            <table:table-cell office:value-type="float" office:value="20920.289000000001"/>
          </table:table-row>
          <table:table-row>
            <table:table-cell office:value-type="string">
              <text:p>110738,871</text:p>
            </table:table-cell>
            <table:table-cell office:value-type="float" office:value="110738.871"/>
            <table:table-cell office:value-type="float" office:value="25250.771000000001"/>
          </table:table-row>
          <table:table-row>
            <table:table-cell office:value-type="string">
              <text:p>129743,345</text:p>
            </table:table-cell>
            <table:table-cell office:value-type="float" office:value="129743.345"/>
            <table:table-cell office:value-type="float" office:value="29333.128000000001"/>
          </table:table-row>
          <table:table-row>
            <table:table-cell office:value-type="string">
              <text:p>136393,358</text:p>
            </table:table-cell>
            <table:table-cell office:value-type="float" office:value="136393.35800000001"/>
            <table:table-cell office:value-type="float" office:value="30986.835999999999"/>
          </table:table-row>
          <table:table-row>
            <table:table-cell office:value-type="string">
              <text:p>140900,694</text:p>
            </table:table-cell>
            <table:table-cell office:value-type="float" office:value="140900.69400000002"/>
            <table:table-cell office:value-type="float" office:value="31951.244999999999"/>
          </table:table-row>
          <table:table-row>
            <table:table-cell office:value-type="string">
              <text:p>140545,729</text:p>
            </table:table-cell>
            <table:table-cell office:value-type="float" office:value="140545.72899999999"/>
            <table:table-cell office:value-type="float" office:value="32596.192999999999"/>
          </table:table-row>
          <table:table-row>
            <table:table-cell office:value-type="string">
              <text:p>112865,985</text:p>
            </table:table-cell>
            <table:table-cell office:value-type="float" office:value="112865.98499999999"/>
            <table:table-cell office:value-type="float" office:value="26303.717000000001"/>
          </table:table-row>
          <table:table-row>
            <table:table-cell office:value-type="string">
              <text:p>110626,943</text:p>
            </table:table-cell>
            <table:table-cell office:value-type="float" office:value="110626.943"/>
            <table:table-cell office:value-type="float" office:value="26081.737000000001"/>
          </table:table-row>
          <table:table-row>
            <table:table-cell office:value-type="string">
              <text:p>99899,768</text:p>
            </table:table-cell>
            <table:table-cell office:value-type="float" office:value="99899.767999999996"/>
            <table:table-cell office:value-type="float" office:value="23318.945"/>
          </table:table-row>
          <table:table-row>
            <table:table-cell office:value-type="string">
              <text:p>90301,694</text:p>
            </table:table-cell>
            <table:table-cell office:value-type="float" office:value="90301.694000000003"/>
            <table:table-cell office:value-type="float" office:value="20527.331999999999"/>
          </table:table-row>
          <table:table-row>
            <table:table-cell office:value-type="string">
              <text:p>100864,221</text:p>
            </table:table-cell>
            <table:table-cell office:value-type="float" office:value="100864.22099999999"/>
            <table:table-cell office:value-type="float" office:value="22638.643"/>
          </table:table-row>
          <table:table-row>
            <table:table-cell office:value-type="string">
              <text:p>95516,093</text:p>
            </table:table-cell>
            <table:table-cell office:value-type="float" office:value="95516.092999999993"/>
            <table:table-cell office:value-type="float" office:value="21551.275000000001"/>
          </table:table-row>
          <table:table-row>
            <table:table-cell office:value-type="string">
              <text:p>97798,716</text:p>
            </table:table-cell>
            <table:table-cell office:value-type="float" office:value="97798.716000000015"/>
            <table:table-cell office:value-type="float" office:value="22074.537"/>
          </table:table-row>
          <table:table-row>
            <table:table-cell office:value-type="string">
              <text:p>105514,537</text:p>
            </table:table-cell>
            <table:table-cell office:value-type="float" office:value="105514.53700000001"/>
            <table:table-cell office:value-type="float" office:value="24171.286"/>
          </table:table-row>
          <table:table-row>
            <table:table-cell office:value-type="string">
              <text:p>121626,88</text:p>
            </table:table-cell>
            <table:table-cell office:value-type="float" office:value="121626.88"/>
            <table:table-cell office:value-type="float" office:value="27688.644"/>
          </table:table-row>
          <table:table-row>
            <table:table-cell office:value-type="string">
              <text:p>119783,673</text:p>
            </table:table-cell>
            <table:table-cell office:value-type="float" office:value="119783.67300000001"/>
            <table:table-cell office:value-type="float" office:value="26961.569"/>
          </table:table-row>
          <table:table-row>
            <table:table-cell office:value-type="string">
              <text:p>130846,361</text:p>
            </table:table-cell>
            <table:table-cell office:value-type="float" office:value="130846.36099999999"/>
            <table:table-cell office:value-type="float" office:value="29659.39"/>
          </table:table-row>
          <table:table-row>
            <table:table-cell office:value-type="string">
              <text:p>138289,253</text:p>
            </table:table-cell>
            <table:table-cell office:value-type="float" office:value="138289.253"/>
            <table:table-cell office:value-type="float" office:value="32071.77"/>
          </table:table-row>
          <table:table-row>
            <table:table-cell office:value-type="string">
              <text:p>130379,774</text:p>
            </table:table-cell>
            <table:table-cell office:value-type="float" office:value="130379.774"/>
            <table:table-cell office:value-type="float" office:value="30515.75"/>
          </table:table-row>
          <table:table-row>
            <table:table-cell office:value-type="string">
              <text:p>118861,997</text:p>
            </table:table-cell>
            <table:table-cell office:value-type="float" office:value="118861.997"/>
            <table:table-cell office:value-type="float" office:value="28289.458999999999"/>
          </table:table-row>
          <table:table-row>
            <table:table-cell office:value-type="string">
              <text:p>102526,299</text:p>
            </table:table-cell>
            <table:table-cell office:value-type="float" office:value="102526.299"/>
            <table:table-cell office:value-type="float" office:value="24284.292000000001"/>
          </table:table-row>
          <table:table-row>
            <table:table-cell office:value-type="string">
              <text:p>95383,066</text:p>
            </table:table-cell>
            <table:table-cell office:value-type="float" office:value="95383.065999999992"/>
            <table:table-cell office:value-type="float" office:value="22093.149000000001"/>
          </table:table-row>
          <table:table-row>
            <table:table-cell office:value-type="string">
              <text:p>103730,477</text:p>
            </table:table-cell>
            <table:table-cell office:value-type="float" office:value="103730.477"/>
            <table:table-cell office:value-type="float" office:value="23578.039000000001"/>
          </table:table-row>
          <table:table-row>
            <table:table-cell office:value-type="string">
              <text:p>95229,076</text:p>
            </table:table-cell>
            <table:table-cell office:value-type="float" office:value="95229.076000000001"/>
            <table:table-cell office:value-type="float" office:value="21430.760999999999"/>
          </table:table-row>
          <table:table-row>
            <table:table-cell office:value-type="string">
              <text:p>109815,078</text:p>
            </table:table-cell>
            <table:table-cell office:value-type="float" office:value="109815.07799999999"/>
            <table:table-cell office:value-type="float" office:value="24945.679"/>
          </table:table-row>
          <table:table-row>
            <table:table-cell office:value-type="string">
              <text:p>120635,257</text:p>
            </table:table-cell>
            <table:table-cell office:value-type="float" office:value="120635.257"/>
            <table:table-cell office:value-type="float" office:value="27771.616000000002"/>
          </table:table-row>
          <table:table-row>
            <table:table-cell office:value-type="string">
              <text:p>144708,948</text:p>
            </table:table-cell>
            <table:table-cell office:value-type="float" office:value="144708.94799999997"/>
            <table:table-cell office:value-type="float" office:value="33103.203999999998"/>
          </table:table-row>
          <table:table-row>
            <table:table-cell office:value-type="string">
              <text:p>143505,813</text:p>
            </table:table-cell>
            <table:table-cell office:value-type="float" office:value="143505.81300000002"/>
            <table:table-cell office:value-type="float" office:value="32853.836000000003"/>
          </table:table-row>
          <table:table-row>
            <table:table-cell office:value-type="string">
              <text:p>149497,522</text:p>
            </table:table-cell>
            <table:table-cell office:value-type="float" office:value="149497.522"/>
            <table:table-cell office:value-type="float" office:value="34097.023000000001"/>
          </table:table-row>
          <table:table-row>
            <table:table-cell office:value-type="string">
              <text:p>136994,983</text:p>
            </table:table-cell>
            <table:table-cell office:value-type="float" office:value="136994.98300000001"/>
            <table:table-cell office:value-type="float" office:value="31567.815999999999"/>
          </table:table-row>
          <table:table-row>
            <table:table-cell office:value-type="string">
              <text:p>132424,736</text:p>
            </table:table-cell>
            <table:table-cell office:value-type="float" office:value="132424.736"/>
            <table:table-cell office:value-type="float" office:value="30917.565999999999"/>
          </table:table-row>
          <table:table-row>
            <table:table-cell office:value-type="string">
              <text:p>122283,641</text:p>
            </table:table-cell>
            <table:table-cell office:value-type="float" office:value="122283.641"/>
            <table:table-cell office:value-type="float" office:value="29059.444"/>
          </table:table-row>
          <table:table-row>
            <table:table-cell office:value-type="string">
              <text:p>101109,213</text:p>
            </table:table-cell>
            <table:table-cell office:value-type="float" office:value="101109.213"/>
            <table:table-cell office:value-type="float" office:value="23525.710999999999"/>
          </table:table-row>
          <table:table-row>
            <table:table-cell office:value-type="string">
              <text:p>95305,369</text:p>
            </table:table-cell>
            <table:table-cell office:value-type="float" office:value="95305.369000000006"/>
            <table:table-cell office:value-type="float" office:value="21830.271000000001"/>
          </table:table-row>
          <table:table-row>
            <table:table-cell office:value-type="string">
              <text:p>104776,716</text:p>
            </table:table-cell>
            <table:table-cell office:value-type="float" office:value="104776.71599999999"/>
            <table:table-cell office:value-type="float" office:value="24267.831999999999"/>
          </table:table-row>
          <table:table-row>
            <table:table-cell office:value-type="string">
              <text:p>100760,51</text:p>
            </table:table-cell>
            <table:table-cell office:value-type="float" office:value="100760.51"/>
            <table:table-cell office:value-type="float" office:value="22981.245999999999"/>
          </table:table-row>
          <table:table-row>
            <table:table-cell office:value-type="string">
              <text:p>102521,033</text:p>
            </table:table-cell>
            <table:table-cell office:value-type="float" office:value="102521.033"/>
            <table:table-cell office:value-type="float" office:value="23131.576000000001"/>
          </table:table-row>
          <table:table-row>
            <table:table-cell office:value-type="string">
              <text:p>117896,704</text:p>
            </table:table-cell>
            <table:table-cell office:value-type="float" office:value="117896.704"/>
            <table:table-cell office:value-type="float" office:value="26889.206999999999"/>
          </table:table-row>
          <table:table-row>
            <table:table-cell office:value-type="string">
              <text:p>128547,544</text:p>
            </table:table-cell>
            <table:table-cell office:value-type="float" office:value="128547.54399999999"/>
            <table:table-cell office:value-type="float" office:value="29033.759999999998"/>
          </table:table-row>
          <table:table-row>
            <table:table-cell office:value-type="string">
              <text:p>162417,529</text:p>
            </table:table-cell>
            <table:table-cell office:value-type="float" office:value="162417.52900000001"/>
            <table:table-cell office:value-type="float" office:value="36820.063999999998"/>
          </table:table-row>
          <table:table-row>
            <table:table-cell office:value-type="string">
              <text:p>142749,088</text:p>
            </table:table-cell>
            <table:table-cell office:value-type="float" office:value="142749.08799999999"/>
            <table:table-cell office:value-type="float" office:value="31869.597000000002"/>
          </table:table-row>
          <table:table-row>
            <table:table-cell office:value-type="string">
              <text:p>134248,404</text:p>
            </table:table-cell>
            <table:table-cell office:value-type="float" office:value="134248.40400000001"/>
            <table:table-cell office:value-type="float" office:value="30824.053"/>
          </table:table-row>
          <table:table-row>
            <table:table-cell office:value-type="string">
              <text:p>126830,038</text:p>
            </table:table-cell>
            <table:table-cell office:value-type="float" office:value="126830.038"/>
            <table:table-cell office:value-type="float" office:value="29445.481"/>
          </table:table-row>
          <table:table-row>
            <table:table-cell office:value-type="string">
              <text:p>118778,832</text:p>
            </table:table-cell>
            <table:table-cell office:value-type="float" office:value="118778.83200000001"/>
            <table:table-cell office:value-type="float" office:value="27887.870999999999"/>
          </table:table-row>
          <table:table-row>
            <table:table-cell office:value-type="string">
              <text:p>108113,909</text:p>
            </table:table-cell>
            <table:table-cell office:value-type="float" office:value="108113.909"/>
            <table:table-cell office:value-type="float" office:value="24927.702000000001"/>
          </table:table-row>
          <table:table-row>
            <table:table-cell office:value-type="string">
              <text:p>100323,517</text:p>
            </table:table-cell>
            <table:table-cell office:value-type="float" office:value="100323.51700000001"/>
            <table:table-cell office:value-type="float" office:value="22816.170999999998"/>
          </table:table-row>
          <table:table-row>
            <table:table-cell office:value-type="string">
              <text:p>101734,087</text:p>
            </table:table-cell>
            <table:table-cell office:value-type="float" office:value="101734.08700000001"/>
            <table:table-cell office:value-type="float" office:value="22639.427"/>
          </table:table-row>
          <table:table-row>
            <table:table-cell office:value-type="string">
              <text:p>99323,707</text:p>
            </table:table-cell>
            <table:table-cell office:value-type="float" office:value="99323.706999999995"/>
            <table:table-cell office:value-type="float" office:value="22069.782999999999"/>
          </table:table-row>
          <table:table-row>
            <table:table-cell office:value-type="string">
              <text:p>103879,825</text:p>
            </table:table-cell>
            <table:table-cell office:value-type="float" office:value="103879.825"/>
            <table:table-cell office:value-type="float" office:value="23690.069"/>
          </table:table-row>
          <table:table-row>
            <table:table-cell office:value-type="string">
              <text:p>106369,226</text:p>
            </table:table-cell>
            <table:table-cell office:value-type="float" office:value="106369.226"/>
            <table:table-cell office:value-type="float" office:value="24195.620999999999"/>
          </table:table-row>
          <table:table-row>
            <table:table-cell office:value-type="string">
              <text:p>139306,61</text:p>
            </table:table-cell>
            <table:table-cell office:value-type="float" office:value="139306.60999999999"/>
            <table:table-cell office:value-type="float" office:value="31493.013999999999"/>
          </table:table-row>
          <table:table-row>
            <table:table-cell office:value-type="string">
              <text:p>140017,59</text:p>
            </table:table-cell>
            <table:table-cell office:value-type="float" office:value="140017.59"/>
            <table:table-cell office:value-type="float" office:value="31871.526999999998"/>
          </table:table-row>
          <table:table-row>
            <table:table-cell office:value-type="string">
              <text:p>152065,898</text:p>
            </table:table-cell>
            <table:table-cell office:value-type="float" office:value="152065.89799999999"/>
            <table:table-cell office:value-type="float" office:value="34253.938000000002"/>
          </table:table-row>
          <table:table-row>
            <table:table-cell office:value-type="string">
              <text:p>171171,813</text:p>
            </table:table-cell>
            <table:table-cell office:value-type="float" office:value="171171.81300000002"/>
            <table:table-cell office:value-type="float" office:value="39289.904999999999"/>
          </table:table-row>
          <table:table-row>
            <table:table-cell office:value-type="string">
              <text:p>140281,339</text:p>
            </table:table-cell>
            <table:table-cell office:value-type="float" office:value="140281.33899999998"/>
            <table:table-cell office:value-type="float" office:value="32017.216"/>
          </table:table-row>
          <table:table-row>
            <table:table-cell office:value-type="string">
              <text:p>125038,735</text:p>
            </table:table-cell>
            <table:table-cell office:value-type="float" office:value="125038.73500000002"/>
            <table:table-cell office:value-type="float" office:value="29187.666000000001"/>
          </table:table-row>
          <table:table-row>
            <table:table-cell office:value-type="string">
              <text:p>110736,76</text:p>
            </table:table-cell>
            <table:table-cell office:value-type="float" office:value="110736.76000000001"/>
            <table:table-cell office:value-type="float" office:value="25494.594000000001"/>
          </table:table-row>
          <table:table-row>
            <table:table-cell office:value-type="string">
              <text:p>95260,75</text:p>
            </table:table-cell>
            <table:table-cell office:value-type="float" office:value="95260.75"/>
            <table:table-cell office:value-type="float" office:value="21713.024000000001"/>
          </table:table-row>
          <table:table-row>
            <table:table-cell office:value-type="string">
              <text:p>105135,312</text:p>
            </table:table-cell>
            <table:table-cell office:value-type="float" office:value="105135.31200000001"/>
            <table:table-cell office:value-type="float" office:value="23980.41"/>
          </table:table-row>
          <table:table-row>
            <table:table-cell office:value-type="string">
              <text:p>102724,858</text:p>
            </table:table-cell>
            <table:table-cell office:value-type="float" office:value="102724.85800000001"/>
            <table:table-cell office:value-type="float" office:value="23194.507000000001"/>
          </table:table-row>
          <table:table-row>
            <table:table-cell office:value-type="string">
              <text:p>108643,562</text:p>
            </table:table-cell>
            <table:table-cell office:value-type="float" office:value="108643.56200000001"/>
            <table:table-cell office:value-type="float" office:value="24569.437000000002"/>
          </table:table-row>
          <table:table-row>
            <table:table-cell office:value-type="string">
              <text:p>117879,888</text:p>
            </table:table-cell>
            <table:table-cell office:value-type="float" office:value="117879.88799999999"/>
            <table:table-cell office:value-type="float" office:value="27179.276999999998"/>
          </table:table-row>
          <table:table-row>
            <table:table-cell office:value-type="string">
              <text:p>148812,181</text:p>
            </table:table-cell>
            <table:table-cell office:value-type="float" office:value="148812.18100000001"/>
            <table:table-cell office:value-type="float" office:value="34317.368000000002"/>
          </table:table-row>
          <table:table-row>
            <table:table-cell office:value-type="string">
              <text:p>147932,747</text:p>
            </table:table-cell>
            <table:table-cell office:value-type="float" office:value="147932.747"/>
            <table:table-cell office:value-type="float" office:value="34036.552000000003"/>
          </table:table-row>
          <table:table-row>
            <table:table-cell office:value-type="string">
              <text:p>161749,957</text:p>
            </table:table-cell>
            <table:table-cell office:value-type="float" office:value="161749.95699999999"/>
            <table:table-cell office:value-type="float" office:value="37107.428999999996"/>
          </table:table-row>
          <table:table-row>
            <table:table-cell office:value-type="string">
              <text:p>159677,307</text:p>
            </table:table-cell>
            <table:table-cell office:value-type="float" office:value="159677.307"/>
            <table:table-cell office:value-type="float" office:value="37100.161999999997"/>
          </table:table-row>
          <table:table-row>
            <table:table-cell office:value-type="string">
              <text:p>128801,379</text:p>
            </table:table-cell>
            <table:table-cell office:value-type="float" office:value="128801.37899999999"/>
            <table:table-cell office:value-type="float" office:value="29338.440999999999"/>
          </table:table-row>
          <table:table-row>
            <table:table-cell office:value-type="string">
              <text:p>125955,576</text:p>
            </table:table-cell>
            <table:table-cell office:value-type="float" office:value="125955.576"/>
            <table:table-cell office:value-type="float" office:value="29423.253000000001"/>
          </table:table-row>
          <table:table-row>
            <table:table-cell office:value-type="string">
              <text:p>108290,78</text:p>
            </table:table-cell>
            <table:table-cell office:value-type="float" office:value="108290.78"/>
            <table:table-cell office:value-type="float" office:value="25294.499"/>
          </table:table-row>
          <table:table-row>
            <table:table-cell office:value-type="string">
              <text:p>92175,798</text:p>
            </table:table-cell>
            <table:table-cell office:value-type="float" office:value="92175.79800000001"/>
            <table:table-cell office:value-type="float" office:value="21222.62"/>
          </table:table-row>
          <table:table-row>
            <table:table-cell office:value-type="string">
              <text:p>102637,755</text:p>
            </table:table-cell>
            <table:table-cell office:value-type="float" office:value="102637.755"/>
            <table:table-cell office:value-type="float" office:value="23392.973000000002"/>
          </table:table-row>
          <table:table-row>
            <table:table-cell office:value-type="string">
              <text:p>101882,594</text:p>
            </table:table-cell>
            <table:table-cell office:value-type="float" office:value="101882.59399999998"/>
            <table:table-cell office:value-type="float" office:value="23051.580999999998"/>
          </table:table-row>
          <table:table-row>
            <table:table-cell office:value-type="string">
              <text:p>96520,869</text:p>
            </table:table-cell>
            <table:table-cell office:value-type="float" office:value="96520.868999999992"/>
            <table:table-cell office:value-type="float" office:value="21514.344000000001"/>
          </table:table-row>
          <table:table-row>
            <table:table-cell office:value-type="string">
              <text:p>112492,672</text:p>
            </table:table-cell>
            <table:table-cell office:value-type="float" office:value="112492.67199999999"/>
            <table:table-cell office:value-type="float" office:value="25555.638999999999"/>
          </table:table-row>
          <table:table-row>
            <table:table-cell office:value-type="string">
              <text:p>143480,606</text:p>
            </table:table-cell>
            <table:table-cell office:value-type="float" office:value="143480.606"/>
            <table:table-cell office:value-type="float" office:value="32834.345000000001"/>
          </table:table-row>
          <table:table-row>
            <table:table-cell office:value-type="string">
              <text:p>145555,306</text:p>
            </table:table-cell>
            <table:table-cell office:value-type="float" office:value="145555.30599999998"/>
            <table:table-cell office:value-type="float" office:value="33591.976999999999"/>
          </table:table-row>
          <table:table-row>
            <table:table-cell office:value-type="string">
              <text:p>171857,467</text:p>
            </table:table-cell>
            <table:table-cell office:value-type="float" office:value="171857.467"/>
            <table:table-cell office:value-type="float" office:value="39654.339999999997"/>
          </table:table-row>
          <table:table-row>
            <table:table-cell office:value-type="string">
              <text:p>160332,782</text:p>
            </table:table-cell>
            <table:table-cell office:value-type="float" office:value="160332.78200000001"/>
            <table:table-cell office:value-type="float" office:value="37080.360999999997"/>
          </table:table-row>
          <table:table-row>
            <table:table-cell office:value-type="string">
              <text:p>135090,483</text:p>
            </table:table-cell>
            <table:table-cell office:value-type="float" office:value="135090.48300000001"/>
            <table:table-cell office:value-type="float" office:value="30504.717000000001"/>
          </table:table-row>
          <table:table-row>
            <table:table-cell office:value-type="string">
              <text:p>136219,268</text:p>
            </table:table-cell>
            <table:table-cell office:value-type="float" office:value="136219.26800000001"/>
            <table:table-cell office:value-type="float" office:value="31905.919999999998"/>
          </table:table-row>
          <table:table-row>
            <table:table-cell office:value-type="string">
              <text:p>118725,206</text:p>
            </table:table-cell>
            <table:table-cell office:value-type="float" office:value="118725.20600000001"/>
            <table:table-cell office:value-type="float" office:value="27442.848999999998"/>
          </table:table-row>
          <table:table-row>
            <table:table-cell office:value-type="string">
              <text:p>99506,017</text:p>
            </table:table-cell>
            <table:table-cell office:value-type="float" office:value="99506.016999999993"/>
            <table:table-cell office:value-type="float" office:value="22724.48"/>
          </table:table-row>
          <table:table-row>
            <table:table-cell office:value-type="string">
              <text:p>114681,131</text:p>
            </table:table-cell>
            <table:table-cell office:value-type="float" office:value="114681.13099999999"/>
            <table:table-cell office:value-type="float" office:value="26061.08"/>
          </table:table-row>
          <table:table-row>
            <table:table-cell office:value-type="string">
              <text:p>108571,623</text:p>
            </table:table-cell>
            <table:table-cell office:value-type="float" office:value="108571.62299999999"/>
            <table:table-cell office:value-type="float" office:value="24525.351999999999"/>
          </table:table-row>
          <table:table-row>
            <table:table-cell office:value-type="string">
              <text:p>108023,084</text:p>
            </table:table-cell>
            <table:table-cell office:value-type="float" office:value="108023.084"/>
            <table:table-cell office:value-type="float" office:value="24301.884999999998"/>
          </table:table-row>
          <table:table-row>
            <table:table-cell office:value-type="string">
              <text:p>134113,478</text:p>
            </table:table-cell>
            <table:table-cell office:value-type="float" office:value="134113.478"/>
            <table:table-cell office:value-type="float" office:value="30658.831999999999"/>
          </table:table-row>
          <table:table-row>
            <table:table-cell office:value-type="string">
              <text:p>148925,14</text:p>
            </table:table-cell>
            <table:table-cell office:value-type="float" office:value="148925.14000000001"/>
            <table:table-cell office:value-type="float" office:value="33584.684999999998"/>
          </table:table-row>
          <table:table-row>
            <table:table-cell office:value-type="string">
              <text:p>146607,494</text:p>
            </table:table-cell>
            <table:table-cell office:value-type="float" office:value="146607.49400000001"/>
            <table:table-cell office:value-type="float" office:value="33435.758999999998"/>
          </table:table-row>
          <table:table-row>
            <table:table-cell office:value-type="string">
              <text:p>163084,284</text:p>
            </table:table-cell>
            <table:table-cell office:value-type="float" office:value="163084.28399999999"/>
            <table:table-cell office:value-type="float" office:value="37410.811000000002"/>
          </table:table-row>
          <table:table-row>
            <table:table-cell office:value-type="string">
              <text:p>164025,562</text:p>
            </table:table-cell>
            <table:table-cell office:value-type="float" office:value="164025.56200000001"/>
            <table:table-cell office:value-type="float" office:value="37735.546000000002"/>
          </table:table-row>
          <table:table-row>
            <table:table-cell office:value-type="string">
              <text:p>157938,968</text:p>
            </table:table-cell>
            <table:table-cell office:value-type="float" office:value="157938.96799999999"/>
            <table:table-cell office:value-type="float" office:value="35919.968999999997"/>
          </table:table-row>
          <table:table-row>
            <table:table-cell office:value-type="string">
              <text:p>143081,743</text:p>
            </table:table-cell>
            <table:table-cell office:value-type="float" office:value="143081.74299999999"/>
            <table:table-cell office:value-type="float" office:value="32655.129000000001"/>
          </table:table-row>
          <table:table-row>
            <table:table-cell office:value-type="string">
              <text:p>113399,98</text:p>
            </table:table-cell>
            <table:table-cell office:value-type="float" office:value="113399.97999999998"/>
            <table:table-cell office:value-type="float" office:value="25891.115000000002"/>
          </table:table-row>
          <table:table-row>
            <table:table-cell office:value-type="string">
              <text:p>106545,129</text:p>
            </table:table-cell>
            <table:table-cell office:value-type="float" office:value="106545.129"/>
            <table:table-cell office:value-type="float" office:value="24383.823"/>
          </table:table-row>
          <table:table-row>
            <table:table-cell office:value-type="string">
              <text:p>112648,062</text:p>
            </table:table-cell>
            <table:table-cell office:value-type="float" office:value="112648.06200000001"/>
            <table:table-cell office:value-type="float" office:value="25546.862000000001"/>
          </table:table-row>
          <table:table-row>
            <table:table-cell office:value-type="string">
              <text:p>108055,162</text:p>
            </table:table-cell>
            <table:table-cell office:value-type="float" office:value="108055.162"/>
            <table:table-cell office:value-type="float" office:value="24465.072"/>
          </table:table-row>
          <table:table-row>
            <table:table-cell office:value-type="string">
              <text:p>108630,927</text:p>
            </table:table-cell>
            <table:table-cell office:value-type="float" office:value="108630.927"/>
            <table:table-cell office:value-type="float" office:value="24659.645"/>
          </table:table-row>
          <table:table-row>
            <table:table-cell office:value-type="string">
              <text:p>116475,515</text:p>
            </table:table-cell>
            <table:table-cell office:value-type="float" office:value="116475.515"/>
            <table:table-cell office:value-type="float" office:value="26537.357"/>
          </table:table-row>
          <table:table-row>
            <table:table-cell office:value-type="string">
              <text:p>150180,043</text:p>
            </table:table-cell>
            <table:table-cell office:value-type="float" office:value="150180.04300000001"/>
            <table:table-cell office:value-type="float" office:value="34049.375999999997"/>
          </table:table-row>
          <table:table-row>
            <table:table-cell office:value-type="string">
              <text:p>138423,502</text:p>
            </table:table-cell>
            <table:table-cell office:value-type="float" office:value="138423.50200000001"/>
            <table:table-cell office:value-type="float" office:value="31302.532999999999"/>
          </table:table-row>
          <table:table-row>
            <table:table-cell office:value-type="string">
              <text:p>157867,386</text:p>
            </table:table-cell>
            <table:table-cell office:value-type="float" office:value="157867.386"/>
            <table:table-cell office:value-type="float" office:value="35998.449999999997"/>
          </table:table-row>
          <table:table-row>
            <table:table-cell office:value-type="string">
              <text:p>154908,588</text:p>
            </table:table-cell>
            <table:table-cell office:value-type="float" office:value="154908.58800000002"/>
            <table:table-cell office:value-type="float" office:value="35428.468999999997"/>
          </table:table-row>
          <table:table-row>
            <table:table-cell office:value-type="string">
              <text:p>139428,693</text:p>
            </table:table-cell>
            <table:table-cell office:value-type="float" office:value="139428.693"/>
            <table:table-cell office:value-type="float" office:value="31483.846000000001"/>
          </table:table-row>
          <table:table-row>
            <table:table-cell office:value-type="string">
              <text:p>126121,403</text:p>
            </table:table-cell>
            <table:table-cell office:value-type="float" office:value="126121.40299999999"/>
            <table:table-cell office:value-type="float" office:value="28988.845000000001"/>
          </table:table-row>
          <table:table-row>
            <table:table-cell office:value-type="string">
              <text:p>112965,562</text:p>
            </table:table-cell>
            <table:table-cell office:value-type="float" office:value="112965.56200000001"/>
            <table:table-cell office:value-type="float" office:value="26196.662"/>
          </table:table-row>
          <table:table-row>
            <table:table-cell office:value-type="string">
              <text:p>104268,267</text:p>
            </table:table-cell>
            <table:table-cell office:value-type="float" office:value="104268.26700000001"/>
            <table:table-cell office:value-type="float" office:value="23790.823"/>
          </table:table-row>
          <table:table-row>
            <table:table-cell office:value-type="string">
              <text:p>111709,01</text:p>
            </table:table-cell>
            <table:table-cell office:value-type="float" office:value="111709.01000000001"/>
            <table:table-cell office:value-type="float" office:value="25399.378000000001"/>
          </table:table-row>
          <table:table-row>
            <table:table-cell office:value-type="string">
              <text:p>111085,386</text:p>
            </table:table-cell>
            <table:table-cell office:value-type="float" office:value="111085.386"/>
            <table:table-cell office:value-type="float" office:value="25252.600999999999"/>
          </table:table-row>
          <table:table-row>
            <table:table-cell office:value-type="string">
              <text:p>110407,907</text:p>
            </table:table-cell>
            <table:table-cell office:value-type="float" office:value="110407.90699999999"/>
            <table:table-cell office:value-type="float" office:value="24578.92"/>
          </table:table-row>
          <table:table-row>
            <table:table-cell office:value-type="string">
              <text:p>123892,142</text:p>
            </table:table-cell>
            <table:table-cell office:value-type="float" office:value="123892.14199999999"/>
            <table:table-cell office:value-type="float" office:value="27918.598999999998"/>
          </table:table-row>
          <table:table-row>
            <table:table-cell office:value-type="string">
              <text:p>166555,671</text:p>
            </table:table-cell>
            <table:table-cell office:value-type="float" office:value="166555.671"/>
            <table:table-cell office:value-type="float" office:value="38359.874000000003"/>
          </table:table-row>
          <table:table-row>
            <table:table-cell office:value-type="string">
              <text:p>162632,108</text:p>
            </table:table-cell>
            <table:table-cell office:value-type="float" office:value="162632.10800000001"/>
            <table:table-cell office:value-type="float" office:value="37273.167000000001"/>
          </table:table-row>
          <table:table-row>
            <table:table-cell office:value-type="string">
              <text:p>176950,372</text:p>
            </table:table-cell>
            <table:table-cell office:value-type="float" office:value="176950.372"/>
            <table:table-cell office:value-type="float" office:value="40714.197999999997"/>
          </table:table-row>
          <table:table-row>
            <table:table-cell office:value-type="string">
              <text:p>0</text:p>
            </table:table-cell>
            <table:table-cell office:value-type="float" office:value="0"/>
            <table:table-cell/>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stroke-dash draw:name="a1" draw:display-name="SysDot" draw:style="rect" draw:dots1="1" draw:dots1-length="0.02083in" draw:dots2="0" draw:dots2-length="0in" draw:distance="0.02083in"/>
  </office:styles>
</office:document-styles>
</file>